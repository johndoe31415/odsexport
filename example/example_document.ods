
<file path=META-INF/manifest.xml><?xml version="1.0" encoding="utf-8"?>
<manifest:manifest xmlns:manifest="urn:oasis:names:tc:opendocument:xmlns:manifes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4">
  <office:font-face-decls>
    <style:font-face style:name="Arial" svg:font-family="'Arial'"/>
  </office:font-face-decls>
  <office:automatic-styles>
    <style:style style:name="cond0_0" style:display-name="cond0_0" style:family="table-cell">
      <style:map style:apply-style-name="glbl0" style:condition="cell-content()&lt;10" style:base-cell-address="'Conditional Formatting'.A1"/>
      <style:map style:apply-style-name="glbl1" style:condition="cell-content()&lt;20" style:base-cell-address="'Conditional Formatting'.A1"/>
      <style:map style:apply-style-name="glbl2" style:condition="cell-content()&lt;30" style:base-cell-address="'Conditional Formatting'.A1"/>
    </style:style>
    <style:style style:name="cond1_0" style:display-name="cond1_0" style:family="table-cell">
      <style:map style:apply-style-name="glbl0" style:condition="is-true-formula(['Conditional Formatting'.$A1]&lt;16)" style:base-cell-address="'Conditional Formatting'.B1"/>
      <style:map style:apply-style-name="glbl1" style:condition="is-true-formula(['Conditional Formatting'.$A1]&lt;32)" style:base-cell-address="'Conditional Formatting'.B1"/>
    </style:style>
    <style:style style:name="cond2_0" style:display-name="cond2_0" style:family="table-cell">
      <style:map style:apply-style-name="glbl0" style:condition="is-true-formula(['Conditional Formatting'.$A1]&lt;8)" style:base-cell-address="'Conditional Formatting'.C1"/>
      <style:map style:apply-style-name="glbl2" style:condition="is-true-formula(['Conditional Formatting'.$A1]&lt;16)" style:base-cell-address="'Conditional Formatting'.C1"/>
      <style:map style:apply-style-name="glbl1" style:condition="is-true-formula(['Conditional Formatting'.$A1]&lt;24)" style:base-cell-address="'Conditional Formatting'.C1"/>
      <style:map style:apply-style-name="glbl3" style:condition="is-true-formula(['Conditional Formatting'.$A1]&lt;32)" style:base-cell-address="'Conditional Formatting'.C1"/>
    </style:style>
    <style:style style:name="cond3_0" style:display-name="cond3_0" style:family="table-cell">
      <style:map style:apply-style-name="glbl4" style:condition="cell-content()=0" style:base-cell-address="'Image'.A1"/>
      <style:map style:apply-style-name="glbl5" style:condition="cell-content()=1" style:base-cell-address="'Image'.A1"/>
      <style:map style:apply-style-name="glbl6" style:condition="cell-content()=2" style:base-cell-address="'Image'.A1"/>
      <style:map style:apply-style-name="glbl7" style:condition="cell-content()=3" style:base-cell-address="'Image'.A1"/>
      <style:map style:apply-style-name="glbl8" style:condition="cell-content()=4" style:base-cell-address="'Image'.A1"/>
      <style:map style:apply-style-name="glbl9" style:condition="cell-content()=5" style:base-cell-address="'Image'.A1"/>
    </style:style>
    <style:style style:name="cond4_0" style:display-name="cond4_0" style:family="table-cell" style:data-style-name="auto10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  <style:map style:apply-style-name="auto11" style:condition="1" style:base-cell-address="'Conditional Multi-Format'.A2"/>
    </style:style>
    <style:style style:name="auto11" style:display-name="auto11" style:family="table-cell" style:data-style-name="auto10">
      <style:text-properties/>
    </style:style>
    <style:style style:name="cond4_1" style:display-name="cond4_1" style:family="table-cell" style:data-style-name="auto12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  <style:map style:apply-style-name="auto13" style:condition="1" style:base-cell-address="'Conditional Multi-Format'.A2"/>
    </style:style>
    <style:style style:name="auto13" style:display-name="auto13" style:family="table-cell" style:data-style-name="auto12">
      <style:text-properties/>
    </style:style>
    <style:style style:name="cond4_2" style:display-name="cond4_2" style:family="table-cell" style:data-style-name="auto14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  <style:map style:apply-style-name="auto15" style:condition="1" style:base-cell-address="'Conditional Multi-Format'.A2"/>
    </style:style>
    <style:style style:name="auto15" style:display-name="auto15" style:family="table-cell" style:data-style-name="auto14">
      <style:text-properties/>
    </style:style>
    <style:style style:name="cond4_3" style:display-name="cond4_3" style:family="table-cell" style:data-style-name="auto16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  <style:map style:apply-style-name="auto17" style:condition="1" style:base-cell-address="'Conditional Multi-Format'.A2"/>
    </style:style>
    <style:style style:name="auto17" style:display-name="auto17" style:family="table-cell" style:data-style-name="auto16">
      <style:text-properties/>
    </style:style>
    <style:style style:name="dr" style:display-name="dr" style:family="table-row"/>
    <style:style style:name="dc" style:display-name="dc" style:family="table-column"/>
    <style:style style:name="auto18" style:display-name="auto18" style:family="table-cell">
      <style:table-cell-properties style:rotation-angle="45"/>
      <style:paragraph-properties fo:text-align="start"/>
      <style:text-properties style:font-name="Arial" fo:font-size="9pt" fo:font-weight="bold" fo:font-style="italic"/>
    </style:style>
    <style:style style:name="auto19" style:display-name="auto19" style:family="table-cell">
      <style:text-properties fo:font-weight="bold"/>
    </style:style>
    <style:style style:name="auto20" style:display-name="auto20" style:family="table-cell">
      <style:text-properties fo:font-style="italic"/>
    </style:style>
    <style:style style:name="auto21" style:display-name="auto21" style:family="table-cell">
      <style:paragraph-properties fo:text-align="start"/>
      <style:text-properties/>
    </style:style>
    <style:style style:name="auto22" style:display-name="auto22" style:family="table-cell">
      <style:paragraph-properties fo:text-align="center"/>
      <style:text-properties/>
    </style:style>
    <style:style style:name="auto23" style:display-name="auto23" style:family="table-cell">
      <style:paragraph-properties fo:text-align="end"/>
      <style:text-properties/>
    </style:style>
    <style:style style:name="auto24" style:display-name="auto24" style:family="table-cell">
      <style:text-properties fo:color="#0000ff"/>
    </style:style>
    <style:style style:name="auto25" style:display-name="auto25" style:family="table-cell">
      <style:table-cell-properties fo:background-color="#aaaaff"/>
      <style:text-properties/>
    </style:style>
    <style:style style:name="auto26" style:display-name="auto26" style:family="table-cell">
      <style:table-cell-properties fo:border-top="0.7500pt solid #ff0000" fo:border-left="0.7500pt solid #ff0000"/>
      <style:text-properties/>
    </style:style>
    <style:style style:name="auto27" style:display-name="auto27" style:family="table-cell">
      <style:table-cell-properties fo:border-top="0.7500pt solid #ff0000"/>
      <style:text-properties/>
    </style:style>
    <style:style style:name="auto28" style:display-name="auto28" style:family="table-cell">
      <style:table-cell-properties fo:border-top="0.7500pt solid #ff0000" fo:border-right="0.7500pt solid #ff0000"/>
      <style:text-properties/>
    </style:style>
    <style:style style:name="auto29" style:display-name="auto29" style:family="table-cell">
      <style:table-cell-properties fo:border-left="0.7500pt solid #ff0000"/>
      <style:text-properties/>
    </style:style>
    <style:style style:name="auto30" style:display-name="auto30" style:family="table-cell">
      <style:table-cell-properties fo:border-right="0.7500pt solid #ff0000"/>
      <style:text-properties/>
    </style:style>
    <style:style style:name="auto31" style:display-name="auto31" style:family="table-cell">
      <style:table-cell-properties fo:border-bottom="0.7500pt solid #ff0000" fo:border-left="0.7500pt solid #ff0000"/>
      <style:text-properties/>
    </style:style>
    <style:style style:name="auto32" style:display-name="auto32" style:family="table-cell">
      <style:table-cell-properties fo:border-bottom="0.7500pt solid #ff0000"/>
      <style:text-properties/>
    </style:style>
    <style:style style:name="auto33" style:display-name="auto33" style:family="table-cell">
      <style:table-cell-properties fo:wrap-option="wrap" fo:border-bottom="0.7500pt solid #ff0000" fo:border-right="0.7500pt solid #ff0000"/>
      <style:text-properties/>
    </style:style>
    <style:style style:name="auto34" style:display-name="auto34" style:family="table-row">
      <style:table-row-properties style:row-height="1cm"/>
    </style:style>
    <style:style style:name="auto35" style:display-name="auto35" style:family="table-cell">
      <style:table-cell-properties style:vertical-align="middle"/>
      <style:text-properties/>
    </style:style>
    <style:style style:name="auto36" style:display-name="auto36" style:family="table-row">
      <style:table-row-properties style:row-height="2cm"/>
    </style:style>
    <style:style style:name="auto37" style:display-name="auto37" style:family="table-column">
      <style:table-column-properties style:column-width="4cm"/>
    </style:style>
    <style:style style:name="auto38" style:display-name="auto38" style:family="table-column">
      <style:table-column-properties style:column-width="5cm"/>
    </style:style>
    <style:style style:name="auto39" style:display-name="auto39" style:family="table-cell" style:data-style-name="auto40">
      <style:text-properties/>
    </style:style>
    <style:style style:name="auto41" style:display-name="auto41" style:family="table-cell" style:data-style-name="auto42">
      <style:text-properties/>
    </style:style>
    <style:style style:name="auto43" style:display-name="auto43" style:family="table-cell" style:data-style-name="auto44">
      <style:text-properties/>
    </style:style>
    <style:style style:name="auto45" style:display-name="auto45" style:family="table-cell" style:data-style-name="auto46">
      <style:text-properties/>
    </style:style>
    <style:style style:name="auto47" style:display-name="auto47" style:family="table-cell" style:data-style-name="auto48">
      <style:text-properties/>
    </style:style>
    <style:style style:name="auto49" style:display-name="auto49" style:family="table-cell" style:data-style-name="auto50">
      <style:text-properties/>
    </style:style>
    <style:style style:name="auto51" style:display-name="auto51" style:family="table-cell" style:data-style-name="auto52">
      <style:text-properties/>
    </style:style>
    <style:style style:name="auto53" style:display-name="auto53" style:family="table-column">
      <style:table-column-properties style:column-width="3cm"/>
    </style:style>
    <style:style style:name="auto54" style:display-name="auto54" style:family="table-column">
      <style:table-column-properties style:column-width="1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 table:style-name="dc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18" office:value-type="string">
            <text:p>Rotated Arial</text:p>
          </table:table-cell>
          <table:table-cell table:style-name="auto19" office:value-type="string">
            <text:p>Bold only</text:p>
          </table:table-cell>
          <table:table-cell table:style-name="auto20" office:value-type="string">
            <text:p>Italics only</text:p>
          </table:table-cell>
          <table:table-cell table:style-name="auto21" office:value-type="string">
            <text:p>Left adjust</text:p>
          </table:table-cell>
          <table:table-cell table:style-name="auto22" office:value-type="string">
            <text:p>Centered</text:p>
          </table:table-cell>
          <table:table-cell table:style-name="auto23" office:value-type="string">
            <text:p>Right adjust</text:p>
          </table:table-cell>
          <table:table-cell table:style-name="auto24" office:value-type="string">
            <text:p>Blue text</text:p>
          </table:table-cell>
          <table:table-cell table:style-name="auto25" office:value-type="string">
            <text:p>Blue backgrou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6" office:value-type="string">
            <text:p>Top left corner of red box</text:p>
          </table:table-cell>
          <table:table-cell table:style-name="auto27"/>
          <table:table-cell table:style-name="auto27"/>
          <table:table-cell table:style-name="auto27"/>
          <table:table-cell table:style-name="auto27"/>
          <table:table-cell table:style-name="auto28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9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3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31"/>
          <table:table-cell table:style-name="auto32"/>
          <table:table-cell table:style-name="auto32"/>
          <table:table-cell table:style-name="auto32"/>
          <table:table-cell table:style-name="auto32"/>
          <table:table-cell table:style-name="auto33" office:value-type="string">
            <text:p>Bottom right corner of red box with wrapped text as well because the content in here is so lo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K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AB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elow here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visibility="collapse" table:style-name="dr">
          <table:table-cell office:value-type="string">
            <text:p>I'm hidden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bove this row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4">
          <table:table-cell table:style-name="auto35" office:value-type="string">
            <text:p>This row is exactly 1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6">
          <table:table-cell table:style-name="auto35" office:value-type="string">
            <text:p>This row is exactly 2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Formulas">
        <table:table-column table:style-name="auto37"/>
        <table:table-column table:style-name="auto38"/>
        <table:table-column/>
        <table:table-row>
          <table:table-cell table:style-name="auto19" office:value-type="string">
            <text:p>Imported value:</text:p>
          </table:table-cell>
          <table:table-cell office:value-type="error" table:formula="of:=['Formatting'.B15]"/>
          <table:table-cell office:value-type="string">
            <text:p/>
          </table:table-cell>
        </table:table-row>
        <table:table-row>
          <table:table-cell table:style-name="auto19" office:value-type="string">
            <text:p>Computed value 1:</text:p>
          </table:table-cell>
          <table:table-cell office:value-type="error" table:formula="of:=(((([.B1]*2)/3)+123)+Pi())"/>
          <table:table-cell office:value-type="error" table:formula="of:=([.B1]*2/3) + 123 + Pi()"/>
        </table:table-row>
        <table:table-row>
          <table:table-cell table:style-name="auto19" office:value-type="string">
            <text:p>Computed value 2:</text:p>
          </table:table-cell>
          <table:table-cell office:value-type="error" table:formula="of:=([.C2]/300)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0 digits:</text:p>
          </table:table-cell>
          <table:table-cell table:style-name="auto39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1 digits:</text:p>
          </table:table-cell>
          <table:table-cell table:style-name="auto11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2 digits:</text:p>
          </table:table-cell>
          <table:table-cell table:style-name="auto41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3 digits:</text:p>
          </table:table-cell>
          <table:table-cell table:style-name="auto13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4 digits:</text:p>
          </table:table-cell>
          <table:table-cell table:style-name="auto43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5 digits:</text:p>
          </table:table-cell>
          <table:table-cell table:style-name="auto45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Percent with 0 digits:</text:p>
          </table:table-cell>
          <table:table-cell table:style-name="auto47" office:value-type="error" table:formula="of:=[.B3]"/>
          <table:table-cell office:value-type="string">
            <text:p/>
          </table:table-cell>
        </table:table-row>
        <table:table-row>
          <table:table-cell table:style-name="auto19" office:value-type="string">
            <text:p>Percent with 1 digits:</text:p>
          </table:table-cell>
          <table:table-cell table:style-name="auto15" office:value-type="error" table:formula="of:=[.B3]"/>
          <table:table-cell office:value-type="string">
            <text:p/>
          </table:table-cell>
        </table:table-row>
        <table:table-row>
          <table:table-cell table:style-name="auto19" office:value-type="string">
            <text:p>Percent with 2 digits:</text:p>
          </table:table-cell>
          <table:table-cell table:style-name="auto17" office:value-type="error" table:formula="of:=[.B3]"/>
          <table:table-cell office:value-type="string">
            <text:p/>
          </table:table-cell>
        </table:table-row>
        <table:table-row>
          <table:table-cell table:style-name="auto19" office:value-type="string">
            <text:p>Datetime as ISO:</text:p>
          </table:table-cell>
          <table:table-cell table:style-name="auto49" office:value-type="date" office:date-value="2026-07-15T13:41:27"/>
          <table:table-cell office:value-type="string">
            <text:p/>
          </table:table-cell>
        </table:table-row>
        <table:table-row>
          <table:table-cell table:style-name="auto19" office:value-type="string">
            <text:p>Datetime as German:</text:p>
          </table:table-cell>
          <table:table-cell table:style-name="auto51" office:value-type="date" office:date-value="2026-07-15T13:41:27"/>
          <table:table-cell office:value-type="string">
            <text:p/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adius of cylinder:</text:p>
          </table:table-cell>
          <table:table-cell office:value-type="float" office:value="40">
            <text:p>40</text:p>
          </table:table-cell>
          <table:table-cell office:value-type="string">
            <text:p>mm</text:p>
          </table:table-cell>
        </table:table-row>
        <table:table-row>
          <table:table-cell office:value-type="string">
            <text:p>Height of cylinder:</text:p>
          </table:table-cell>
          <table:table-cell office:value-type="float" office:value="120">
            <text:p>120</text:p>
          </table:table-cell>
          <table:table-cell office:value-type="string">
            <text:p>mm</text:p>
          </table:table-cell>
        </table:table-row>
        <table:table-row>
          <table:table-cell office:value-type="string">
            <text:p>Volume of cylinder:</text:p>
          </table:table-cell>
          <table:table-cell office:value-type="error" table:formula="of:=((([.B16]^2)*3.1415)*[.B17])"/>
          <table:table-cell office:value-type="string">
            <text:p>mm³</text:p>
          </table:table-cell>
        </table:table-row>
      </table:table>
      <table:table table:name="Conditional Formatting">
        <table:table-column/>
        <table:table-column table:style-name="auto53"/>
        <table:table-column table:style-name="auto37"/>
        <table:table-row>
          <table:table-cell table:style-name="cond0_0" office:value-type="float" office:value="0">
            <text:p>0</text:p>
          </table:table-cell>
          <table:table-cell table:style-name="cond1_0" office:value-type="string">
            <text:p>Hexvalue 0x00</text:p>
          </table:table-cell>
          <table:table-cell table:style-name="cond2_0" office:value-type="string">
            <text:p>Octvalue 0o000000</text:p>
          </table:table-cell>
        </table:table-row>
        <table:table-row>
          <table:table-cell table:style-name="cond0_0" office:value-type="float" office:value="1">
            <text:p>1</text:p>
          </table:table-cell>
          <table:table-cell table:style-name="cond1_0" office:value-type="string">
            <text:p>Hexvalue 0x01</text:p>
          </table:table-cell>
          <table:table-cell table:style-name="cond2_0" office:value-type="string">
            <text:p>Octvalue 0o000001</text:p>
          </table:table-cell>
        </table:table-row>
        <table:table-row>
          <table:table-cell table:style-name="cond0_0" office:value-type="float" office:value="2">
            <text:p>2</text:p>
          </table:table-cell>
          <table:table-cell table:style-name="cond1_0" office:value-type="string">
            <text:p>Hexvalue 0x02</text:p>
          </table:table-cell>
          <table:table-cell table:style-name="cond2_0" office:value-type="string">
            <text:p>Octvalue 0o000002</text:p>
          </table:table-cell>
        </table:table-row>
        <table:table-row>
          <table:table-cell table:style-name="cond0_0" office:value-type="float" office:value="3">
            <text:p>3</text:p>
          </table:table-cell>
          <table:table-cell table:style-name="cond1_0" office:value-type="string">
            <text:p>Hexvalue 0x03</text:p>
          </table:table-cell>
          <table:table-cell table:style-name="cond2_0" office:value-type="string">
            <text:p>Octvalue 0o000003</text:p>
          </table:table-cell>
        </table:table-row>
        <table:table-row>
          <table:table-cell table:style-name="cond0_0" office:value-type="float" office:value="4">
            <text:p>4</text:p>
          </table:table-cell>
          <table:table-cell table:style-name="cond1_0" office:value-type="string">
            <text:p>Hexvalue 0x04</text:p>
          </table:table-cell>
          <table:table-cell table:style-name="cond2_0" office:value-type="string">
            <text:p>Octvalue 0o000004</text:p>
          </table:table-cell>
        </table:table-row>
        <table:table-row>
          <table:table-cell table:style-name="cond0_0" office:value-type="float" office:value="5">
            <text:p>5</text:p>
          </table:table-cell>
          <table:table-cell table:style-name="cond1_0" office:value-type="string">
            <text:p>Hexvalue 0x05</text:p>
          </table:table-cell>
          <table:table-cell table:style-name="cond2_0" office:value-type="string">
            <text:p>Octvalue 0o000005</text:p>
          </table:table-cell>
        </table:table-row>
        <table:table-row>
          <table:table-cell table:style-name="cond0_0" office:value-type="float" office:value="6">
            <text:p>6</text:p>
          </table:table-cell>
          <table:table-cell table:style-name="cond1_0" office:value-type="string">
            <text:p>Hexvalue 0x06</text:p>
          </table:table-cell>
          <table:table-cell table:style-name="cond2_0" office:value-type="string">
            <text:p>Octvalue 0o000006</text:p>
          </table:table-cell>
        </table:table-row>
        <table:table-row>
          <table:table-cell table:style-name="cond0_0" office:value-type="float" office:value="7">
            <text:p>7</text:p>
          </table:table-cell>
          <table:table-cell table:style-name="cond1_0" office:value-type="string">
            <text:p>Hexvalue 0x07</text:p>
          </table:table-cell>
          <table:table-cell table:style-name="cond2_0" office:value-type="string">
            <text:p>Octvalue 0o000007</text:p>
          </table:table-cell>
        </table:table-row>
        <table:table-row>
          <table:table-cell table:style-name="cond0_0" office:value-type="float" office:value="8">
            <text:p>8</text:p>
          </table:table-cell>
          <table:table-cell table:style-name="cond1_0" office:value-type="string">
            <text:p>Hexvalue 0x08</text:p>
          </table:table-cell>
          <table:table-cell table:style-name="cond2_0" office:value-type="string">
            <text:p>Octvalue 0o000010</text:p>
          </table:table-cell>
        </table:table-row>
        <table:table-row>
          <table:table-cell table:style-name="cond0_0" office:value-type="float" office:value="9">
            <text:p>9</text:p>
          </table:table-cell>
          <table:table-cell table:style-name="cond1_0" office:value-type="string">
            <text:p>Hexvalue 0x09</text:p>
          </table:table-cell>
          <table:table-cell table:style-name="cond2_0" office:value-type="string">
            <text:p>Octvalue 0o000011</text:p>
          </table:table-cell>
        </table:table-row>
        <table:table-row>
          <table:table-cell table:style-name="cond0_0" office:value-type="float" office:value="10">
            <text:p>10</text:p>
          </table:table-cell>
          <table:table-cell table:style-name="cond1_0" office:value-type="string">
            <text:p>Hexvalue 0x0a</text:p>
          </table:table-cell>
          <table:table-cell table:style-name="cond2_0" office:value-type="string">
            <text:p>Octvalue 0o000012</text:p>
          </table:table-cell>
        </table:table-row>
        <table:table-row>
          <table:table-cell table:style-name="cond0_0" office:value-type="float" office:value="11">
            <text:p>11</text:p>
          </table:table-cell>
          <table:table-cell table:style-name="cond1_0" office:value-type="string">
            <text:p>Hexvalue 0x0b</text:p>
          </table:table-cell>
          <table:table-cell table:style-name="cond2_0" office:value-type="string">
            <text:p>Octvalue 0o000013</text:p>
          </table:table-cell>
        </table:table-row>
        <table:table-row>
          <table:table-cell table:style-name="cond0_0" office:value-type="float" office:value="12">
            <text:p>12</text:p>
          </table:table-cell>
          <table:table-cell table:style-name="cond1_0" office:value-type="string">
            <text:p>Hexvalue 0x0c</text:p>
          </table:table-cell>
          <table:table-cell table:style-name="cond2_0" office:value-type="string">
            <text:p>Octvalue 0o000014</text:p>
          </table:table-cell>
        </table:table-row>
        <table:table-row>
          <table:table-cell table:style-name="cond0_0" office:value-type="float" office:value="13">
            <text:p>13</text:p>
          </table:table-cell>
          <table:table-cell table:style-name="cond1_0" office:value-type="string">
            <text:p>Hexvalue 0x0d</text:p>
          </table:table-cell>
          <table:table-cell table:style-name="cond2_0" office:value-type="string">
            <text:p>Octvalue 0o000015</text:p>
          </table:table-cell>
        </table:table-row>
        <table:table-row>
          <table:table-cell table:style-name="cond0_0" office:value-type="float" office:value="14">
            <text:p>14</text:p>
          </table:table-cell>
          <table:table-cell table:style-name="cond1_0" office:value-type="string">
            <text:p>Hexvalue 0x0e</text:p>
          </table:table-cell>
          <table:table-cell table:style-name="cond2_0" office:value-type="string">
            <text:p>Octvalue 0o000016</text:p>
          </table:table-cell>
        </table:table-row>
        <table:table-row>
          <table:table-cell table:style-name="cond0_0" office:value-type="float" office:value="15">
            <text:p>15</text:p>
          </table:table-cell>
          <table:table-cell table:style-name="cond1_0" office:value-type="string">
            <text:p>Hexvalue 0x0f</text:p>
          </table:table-cell>
          <table:table-cell table:style-name="cond2_0" office:value-type="string">
            <text:p>Octvalue 0o000017</text:p>
          </table:table-cell>
        </table:table-row>
        <table:table-row>
          <table:table-cell table:style-name="cond0_0" office:value-type="float" office:value="16">
            <text:p>16</text:p>
          </table:table-cell>
          <table:table-cell table:style-name="cond1_0" office:value-type="string">
            <text:p>Hexvalue 0x10</text:p>
          </table:table-cell>
          <table:table-cell table:style-name="cond2_0" office:value-type="string">
            <text:p>Octvalue 0o000020</text:p>
          </table:table-cell>
        </table:table-row>
        <table:table-row>
          <table:table-cell table:style-name="cond0_0" office:value-type="float" office:value="17">
            <text:p>17</text:p>
          </table:table-cell>
          <table:table-cell table:style-name="cond1_0" office:value-type="string">
            <text:p>Hexvalue 0x11</text:p>
          </table:table-cell>
          <table:table-cell table:style-name="cond2_0" office:value-type="string">
            <text:p>Octvalue 0o000021</text:p>
          </table:table-cell>
        </table:table-row>
        <table:table-row>
          <table:table-cell table:style-name="cond0_0" office:value-type="float" office:value="18">
            <text:p>18</text:p>
          </table:table-cell>
          <table:table-cell table:style-name="cond1_0" office:value-type="string">
            <text:p>Hexvalue 0x12</text:p>
          </table:table-cell>
          <table:table-cell table:style-name="cond2_0" office:value-type="string">
            <text:p>Octvalue 0o000022</text:p>
          </table:table-cell>
        </table:table-row>
        <table:table-row>
          <table:table-cell table:style-name="cond0_0" office:value-type="float" office:value="19">
            <text:p>19</text:p>
          </table:table-cell>
          <table:table-cell table:style-name="cond1_0" office:value-type="string">
            <text:p>Hexvalue 0x13</text:p>
          </table:table-cell>
          <table:table-cell table:style-name="cond2_0" office:value-type="string">
            <text:p>Octvalue 0o000023</text:p>
          </table:table-cell>
        </table:table-row>
        <table:table-row>
          <table:table-cell table:style-name="cond0_0" office:value-type="float" office:value="20">
            <text:p>20</text:p>
          </table:table-cell>
          <table:table-cell table:style-name="cond1_0" office:value-type="string">
            <text:p>Hexvalue 0x14</text:p>
          </table:table-cell>
          <table:table-cell table:style-name="cond2_0" office:value-type="string">
            <text:p>Octvalue 0o000024</text:p>
          </table:table-cell>
        </table:table-row>
        <table:table-row>
          <table:table-cell table:style-name="cond0_0" office:value-type="float" office:value="21">
            <text:p>21</text:p>
          </table:table-cell>
          <table:table-cell table:style-name="cond1_0" office:value-type="string">
            <text:p>Hexvalue 0x15</text:p>
          </table:table-cell>
          <table:table-cell table:style-name="cond2_0" office:value-type="string">
            <text:p>Octvalue 0o000025</text:p>
          </table:table-cell>
        </table:table-row>
        <table:table-row>
          <table:table-cell table:style-name="cond0_0" office:value-type="float" office:value="22">
            <text:p>22</text:p>
          </table:table-cell>
          <table:table-cell table:style-name="cond1_0" office:value-type="string">
            <text:p>Hexvalue 0x16</text:p>
          </table:table-cell>
          <table:table-cell table:style-name="cond2_0" office:value-type="string">
            <text:p>Octvalue 0o000026</text:p>
          </table:table-cell>
        </table:table-row>
        <table:table-row>
          <table:table-cell table:style-name="cond0_0" office:value-type="float" office:value="23">
            <text:p>23</text:p>
          </table:table-cell>
          <table:table-cell table:style-name="cond1_0" office:value-type="string">
            <text:p>Hexvalue 0x17</text:p>
          </table:table-cell>
          <table:table-cell table:style-name="cond2_0" office:value-type="string">
            <text:p>Octvalue 0o000027</text:p>
          </table:table-cell>
        </table:table-row>
        <table:table-row>
          <table:table-cell table:style-name="cond0_0" office:value-type="float" office:value="24">
            <text:p>24</text:p>
          </table:table-cell>
          <table:table-cell table:style-name="cond1_0" office:value-type="string">
            <text:p>Hexvalue 0x18</text:p>
          </table:table-cell>
          <table:table-cell table:style-name="cond2_0" office:value-type="string">
            <text:p>Octvalue 0o000030</text:p>
          </table:table-cell>
        </table:table-row>
      </table:table>
      <table:table table:name="Image"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</table:table>
      <table:table table:name="Conditional Multi-Format">
        <table:table-column/>
        <table:table-column/>
        <table:table-column/>
        <table:table-column/>
        <table:table-column/>
        <table:table-row>
          <table:table-cell office:value-type="string">
            <text:p>1 Decimal</text:p>
          </table:table-cell>
          <table:table-cell office:value-type="string">
            <text:p>3 Decimals</text:p>
          </table:table-cell>
          <table:table-cell office:value-type="string">
            <text:p>% 1 Dec</text:p>
          </table:table-cell>
          <table:table-cell office:value-type="string">
            <text:p>% 2 Dec</text:p>
          </table:table-cell>
          <table:table-cell office:value-type="string">
            <text:p/>
          </table:table-cell>
        </table:table-row>
        <table:table-row>
          <table:table-cell table:style-name="cond4_0" office:value-type="float" office:value="58.90296893655275">
            <text:p>58.90296893655275</text:p>
          </table:table-cell>
          <table:table-cell table:style-name="cond4_1" office:value-type="float" office:value="-0.5440211108893698">
            <text:p>-0.5440211108893698</text:p>
          </table:table-cell>
          <table:table-cell table:style-name="cond4_2" office:value-type="float" office:value="1.0410757253368614">
            <text:p>1.0410757253368614</text:p>
          </table:table-cell>
          <table:table-cell table:style-name="cond4_3" office:value-type="float" office:value="0.12058450180107416">
            <text:p>0.12058450180107416</text:p>
          </table:table-cell>
          <table:table-cell/>
        </table:table-row>
        <table:table-row>
          <table:table-cell table:style-name="cond4_0" office:value-type="float" office:value="63.65081987779772">
            <text:p>63.65081987779772</text:p>
          </table:table-cell>
          <table:table-cell table:style-name="cond4_1" office:value-type="float" office:value="0.9129452507276277">
            <text:p>0.9129452507276277</text:p>
          </table:table-cell>
          <table:table-cell table:style-name="cond4_2" office:value-type="float" office:value="1.7205845018010741">
            <text:p>1.7205845018010741</text:p>
          </table:table-cell>
          <table:table-cell table:style-name="cond4_3" office:value-type="float" office:value="0.25698659871878904">
            <text:p>0.25698659871878904</text:p>
          </table:table-cell>
          <table:table-cell/>
        </table:table-row>
        <table:table-row>
          <table:table-cell table:style-name="cond4_0" office:value-type="float" office:value="9.878400564190706">
            <text:p>9.878400564190706</text:p>
          </table:table-cell>
          <table:table-cell table:style-name="cond4_1" office:value-type="float" office:value="-0.9880316240928618">
            <text:p>-0.9880316240928618</text:p>
          </table:table-cell>
          <table:table-cell table:style-name="cond4_2" office:value-type="float" office:value="0.6569865987187891">
            <text:p>0.6569865987187891</text:p>
          </table:table-cell>
          <table:table-cell table:style-name="cond4_3" office:value-type="float" office:value="0.18935824662338174">
            <text:p>0.18935824662338174</text:p>
          </table:table-cell>
          <table:table-cell/>
        </table:table-row>
        <table:table-row>
          <table:table-cell table:style-name="cond4_0" office:value-type="float" office:value="-52.97617467155497">
            <text:p>-52.97617467155497</text:p>
          </table:table-cell>
          <table:table-cell table:style-name="cond4_1" office:value-type="float" office:value="0.7451131604793488">
            <text:p>0.7451131604793488</text:p>
          </table:table-cell>
          <table:table-cell table:style-name="cond4_2" office:value-type="float" office:value="0.9893582466233818">
            <text:p>0.9893582466233818</text:p>
          </table:table-cell>
          <table:table-cell table:style-name="cond4_3" office:value-type="float" office:value="0.012118485241756571">
            <text:p>0.012118485241756571</text:p>
          </table:table-cell>
          <table:table-cell/>
        </table:table-row>
        <table:table-row>
          <table:table-cell table:style-name="cond4_0" office:value-type="float" office:value="-67.1246992264197">
            <text:p>-67.1246992264197</text:p>
          </table:table-cell>
          <table:table-cell table:style-name="cond4_1" office:value-type="float" office:value="-0.26237485370392877">
            <text:p>-0.26237485370392877</text:p>
          </table:table-cell>
          <table:table-cell table:style-name="cond4_2" office:value-type="float" office:value="0.4121184852417566">
            <text:p>0.4121184852417566</text:p>
          </table:table-cell>
          <table:table-cell table:style-name="cond4_3" office:value-type="float" office:value="0.25597888911063027">
            <text:p>0.25597888911063027</text:p>
          </table:table-cell>
          <table:table-cell/>
        </table:table-row>
        <table:table-row>
          <table:table-cell table:style-name="cond4_0" office:value-type="float" office:value="-19.55908487392481">
            <text:p>-19.55908487392481</text:p>
          </table:table-cell>
          <table:table-cell table:style-name="cond4_1" office:value-type="float" office:value="-0.3048106211022167">
            <text:p>-0.3048106211022167</text:p>
          </table:table-cell>
          <table:table-cell table:style-name="cond4_2" office:value-type="float" office:value="1.4559788891106302">
            <text:p>1.4559788891106302</text:p>
          </table:table-cell>
          <table:table-cell table:style-name="cond4_3" office:value-type="float" office:value="0.2000097934492966">
            <text:p>0.2000097934492966</text:p>
          </table:table-cell>
          <table:table-cell/>
        </table:table-row>
        <table:table-row>
          <table:table-cell table:style-name="cond4_0" office:value-type="float" office:value="45.989061910315236">
            <text:p>45.989061910315236</text:p>
          </table:table-cell>
          <table:table-cell table:style-name="cond4_1" office:value-type="float" office:value="0.7738906815578891">
            <text:p>0.7738906815578891</text:p>
          </table:table-cell>
          <table:table-cell table:style-name="cond4_2" office:value-type="float" office:value="1.0000097934492964">
            <text:p>1.0000097934492964</text:p>
          </table:table-cell>
          <table:table-cell table:style-name="cond4_3" office:value-type="float" office:value="0.2634270819995651">
            <text:p>0.2634270819995651</text:p>
          </table:table-cell>
          <table:table-cell/>
        </table:table-row>
        <table:table-row>
          <table:table-cell table:style-name="cond4_0" office:value-type="float" office:value="69.25507726363672">
            <text:p>69.25507726363672</text:p>
          </table:table-cell>
          <table:table-cell table:style-name="cond4_1" office:value-type="float" office:value="-0.9938886539233752">
            <text:p>-0.9938886539233752</text:p>
          </table:table-cell>
          <table:table-cell table:style-name="cond4_2" office:value-type="float" office:value="1.4634270819995652">
            <text:p>1.4634270819995652</text:p>
          </table:table-cell>
          <table:table-cell table:style-name="cond4_3" office:value-type="float" office:value="0.020167036826640894">
            <text:p>0.020167036826640894</text:p>
          </table:table-cell>
          <table:table-cell/>
        </table:table-row>
        <table:table-row>
          <table:table-cell table:style-name="cond4_0" office:value-type="float" office:value="28.848293966922963">
            <text:p>28.848293966922963</text:p>
          </table:table-cell>
          <table:table-cell table:style-name="cond4_1" office:value-type="float" office:value="0.8939966636005579">
            <text:p>0.8939966636005579</text:p>
          </table:table-cell>
          <table:table-cell table:style-name="cond4_2" office:value-type="float" office:value="0.4201670368266409">
            <text:p>0.4201670368266409</text:p>
          </table:table-cell>
          <table:table-cell table:style-name="cond4_3" office:value-type="float" office:value="0.1906073556948703">
            <text:p>0.1906073556948703</text:p>
          </table:table-cell>
          <table:table-cell/>
        </table:table-row>
        <table:table-row>
          <table:table-cell table:style-name="cond4_0" office:value-type="float" office:value="-38.081477762255886">
            <text:p>-38.081477762255886</text:p>
          </table:table-cell>
          <table:table-cell table:style-name="cond4_1" office:value-type="float" office:value="-0.5063656411097588">
            <text:p>-0.5063656411097588</text:p>
          </table:table-cell>
          <table:table-cell table:style-name="cond4_2" office:value-type="float" office:value="0.9906073556948704">
            <text:p>0.9906073556948704</text:p>
          </table:table-cell>
          <table:table-cell table:style-name="cond4_3" office:value-type="float" office:value="0.2502878401571168">
            <text:p>0.2502878401571168</text:p>
          </table:table-cell>
          <table:table-cell/>
        </table:table-row>
        <table:table-row>
          <table:table-cell table:style-name="cond4_0" office:value-type="float" office:value="-69.99931445854925">
            <text:p>-69.99931445854925</text:p>
          </table:table-cell>
          <table:table-cell table:style-name="cond4_1" office:value-type="float" office:value="-0.044242678085070965">
            <text:p>-0.044242678085070965</text:p>
          </table:table-cell>
          <table:table-cell table:style-name="cond4_2" office:value-type="float" office:value="0.6502878401571168">
            <text:p>0.6502878401571168</text:p>
          </table:table-cell>
          <table:table-cell table:style-name="cond4_3" office:value-type="float" office:value="0.11209668333493472">
            <text:p>0.11209668333493472</text:p>
          </table:table-cell>
          <table:table-cell/>
        </table:table-row>
        <table:table-row>
          <table:table-cell table:style-name="cond4_0" office:value-type="float" office:value="-37.56010426003044">
            <text:p>-37.56010426003044</text:p>
          </table:table-cell>
          <table:table-cell table:style-name="cond4_1" office:value-type="float" office:value="0.5806111842123143">
            <text:p>0.5806111842123143</text:p>
          </table:table-cell>
          <table:table-cell table:style-name="cond4_2" office:value-type="float" office:value="1.7120966833349347">
            <text:p>1.7120966833349347</text:p>
          </table:table-cell>
          <table:table-cell table:style-name="cond4_3" office:value-type="float" office:value="0.23860250812044326">
            <text:p>0.23860250812044326</text:p>
          </table:table-cell>
          <table:table-cell/>
        </table:table-row>
        <table:table-row>
          <table:table-cell table:style-name="cond4_0" office:value-type="float" office:value="29.411692577864866">
            <text:p>29.411692577864866</text:p>
          </table:table-cell>
          <table:table-cell table:style-name="cond4_1" office:value-type="float" office:value="-0.9301059501867618">
            <text:p>-0.9301059501867618</text:p>
          </table:table-cell>
          <table:table-cell table:style-name="cond4_2" office:value-type="float" office:value="1.038602508120443">
            <text:p>1.038602508120443</text:p>
          </table:table-cell>
          <table:table-cell table:style-name="cond4_3" office:value-type="float" office:value="0.04901275322832399">
            <text:p>0.04901275322832399</text:p>
          </table:table-cell>
          <table:table-cell/>
        </table:table-row>
        <table:table-row>
          <table:table-cell table:style-name="cond4_0" office:value-type="float" office:value="69.34251489864093">
            <text:p>69.34251489864093</text:p>
          </table:table-cell>
          <table:table-cell table:style-name="cond4_1" office:value-type="float" office:value="0.9802396594403116">
            <text:p>0.9802396594403116</text:p>
          </table:table-cell>
          <table:table-cell table:style-name="cond4_2" office:value-type="float" office:value="1.249012753228324">
            <text:p>1.249012753228324</text:p>
          </table:table-cell>
          <table:table-cell table:style-name="cond4_3" office:value-type="float" office:value="0.14987720966295234">
            <text:p>0.14987720966295234</text:p>
          </table:table-cell>
          <table:table-cell/>
        </table:table-row>
        <table:table-row>
          <table:table-cell table:style-name="cond4_0" office:value-type="float" office:value="45.52014881099818">
            <text:p>45.52014881099818</text:p>
          </table:table-cell>
          <table:table-cell table:style-name="cond4_1" office:value-type="float" office:value="-0.7148764296291646">
            <text:p>-0.7148764296291646</text:p>
          </table:table-cell>
          <table:table-cell table:style-name="cond4_2" office:value-type="float" office:value="0.14987720966295234">
            <text:p>0.14987720966295234</text:p>
          </table:table-cell>
          <table:table-cell table:style-name="cond4_3" office:value-type="float" office:value="0.11294525072762762">
            <text:p>0.11294525072762762</text:p>
          </table:table-cell>
          <table:table-cell/>
        </table:table-row>
        <table:table-row>
          <table:table-cell table:style-name="cond4_0" office:value-type="float" office:value="-20.15323216655457">
            <text:p>-20.15323216655457</text:p>
          </table:table-cell>
          <table:table-cell table:style-name="cond4_1" office:value-type="float" office:value="0.21942525837900473">
            <text:p>0.21942525837900473</text:p>
          </table:table-cell>
          <table:table-cell table:style-name="cond4_2" office:value-type="float" office:value="0.9129452507276277">
            <text:p>0.9129452507276277</text:p>
          </table:table-cell>
          <table:table-cell table:style-name="cond4_3" office:value-type="float" office:value="0.03665563853605602">
            <text:p>0.03665563853605602</text:p>
          </table:table-cell>
          <table:table-cell/>
        </table:table-row>
        <table:table-row>
          <table:table-cell table:style-name="cond4_0" office:value-type="float" office:value="-67.29782443156898">
            <text:p>-67.29782443156898</text:p>
          </table:table-cell>
          <table:table-cell table:style-name="cond4_1" office:value-type="float" office:value="0.3466494554970303">
            <text:p>0.3466494554970303</text:p>
          </table:table-cell>
          <table:table-cell table:style-name="cond4_2" office:value-type="float" office:value="0.8366556385360561">
            <text:p>0.8366556385360561</text:p>
          </table:table-cell>
          <table:table-cell table:style-name="cond4_3" office:value-type="float" office:value="0.3911486907095961">
            <text:p>0.3911486907095961</text:p>
          </table:table-cell>
          <table:table-cell/>
        </table:table-row>
        <table:table-row>
          <table:table-cell table:style-name="cond4_0" office:value-type="float" office:value="-52.56910727401733">
            <text:p>-52.56910727401733</text:p>
          </table:table-cell>
          <table:table-cell table:style-name="cond4_1" office:value-type="float" office:value="-0.8011526357338304">
            <text:p>-0.8011526357338304</text:p>
          </table:table-cell>
          <table:table-cell table:style-name="cond4_2" office:value-type="float" office:value="1.991148690709596">
            <text:p>1.991148690709596</text:p>
          </table:table-cell>
          <table:table-cell table:style-name="cond4_3" office:value-type="float" office:value="0.35377959582482943">
            <text:p>0.35377959582482943</text:p>
          </table:table-cell>
          <table:table-cell/>
        </table:table-row>
        <table:table-row>
          <table:table-cell table:style-name="cond4_0" office:value-type="float" office:value="10.491404676406663">
            <text:p>10.491404676406663</text:p>
          </table:table-cell>
          <table:table-cell table:style-name="cond4_1" office:value-type="float" office:value="0.9977992786806003">
            <text:p>0.9977992786806003</text:p>
          </table:table-cell>
          <table:table-cell table:style-name="cond4_2" office:value-type="float" office:value="1.1537795958248294">
            <text:p>1.1537795958248294</text:p>
          </table:table-cell>
          <table:table-cell table:style-name="cond4_3" office:value-type="float" office:value="0.2944216379933762">
            <text:p>0.2944216379933762</text:p>
          </table:table-cell>
          <table:table-cell/>
        </table:table-row>
      </table:table>
      <table:table table:name="Simple row-writer"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Pi*Value</text:p>
          </table:table-cell>
          <table:table-cell office:value-type="string">
            <text:p>Hex</text:p>
          </table:table-cell>
          <table:table-cell office:value-type="string">
            <text:p>Formula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office:value-type="error" table:formula="of:=(([.B2]+2)*4)"/>
        </table:table-row>
        <table:table-row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office:value-type="error" table:formula="of:=(([.B3]+2)*4)"/>
        </table:table-row>
        <table:table-row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office:value-type="error" table:formula="of:=(([.B4]+2)*4)"/>
        </table:table-row>
        <table:table-row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office:value-type="error" table:formula="of:=(([.B5]+2)*4)"/>
        </table:table-row>
        <table:table-row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office:value-type="error" table:formula="of:=(([.B6]+2)*4)"/>
        </table:table-row>
        <table:table-row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office:value-type="error" table:formula="of:=(([.B7]+2)*4)"/>
        </table:table-row>
        <table:table-row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office:value-type="error" table:formula="of:=(([.B8]+2)*4)"/>
        </table:table-row>
        <table:table-row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office:value-type="error" table:formula="of:=(([.B9]+2)*4)"/>
        </table:table-row>
        <table:table-row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office:value-type="error" table:formula="of:=(([.B10]+2)*4)"/>
        </table:table-row>
        <table:table-row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office:value-type="error" table:formula="of:=(([.B11]+2)*4)"/>
        </table:table-row>
      </table:table>
      <table:table table:name="Symmetric rounding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Excel ROUND</text:p>
          </table:table-cell>
          <table:table-cell office:value-type="string">
            <text:p>Python float round()</text:p>
          </table:table-cell>
          <table:table-cell office:value-type="string">
            <text:p>Python exact round()</text:p>
          </table:table-cell>
          <table:table-cell office:value-type="string">
            <text:p>odsexport round()</text:p>
          </table:table-cell>
          <table:table-cell office:value-type="string">
            <text:p>Difference</text:p>
          </table:table-cell>
          <table:table-cell office:value-type="string">
            <text:p>OK?</text:p>
          </table:table-cell>
        </table:table-row>
        <table:table-row>
          <table:table-cell office:value-type="float" office:value="-0.6">
            <text:p>-0.6</text:p>
          </table:table-cell>
          <table:table-cell office:value-type="error" table:formula="of:=ROUND([.A2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2])*IF(AND(ISEVEN((ABS([.A2])*10));(MOD((ABS([.A2])*10);1)&lt;=0.5));ROUNDDOWN(ABS([.A2]);1);ROUND(ABS([.A2]);1)))"/>
          <table:table-cell office:value-type="error" table:formula="of:=([.D2]-[.E2])"/>
          <table:table-cell office:value-type="error" table:formula="of:=IF(([.F2]&lt;&gt;0);&quot;ERROR&quot;;&quot;&quot;)"/>
        </table:table-row>
        <table:table-row>
          <table:table-cell office:value-type="float" office:value="-0.59">
            <text:p>-0.59</text:p>
          </table:table-cell>
          <table:table-cell office:value-type="error" table:formula="of:=ROUND([.A3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3])*IF(AND(ISEVEN((ABS([.A3])*10));(MOD((ABS([.A3])*10);1)&lt;=0.5));ROUNDDOWN(ABS([.A3]);1);ROUND(ABS([.A3]);1)))"/>
          <table:table-cell office:value-type="error" table:formula="of:=([.D3]-[.E3])"/>
          <table:table-cell office:value-type="error" table:formula="of:=IF(([.F3]&lt;&gt;0);&quot;ERROR&quot;;&quot;&quot;)"/>
        </table:table-row>
        <table:table-row>
          <table:table-cell office:value-type="float" office:value="-0.58">
            <text:p>-0.58</text:p>
          </table:table-cell>
          <table:table-cell office:value-type="error" table:formula="of:=ROUND([.A4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4])*IF(AND(ISEVEN((ABS([.A4])*10));(MOD((ABS([.A4])*10);1)&lt;=0.5));ROUNDDOWN(ABS([.A4]);1);ROUND(ABS([.A4]);1)))"/>
          <table:table-cell office:value-type="error" table:formula="of:=([.D4]-[.E4])"/>
          <table:table-cell office:value-type="error" table:formula="of:=IF(([.F4]&lt;&gt;0);&quot;ERROR&quot;;&quot;&quot;)"/>
        </table:table-row>
        <table:table-row>
          <table:table-cell office:value-type="float" office:value="-0.57">
            <text:p>-0.57</text:p>
          </table:table-cell>
          <table:table-cell office:value-type="error" table:formula="of:=ROUND([.A5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5])*IF(AND(ISEVEN((ABS([.A5])*10));(MOD((ABS([.A5])*10);1)&lt;=0.5));ROUNDDOWN(ABS([.A5]);1);ROUND(ABS([.A5]);1)))"/>
          <table:table-cell office:value-type="error" table:formula="of:=([.D5]-[.E5])"/>
          <table:table-cell office:value-type="error" table:formula="of:=IF(([.F5]&lt;&gt;0);&quot;ERROR&quot;;&quot;&quot;)"/>
        </table:table-row>
        <table:table-row>
          <table:table-cell office:value-type="float" office:value="-0.56">
            <text:p>-0.56</text:p>
          </table:table-cell>
          <table:table-cell office:value-type="error" table:formula="of:=ROUND([.A6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6])*IF(AND(ISEVEN((ABS([.A6])*10));(MOD((ABS([.A6])*10);1)&lt;=0.5));ROUNDDOWN(ABS([.A6]);1);ROUND(ABS([.A6]);1)))"/>
          <table:table-cell office:value-type="error" table:formula="of:=([.D6]-[.E6])"/>
          <table:table-cell office:value-type="error" table:formula="of:=IF(([.F6]&lt;&gt;0);&quot;ERROR&quot;;&quot;&quot;)"/>
        </table:table-row>
        <table:table-row>
          <table:table-cell office:value-type="float" office:value="-0.55">
            <text:p>-0.55</text:p>
          </table:table-cell>
          <table:table-cell office:value-type="error" table:formula="of:=ROUND([.A7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7])*IF(AND(ISEVEN((ABS([.A7])*10));(MOD((ABS([.A7])*10);1)&lt;=0.5));ROUNDDOWN(ABS([.A7]);1);ROUND(ABS([.A7]);1)))"/>
          <table:table-cell office:value-type="error" table:formula="of:=([.D7]-[.E7])"/>
          <table:table-cell office:value-type="error" table:formula="of:=IF(([.F7]&lt;&gt;0);&quot;ERROR&quot;;&quot;&quot;)"/>
        </table:table-row>
        <table:table-row>
          <table:table-cell office:value-type="float" office:value="-0.54">
            <text:p>-0.54</text:p>
          </table:table-cell>
          <table:table-cell office:value-type="error" table:formula="of:=ROUND([.A8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8])*IF(AND(ISEVEN((ABS([.A8])*10));(MOD((ABS([.A8])*10);1)&lt;=0.5));ROUNDDOWN(ABS([.A8]);1);ROUND(ABS([.A8]);1)))"/>
          <table:table-cell office:value-type="error" table:formula="of:=([.D8]-[.E8])"/>
          <table:table-cell office:value-type="error" table:formula="of:=IF(([.F8]&lt;&gt;0);&quot;ERROR&quot;;&quot;&quot;)"/>
        </table:table-row>
        <table:table-row>
          <table:table-cell office:value-type="float" office:value="-0.53">
            <text:p>-0.53</text:p>
          </table:table-cell>
          <table:table-cell office:value-type="error" table:formula="of:=ROUND([.A9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9])*IF(AND(ISEVEN((ABS([.A9])*10));(MOD((ABS([.A9])*10);1)&lt;=0.5));ROUNDDOWN(ABS([.A9]);1);ROUND(ABS([.A9]);1)))"/>
          <table:table-cell office:value-type="error" table:formula="of:=([.D9]-[.E9])"/>
          <table:table-cell office:value-type="error" table:formula="of:=IF(([.F9]&lt;&gt;0);&quot;ERROR&quot;;&quot;&quot;)"/>
        </table:table-row>
        <table:table-row>
          <table:table-cell office:value-type="float" office:value="-0.52">
            <text:p>-0.52</text:p>
          </table:table-cell>
          <table:table-cell office:value-type="error" table:formula="of:=ROUND([.A10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0])*IF(AND(ISEVEN((ABS([.A10])*10));(MOD((ABS([.A10])*10);1)&lt;=0.5));ROUNDDOWN(ABS([.A10]);1);ROUND(ABS([.A10]);1)))"/>
          <table:table-cell office:value-type="error" table:formula="of:=([.D10]-[.E10])"/>
          <table:table-cell office:value-type="error" table:formula="of:=IF(([.F10]&lt;&gt;0);&quot;ERROR&quot;;&quot;&quot;)"/>
        </table:table-row>
        <table:table-row>
          <table:table-cell office:value-type="float" office:value="-0.51">
            <text:p>-0.51</text:p>
          </table:table-cell>
          <table:table-cell office:value-type="error" table:formula="of:=ROUND([.A11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1])*IF(AND(ISEVEN((ABS([.A11])*10));(MOD((ABS([.A11])*10);1)&lt;=0.5));ROUNDDOWN(ABS([.A11]);1);ROUND(ABS([.A11]);1)))"/>
          <table:table-cell office:value-type="error" table:formula="of:=([.D11]-[.E11])"/>
          <table:table-cell office:value-type="error" table:formula="of:=IF(([.F11]&lt;&gt;0);&quot;ERROR&quot;;&quot;&quot;)"/>
        </table:table-row>
        <table:table-row>
          <table:table-cell office:value-type="float" office:value="-0.5">
            <text:p>-0.5</text:p>
          </table:table-cell>
          <table:table-cell office:value-type="error" table:formula="of:=ROUND([.A12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2])*IF(AND(ISEVEN((ABS([.A12])*10));(MOD((ABS([.A12])*10);1)&lt;=0.5));ROUNDDOWN(ABS([.A12]);1);ROUND(ABS([.A12]);1)))"/>
          <table:table-cell office:value-type="error" table:formula="of:=([.D12]-[.E12])"/>
          <table:table-cell office:value-type="error" table:formula="of:=IF(([.F12]&lt;&gt;0);&quot;ERROR&quot;;&quot;&quot;)"/>
        </table:table-row>
        <table:table-row>
          <table:table-cell office:value-type="float" office:value="-0.49">
            <text:p>-0.49</text:p>
          </table:table-cell>
          <table:table-cell office:value-type="error" table:formula="of:=ROUND([.A13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3])*IF(AND(ISEVEN((ABS([.A13])*10));(MOD((ABS([.A13])*10);1)&lt;=0.5));ROUNDDOWN(ABS([.A13]);1);ROUND(ABS([.A13]);1)))"/>
          <table:table-cell office:value-type="error" table:formula="of:=([.D13]-[.E13])"/>
          <table:table-cell office:value-type="error" table:formula="of:=IF(([.F13]&lt;&gt;0);&quot;ERROR&quot;;&quot;&quot;)"/>
        </table:table-row>
        <table:table-row>
          <table:table-cell office:value-type="float" office:value="-0.48">
            <text:p>-0.48</text:p>
          </table:table-cell>
          <table:table-cell office:value-type="error" table:formula="of:=ROUND([.A14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4])*IF(AND(ISEVEN((ABS([.A14])*10));(MOD((ABS([.A14])*10);1)&lt;=0.5));ROUNDDOWN(ABS([.A14]);1);ROUND(ABS([.A14]);1)))"/>
          <table:table-cell office:value-type="error" table:formula="of:=([.D14]-[.E14])"/>
          <table:table-cell office:value-type="error" table:formula="of:=IF(([.F14]&lt;&gt;0);&quot;ERROR&quot;;&quot;&quot;)"/>
        </table:table-row>
        <table:table-row>
          <table:table-cell office:value-type="float" office:value="-0.47">
            <text:p>-0.47</text:p>
          </table:table-cell>
          <table:table-cell office:value-type="error" table:formula="of:=ROUND([.A15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5])*IF(AND(ISEVEN((ABS([.A15])*10));(MOD((ABS([.A15])*10);1)&lt;=0.5));ROUNDDOWN(ABS([.A15]);1);ROUND(ABS([.A15]);1)))"/>
          <table:table-cell office:value-type="error" table:formula="of:=([.D15]-[.E15])"/>
          <table:table-cell office:value-type="error" table:formula="of:=IF(([.F15]&lt;&gt;0);&quot;ERROR&quot;;&quot;&quot;)"/>
        </table:table-row>
        <table:table-row>
          <table:table-cell office:value-type="float" office:value="-0.46">
            <text:p>-0.46</text:p>
          </table:table-cell>
          <table:table-cell office:value-type="error" table:formula="of:=ROUND([.A16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6])*IF(AND(ISEVEN((ABS([.A16])*10));(MOD((ABS([.A16])*10);1)&lt;=0.5));ROUNDDOWN(ABS([.A16]);1);ROUND(ABS([.A16]);1)))"/>
          <table:table-cell office:value-type="error" table:formula="of:=([.D16]-[.E16])"/>
          <table:table-cell office:value-type="error" table:formula="of:=IF(([.F16]&lt;&gt;0);&quot;ERROR&quot;;&quot;&quot;)"/>
        </table:table-row>
        <table:table-row>
          <table:table-cell office:value-type="float" office:value="-0.45">
            <text:p>-0.45</text:p>
          </table:table-cell>
          <table:table-cell office:value-type="error" table:formula="of:=ROUND([.A17];1)"/>
          <table:table-cell office:value-type="float" office:value="-0.5">
            <text:p>-0.5</text:p>
          </table:table-cell>
          <table:table-cell office:value-type="float" office:value="-0.4">
            <text:p>-0.4</text:p>
          </table:table-cell>
          <table:table-cell office:value-type="error" table:formula="of:=(SIGN([.A17])*IF(AND(ISEVEN((ABS([.A17])*10));(MOD((ABS([.A17])*10);1)&lt;=0.5));ROUNDDOWN(ABS([.A17]);1);ROUND(ABS([.A17]);1)))"/>
          <table:table-cell office:value-type="error" table:formula="of:=([.D17]-[.E17])"/>
          <table:table-cell office:value-type="error" table:formula="of:=IF(([.F17]&lt;&gt;0);&quot;ERROR&quot;;&quot;&quot;)"/>
        </table:table-row>
        <table:table-row>
          <table:table-cell office:value-type="float" office:value="-0.44">
            <text:p>-0.44</text:p>
          </table:table-cell>
          <table:table-cell office:value-type="error" table:formula="of:=ROUND([.A18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18])*IF(AND(ISEVEN((ABS([.A18])*10));(MOD((ABS([.A18])*10);1)&lt;=0.5));ROUNDDOWN(ABS([.A18]);1);ROUND(ABS([.A18]);1)))"/>
          <table:table-cell office:value-type="error" table:formula="of:=([.D18]-[.E18])"/>
          <table:table-cell office:value-type="error" table:formula="of:=IF(([.F18]&lt;&gt;0);&quot;ERROR&quot;;&quot;&quot;)"/>
        </table:table-row>
        <table:table-row>
          <table:table-cell office:value-type="float" office:value="-0.43">
            <text:p>-0.43</text:p>
          </table:table-cell>
          <table:table-cell office:value-type="error" table:formula="of:=ROUND([.A19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19])*IF(AND(ISEVEN((ABS([.A19])*10));(MOD((ABS([.A19])*10);1)&lt;=0.5));ROUNDDOWN(ABS([.A19]);1);ROUND(ABS([.A19]);1)))"/>
          <table:table-cell office:value-type="error" table:formula="of:=([.D19]-[.E19])"/>
          <table:table-cell office:value-type="error" table:formula="of:=IF(([.F19]&lt;&gt;0);&quot;ERROR&quot;;&quot;&quot;)"/>
        </table:table-row>
        <table:table-row>
          <table:table-cell office:value-type="float" office:value="-0.42">
            <text:p>-0.42</text:p>
          </table:table-cell>
          <table:table-cell office:value-type="error" table:formula="of:=ROUND([.A20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0])*IF(AND(ISEVEN((ABS([.A20])*10));(MOD((ABS([.A20])*10);1)&lt;=0.5));ROUNDDOWN(ABS([.A20]);1);ROUND(ABS([.A20]);1)))"/>
          <table:table-cell office:value-type="error" table:formula="of:=([.D20]-[.E20])"/>
          <table:table-cell office:value-type="error" table:formula="of:=IF(([.F20]&lt;&gt;0);&quot;ERROR&quot;;&quot;&quot;)"/>
        </table:table-row>
        <table:table-row>
          <table:table-cell office:value-type="float" office:value="-0.41">
            <text:p>-0.41</text:p>
          </table:table-cell>
          <table:table-cell office:value-type="error" table:formula="of:=ROUND([.A21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1])*IF(AND(ISEVEN((ABS([.A21])*10));(MOD((ABS([.A21])*10);1)&lt;=0.5));ROUNDDOWN(ABS([.A21]);1);ROUND(ABS([.A21]);1)))"/>
          <table:table-cell office:value-type="error" table:formula="of:=([.D21]-[.E21])"/>
          <table:table-cell office:value-type="error" table:formula="of:=IF(([.F21]&lt;&gt;0);&quot;ERROR&quot;;&quot;&quot;)"/>
        </table:table-row>
        <table:table-row>
          <table:table-cell office:value-type="float" office:value="-0.4">
            <text:p>-0.4</text:p>
          </table:table-cell>
          <table:table-cell office:value-type="error" table:formula="of:=ROUND([.A22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2])*IF(AND(ISEVEN((ABS([.A22])*10));(MOD((ABS([.A22])*10);1)&lt;=0.5));ROUNDDOWN(ABS([.A22]);1);ROUND(ABS([.A22]);1)))"/>
          <table:table-cell office:value-type="error" table:formula="of:=([.D22]-[.E22])"/>
          <table:table-cell office:value-type="error" table:formula="of:=IF(([.F22]&lt;&gt;0);&quot;ERROR&quot;;&quot;&quot;)"/>
        </table:table-row>
        <table:table-row>
          <table:table-cell office:value-type="float" office:value="-0.39">
            <text:p>-0.39</text:p>
          </table:table-cell>
          <table:table-cell office:value-type="error" table:formula="of:=ROUND([.A23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3])*IF(AND(ISEVEN((ABS([.A23])*10));(MOD((ABS([.A23])*10);1)&lt;=0.5));ROUNDDOWN(ABS([.A23]);1);ROUND(ABS([.A23]);1)))"/>
          <table:table-cell office:value-type="error" table:formula="of:=([.D23]-[.E23])"/>
          <table:table-cell office:value-type="error" table:formula="of:=IF(([.F23]&lt;&gt;0);&quot;ERROR&quot;;&quot;&quot;)"/>
        </table:table-row>
        <table:table-row>
          <table:table-cell office:value-type="float" office:value="-0.38">
            <text:p>-0.38</text:p>
          </table:table-cell>
          <table:table-cell office:value-type="error" table:formula="of:=ROUND([.A24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4])*IF(AND(ISEVEN((ABS([.A24])*10));(MOD((ABS([.A24])*10);1)&lt;=0.5));ROUNDDOWN(ABS([.A24]);1);ROUND(ABS([.A24]);1)))"/>
          <table:table-cell office:value-type="error" table:formula="of:=([.D24]-[.E24])"/>
          <table:table-cell office:value-type="error" table:formula="of:=IF(([.F24]&lt;&gt;0);&quot;ERROR&quot;;&quot;&quot;)"/>
        </table:table-row>
        <table:table-row>
          <table:table-cell office:value-type="float" office:value="-0.37">
            <text:p>-0.37</text:p>
          </table:table-cell>
          <table:table-cell office:value-type="error" table:formula="of:=ROUND([.A25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5])*IF(AND(ISEVEN((ABS([.A25])*10));(MOD((ABS([.A25])*10);1)&lt;=0.5));ROUNDDOWN(ABS([.A25]);1);ROUND(ABS([.A25]);1)))"/>
          <table:table-cell office:value-type="error" table:formula="of:=([.D25]-[.E25])"/>
          <table:table-cell office:value-type="error" table:formula="of:=IF(([.F25]&lt;&gt;0);&quot;ERROR&quot;;&quot;&quot;)"/>
        </table:table-row>
        <table:table-row>
          <table:table-cell office:value-type="float" office:value="-0.36">
            <text:p>-0.36</text:p>
          </table:table-cell>
          <table:table-cell office:value-type="error" table:formula="of:=ROUND([.A26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6])*IF(AND(ISEVEN((ABS([.A26])*10));(MOD((ABS([.A26])*10);1)&lt;=0.5));ROUNDDOWN(ABS([.A26]);1);ROUND(ABS([.A26]);1)))"/>
          <table:table-cell office:value-type="error" table:formula="of:=([.D26]-[.E26])"/>
          <table:table-cell office:value-type="error" table:formula="of:=IF(([.F26]&lt;&gt;0);&quot;ERROR&quot;;&quot;&quot;)"/>
        </table:table-row>
        <table:table-row>
          <table:table-cell office:value-type="float" office:value="-0.35">
            <text:p>-0.35</text:p>
          </table:table-cell>
          <table:table-cell office:value-type="error" table:formula="of:=ROUND([.A27];1)"/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 office:value-type="error" table:formula="of:=(SIGN([.A27])*IF(AND(ISEVEN((ABS([.A27])*10));(MOD((ABS([.A27])*10);1)&lt;=0.5));ROUNDDOWN(ABS([.A27]);1);ROUND(ABS([.A27]);1)))"/>
          <table:table-cell office:value-type="error" table:formula="of:=([.D27]-[.E27])"/>
          <table:table-cell office:value-type="error" table:formula="of:=IF(([.F27]&lt;&gt;0);&quot;ERROR&quot;;&quot;&quot;)"/>
        </table:table-row>
        <table:table-row>
          <table:table-cell office:value-type="float" office:value="-0.34">
            <text:p>-0.34</text:p>
          </table:table-cell>
          <table:table-cell office:value-type="error" table:formula="of:=ROUND([.A28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28])*IF(AND(ISEVEN((ABS([.A28])*10));(MOD((ABS([.A28])*10);1)&lt;=0.5));ROUNDDOWN(ABS([.A28]);1);ROUND(ABS([.A28]);1)))"/>
          <table:table-cell office:value-type="error" table:formula="of:=([.D28]-[.E28])"/>
          <table:table-cell office:value-type="error" table:formula="of:=IF(([.F28]&lt;&gt;0);&quot;ERROR&quot;;&quot;&quot;)"/>
        </table:table-row>
        <table:table-row>
          <table:table-cell office:value-type="float" office:value="-0.33">
            <text:p>-0.33</text:p>
          </table:table-cell>
          <table:table-cell office:value-type="error" table:formula="of:=ROUND([.A29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29])*IF(AND(ISEVEN((ABS([.A29])*10));(MOD((ABS([.A29])*10);1)&lt;=0.5));ROUNDDOWN(ABS([.A29]);1);ROUND(ABS([.A29]);1)))"/>
          <table:table-cell office:value-type="error" table:formula="of:=([.D29]-[.E29])"/>
          <table:table-cell office:value-type="error" table:formula="of:=IF(([.F29]&lt;&gt;0);&quot;ERROR&quot;;&quot;&quot;)"/>
        </table:table-row>
        <table:table-row>
          <table:table-cell office:value-type="float" office:value="-0.32">
            <text:p>-0.32</text:p>
          </table:table-cell>
          <table:table-cell office:value-type="error" table:formula="of:=ROUND([.A30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0])*IF(AND(ISEVEN((ABS([.A30])*10));(MOD((ABS([.A30])*10);1)&lt;=0.5));ROUNDDOWN(ABS([.A30]);1);ROUND(ABS([.A30]);1)))"/>
          <table:table-cell office:value-type="error" table:formula="of:=([.D30]-[.E30])"/>
          <table:table-cell office:value-type="error" table:formula="of:=IF(([.F30]&lt;&gt;0);&quot;ERROR&quot;;&quot;&quot;)"/>
        </table:table-row>
        <table:table-row>
          <table:table-cell office:value-type="float" office:value="-0.31">
            <text:p>-0.31</text:p>
          </table:table-cell>
          <table:table-cell office:value-type="error" table:formula="of:=ROUND([.A31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1])*IF(AND(ISEVEN((ABS([.A31])*10));(MOD((ABS([.A31])*10);1)&lt;=0.5));ROUNDDOWN(ABS([.A31]);1);ROUND(ABS([.A31]);1)))"/>
          <table:table-cell office:value-type="error" table:formula="of:=([.D31]-[.E31])"/>
          <table:table-cell office:value-type="error" table:formula="of:=IF(([.F31]&lt;&gt;0);&quot;ERROR&quot;;&quot;&quot;)"/>
        </table:table-row>
        <table:table-row>
          <table:table-cell office:value-type="float" office:value="-0.3">
            <text:p>-0.3</text:p>
          </table:table-cell>
          <table:table-cell office:value-type="error" table:formula="of:=ROUND([.A32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2])*IF(AND(ISEVEN((ABS([.A32])*10));(MOD((ABS([.A32])*10);1)&lt;=0.5));ROUNDDOWN(ABS([.A32]);1);ROUND(ABS([.A32]);1)))"/>
          <table:table-cell office:value-type="error" table:formula="of:=([.D32]-[.E32])"/>
          <table:table-cell office:value-type="error" table:formula="of:=IF(([.F32]&lt;&gt;0);&quot;ERROR&quot;;&quot;&quot;)"/>
        </table:table-row>
        <table:table-row>
          <table:table-cell office:value-type="float" office:value="-0.29">
            <text:p>-0.29</text:p>
          </table:table-cell>
          <table:table-cell office:value-type="error" table:formula="of:=ROUND([.A33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3])*IF(AND(ISEVEN((ABS([.A33])*10));(MOD((ABS([.A33])*10);1)&lt;=0.5));ROUNDDOWN(ABS([.A33]);1);ROUND(ABS([.A33]);1)))"/>
          <table:table-cell office:value-type="error" table:formula="of:=([.D33]-[.E33])"/>
          <table:table-cell office:value-type="error" table:formula="of:=IF(([.F33]&lt;&gt;0);&quot;ERROR&quot;;&quot;&quot;)"/>
        </table:table-row>
        <table:table-row>
          <table:table-cell office:value-type="float" office:value="-0.28">
            <text:p>-0.28</text:p>
          </table:table-cell>
          <table:table-cell office:value-type="error" table:formula="of:=ROUND([.A34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4])*IF(AND(ISEVEN((ABS([.A34])*10));(MOD((ABS([.A34])*10);1)&lt;=0.5));ROUNDDOWN(ABS([.A34]);1);ROUND(ABS([.A34]);1)))"/>
          <table:table-cell office:value-type="error" table:formula="of:=([.D34]-[.E34])"/>
          <table:table-cell office:value-type="error" table:formula="of:=IF(([.F34]&lt;&gt;0);&quot;ERROR&quot;;&quot;&quot;)"/>
        </table:table-row>
        <table:table-row>
          <table:table-cell office:value-type="float" office:value="-0.27">
            <text:p>-0.27</text:p>
          </table:table-cell>
          <table:table-cell office:value-type="error" table:formula="of:=ROUND([.A35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5])*IF(AND(ISEVEN((ABS([.A35])*10));(MOD((ABS([.A35])*10);1)&lt;=0.5));ROUNDDOWN(ABS([.A35]);1);ROUND(ABS([.A35]);1)))"/>
          <table:table-cell office:value-type="error" table:formula="of:=([.D35]-[.E35])"/>
          <table:table-cell office:value-type="error" table:formula="of:=IF(([.F35]&lt;&gt;0);&quot;ERROR&quot;;&quot;&quot;)"/>
        </table:table-row>
        <table:table-row>
          <table:table-cell office:value-type="float" office:value="-0.26">
            <text:p>-0.26</text:p>
          </table:table-cell>
          <table:table-cell office:value-type="error" table:formula="of:=ROUND([.A36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6])*IF(AND(ISEVEN((ABS([.A36])*10));(MOD((ABS([.A36])*10);1)&lt;=0.5));ROUNDDOWN(ABS([.A36]);1);ROUND(ABS([.A36]);1)))"/>
          <table:table-cell office:value-type="error" table:formula="of:=([.D36]-[.E36])"/>
          <table:table-cell office:value-type="error" table:formula="of:=IF(([.F36]&lt;&gt;0);&quot;ERROR&quot;;&quot;&quot;)"/>
        </table:table-row>
        <table:table-row>
          <table:table-cell office:value-type="float" office:value="-0.25">
            <text:p>-0.25</text:p>
          </table:table-cell>
          <table:table-cell office:value-type="error" table:formula="of:=ROUND([.A37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37])*IF(AND(ISEVEN((ABS([.A37])*10));(MOD((ABS([.A37])*10);1)&lt;=0.5));ROUNDDOWN(ABS([.A37]);1);ROUND(ABS([.A37]);1)))"/>
          <table:table-cell office:value-type="error" table:formula="of:=([.D37]-[.E37])"/>
          <table:table-cell office:value-type="error" table:formula="of:=IF(([.F37]&lt;&gt;0);&quot;ERROR&quot;;&quot;&quot;)"/>
        </table:table-row>
        <table:table-row>
          <table:table-cell office:value-type="float" office:value="-0.24">
            <text:p>-0.24</text:p>
          </table:table-cell>
          <table:table-cell office:value-type="error" table:formula="of:=ROUND([.A38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38])*IF(AND(ISEVEN((ABS([.A38])*10));(MOD((ABS([.A38])*10);1)&lt;=0.5));ROUNDDOWN(ABS([.A38]);1);ROUND(ABS([.A38]);1)))"/>
          <table:table-cell office:value-type="error" table:formula="of:=([.D38]-[.E38])"/>
          <table:table-cell office:value-type="error" table:formula="of:=IF(([.F38]&lt;&gt;0);&quot;ERROR&quot;;&quot;&quot;)"/>
        </table:table-row>
        <table:table-row>
          <table:table-cell office:value-type="float" office:value="-0.23">
            <text:p>-0.23</text:p>
          </table:table-cell>
          <table:table-cell office:value-type="error" table:formula="of:=ROUND([.A39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39])*IF(AND(ISEVEN((ABS([.A39])*10));(MOD((ABS([.A39])*10);1)&lt;=0.5));ROUNDDOWN(ABS([.A39]);1);ROUND(ABS([.A39]);1)))"/>
          <table:table-cell office:value-type="error" table:formula="of:=([.D39]-[.E39])"/>
          <table:table-cell office:value-type="error" table:formula="of:=IF(([.F39]&lt;&gt;0);&quot;ERROR&quot;;&quot;&quot;)"/>
        </table:table-row>
        <table:table-row>
          <table:table-cell office:value-type="float" office:value="-0.22">
            <text:p>-0.22</text:p>
          </table:table-cell>
          <table:table-cell office:value-type="error" table:formula="of:=ROUND([.A40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0])*IF(AND(ISEVEN((ABS([.A40])*10));(MOD((ABS([.A40])*10);1)&lt;=0.5));ROUNDDOWN(ABS([.A40]);1);ROUND(ABS([.A40]);1)))"/>
          <table:table-cell office:value-type="error" table:formula="of:=([.D40]-[.E40])"/>
          <table:table-cell office:value-type="error" table:formula="of:=IF(([.F40]&lt;&gt;0);&quot;ERROR&quot;;&quot;&quot;)"/>
        </table:table-row>
        <table:table-row>
          <table:table-cell office:value-type="float" office:value="-0.21">
            <text:p>-0.21</text:p>
          </table:table-cell>
          <table:table-cell office:value-type="error" table:formula="of:=ROUND([.A41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1])*IF(AND(ISEVEN((ABS([.A41])*10));(MOD((ABS([.A41])*10);1)&lt;=0.5));ROUNDDOWN(ABS([.A41]);1);ROUND(ABS([.A41]);1)))"/>
          <table:table-cell office:value-type="error" table:formula="of:=([.D41]-[.E41])"/>
          <table:table-cell office:value-type="error" table:formula="of:=IF(([.F41]&lt;&gt;0);&quot;ERROR&quot;;&quot;&quot;)"/>
        </table:table-row>
        <table:table-row>
          <table:table-cell office:value-type="float" office:value="-0.2">
            <text:p>-0.2</text:p>
          </table:table-cell>
          <table:table-cell office:value-type="error" table:formula="of:=ROUND([.A42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2])*IF(AND(ISEVEN((ABS([.A42])*10));(MOD((ABS([.A42])*10);1)&lt;=0.5));ROUNDDOWN(ABS([.A42]);1);ROUND(ABS([.A42]);1)))"/>
          <table:table-cell office:value-type="error" table:formula="of:=([.D42]-[.E42])"/>
          <table:table-cell office:value-type="error" table:formula="of:=IF(([.F42]&lt;&gt;0);&quot;ERROR&quot;;&quot;&quot;)"/>
        </table:table-row>
        <table:table-row>
          <table:table-cell office:value-type="float" office:value="-0.19">
            <text:p>-0.19</text:p>
          </table:table-cell>
          <table:table-cell office:value-type="error" table:formula="of:=ROUND([.A43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3])*IF(AND(ISEVEN((ABS([.A43])*10));(MOD((ABS([.A43])*10);1)&lt;=0.5));ROUNDDOWN(ABS([.A43]);1);ROUND(ABS([.A43]);1)))"/>
          <table:table-cell office:value-type="error" table:formula="of:=([.D43]-[.E43])"/>
          <table:table-cell office:value-type="error" table:formula="of:=IF(([.F43]&lt;&gt;0);&quot;ERROR&quot;;&quot;&quot;)"/>
        </table:table-row>
        <table:table-row>
          <table:table-cell office:value-type="float" office:value="-0.18">
            <text:p>-0.18</text:p>
          </table:table-cell>
          <table:table-cell office:value-type="error" table:formula="of:=ROUND([.A44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4])*IF(AND(ISEVEN((ABS([.A44])*10));(MOD((ABS([.A44])*10);1)&lt;=0.5));ROUNDDOWN(ABS([.A44]);1);ROUND(ABS([.A44]);1)))"/>
          <table:table-cell office:value-type="error" table:formula="of:=([.D44]-[.E44])"/>
          <table:table-cell office:value-type="error" table:formula="of:=IF(([.F44]&lt;&gt;0);&quot;ERROR&quot;;&quot;&quot;)"/>
        </table:table-row>
        <table:table-row>
          <table:table-cell office:value-type="float" office:value="-0.17">
            <text:p>-0.17</text:p>
          </table:table-cell>
          <table:table-cell office:value-type="error" table:formula="of:=ROUND([.A45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5])*IF(AND(ISEVEN((ABS([.A45])*10));(MOD((ABS([.A45])*10);1)&lt;=0.5));ROUNDDOWN(ABS([.A45]);1);ROUND(ABS([.A45]);1)))"/>
          <table:table-cell office:value-type="error" table:formula="of:=([.D45]-[.E45])"/>
          <table:table-cell office:value-type="error" table:formula="of:=IF(([.F45]&lt;&gt;0);&quot;ERROR&quot;;&quot;&quot;)"/>
        </table:table-row>
        <table:table-row>
          <table:table-cell office:value-type="float" office:value="-0.16">
            <text:p>-0.16</text:p>
          </table:table-cell>
          <table:table-cell office:value-type="error" table:formula="of:=ROUND([.A46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6])*IF(AND(ISEVEN((ABS([.A46])*10));(MOD((ABS([.A46])*10);1)&lt;=0.5));ROUNDDOWN(ABS([.A46]);1);ROUND(ABS([.A46]);1)))"/>
          <table:table-cell office:value-type="error" table:formula="of:=([.D46]-[.E46])"/>
          <table:table-cell office:value-type="error" table:formula="of:=IF(([.F46]&lt;&gt;0);&quot;ERROR&quot;;&quot;&quot;)"/>
        </table:table-row>
        <table:table-row>
          <table:table-cell office:value-type="float" office:value="-0.15">
            <text:p>-0.15</text:p>
          </table:table-cell>
          <table:table-cell office:value-type="error" table:formula="of:=ROUND([.A47];1)"/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error" table:formula="of:=(SIGN([.A47])*IF(AND(ISEVEN((ABS([.A47])*10));(MOD((ABS([.A47])*10);1)&lt;=0.5));ROUNDDOWN(ABS([.A47]);1);ROUND(ABS([.A47]);1)))"/>
          <table:table-cell office:value-type="error" table:formula="of:=([.D47]-[.E47])"/>
          <table:table-cell office:value-type="error" table:formula="of:=IF(([.F47]&lt;&gt;0);&quot;ERROR&quot;;&quot;&quot;)"/>
        </table:table-row>
        <table:table-row>
          <table:table-cell office:value-type="float" office:value="-0.14">
            <text:p>-0.14</text:p>
          </table:table-cell>
          <table:table-cell office:value-type="error" table:formula="of:=ROUND([.A48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48])*IF(AND(ISEVEN((ABS([.A48])*10));(MOD((ABS([.A48])*10);1)&lt;=0.5));ROUNDDOWN(ABS([.A48]);1);ROUND(ABS([.A48]);1)))"/>
          <table:table-cell office:value-type="error" table:formula="of:=([.D48]-[.E48])"/>
          <table:table-cell office:value-type="error" table:formula="of:=IF(([.F48]&lt;&gt;0);&quot;ERROR&quot;;&quot;&quot;)"/>
        </table:table-row>
        <table:table-row>
          <table:table-cell office:value-type="float" office:value="-0.13">
            <text:p>-0.13</text:p>
          </table:table-cell>
          <table:table-cell office:value-type="error" table:formula="of:=ROUND([.A49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49])*IF(AND(ISEVEN((ABS([.A49])*10));(MOD((ABS([.A49])*10);1)&lt;=0.5));ROUNDDOWN(ABS([.A49]);1);ROUND(ABS([.A49]);1)))"/>
          <table:table-cell office:value-type="error" table:formula="of:=([.D49]-[.E49])"/>
          <table:table-cell office:value-type="error" table:formula="of:=IF(([.F49]&lt;&gt;0);&quot;ERROR&quot;;&quot;&quot;)"/>
        </table:table-row>
        <table:table-row>
          <table:table-cell office:value-type="float" office:value="-0.12">
            <text:p>-0.12</text:p>
          </table:table-cell>
          <table:table-cell office:value-type="error" table:formula="of:=ROUND([.A50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0])*IF(AND(ISEVEN((ABS([.A50])*10));(MOD((ABS([.A50])*10);1)&lt;=0.5));ROUNDDOWN(ABS([.A50]);1);ROUND(ABS([.A50]);1)))"/>
          <table:table-cell office:value-type="error" table:formula="of:=([.D50]-[.E50])"/>
          <table:table-cell office:value-type="error" table:formula="of:=IF(([.F50]&lt;&gt;0);&quot;ERROR&quot;;&quot;&quot;)"/>
        </table:table-row>
        <table:table-row>
          <table:table-cell office:value-type="float" office:value="-0.11">
            <text:p>-0.11</text:p>
          </table:table-cell>
          <table:table-cell office:value-type="error" table:formula="of:=ROUND([.A51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1])*IF(AND(ISEVEN((ABS([.A51])*10));(MOD((ABS([.A51])*10);1)&lt;=0.5));ROUNDDOWN(ABS([.A51]);1);ROUND(ABS([.A51]);1)))"/>
          <table:table-cell office:value-type="error" table:formula="of:=([.D51]-[.E51])"/>
          <table:table-cell office:value-type="error" table:formula="of:=IF(([.F51]&lt;&gt;0);&quot;ERROR&quot;;&quot;&quot;)"/>
        </table:table-row>
        <table:table-row>
          <table:table-cell office:value-type="float" office:value="-0.1">
            <text:p>-0.1</text:p>
          </table:table-cell>
          <table:table-cell office:value-type="error" table:formula="of:=ROUND([.A52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2])*IF(AND(ISEVEN((ABS([.A52])*10));(MOD((ABS([.A52])*10);1)&lt;=0.5));ROUNDDOWN(ABS([.A52]);1);ROUND(ABS([.A52]);1)))"/>
          <table:table-cell office:value-type="error" table:formula="of:=([.D52]-[.E52])"/>
          <table:table-cell office:value-type="error" table:formula="of:=IF(([.F52]&lt;&gt;0);&quot;ERROR&quot;;&quot;&quot;)"/>
        </table:table-row>
        <table:table-row>
          <table:table-cell office:value-type="float" office:value="-0.09">
            <text:p>-0.09</text:p>
          </table:table-cell>
          <table:table-cell office:value-type="error" table:formula="of:=ROUND([.A53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3])*IF(AND(ISEVEN((ABS([.A53])*10));(MOD((ABS([.A53])*10);1)&lt;=0.5));ROUNDDOWN(ABS([.A53]);1);ROUND(ABS([.A53]);1)))"/>
          <table:table-cell office:value-type="error" table:formula="of:=([.D53]-[.E53])"/>
          <table:table-cell office:value-type="error" table:formula="of:=IF(([.F53]&lt;&gt;0);&quot;ERROR&quot;;&quot;&quot;)"/>
        </table:table-row>
        <table:table-row>
          <table:table-cell office:value-type="float" office:value="-0.08">
            <text:p>-0.08</text:p>
          </table:table-cell>
          <table:table-cell office:value-type="error" table:formula="of:=ROUND([.A54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4])*IF(AND(ISEVEN((ABS([.A54])*10));(MOD((ABS([.A54])*10);1)&lt;=0.5));ROUNDDOWN(ABS([.A54]);1);ROUND(ABS([.A54]);1)))"/>
          <table:table-cell office:value-type="error" table:formula="of:=([.D54]-[.E54])"/>
          <table:table-cell office:value-type="error" table:formula="of:=IF(([.F54]&lt;&gt;0);&quot;ERROR&quot;;&quot;&quot;)"/>
        </table:table-row>
        <table:table-row>
          <table:table-cell office:value-type="float" office:value="-0.07">
            <text:p>-0.07</text:p>
          </table:table-cell>
          <table:table-cell office:value-type="error" table:formula="of:=ROUND([.A55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5])*IF(AND(ISEVEN((ABS([.A55])*10));(MOD((ABS([.A55])*10);1)&lt;=0.5));ROUNDDOWN(ABS([.A55]);1);ROUND(ABS([.A55]);1)))"/>
          <table:table-cell office:value-type="error" table:formula="of:=([.D55]-[.E55])"/>
          <table:table-cell office:value-type="error" table:formula="of:=IF(([.F55]&lt;&gt;0);&quot;ERROR&quot;;&quot;&quot;)"/>
        </table:table-row>
        <table:table-row>
          <table:table-cell office:value-type="float" office:value="-0.06">
            <text:p>-0.06</text:p>
          </table:table-cell>
          <table:table-cell office:value-type="error" table:formula="of:=ROUND([.A56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6])*IF(AND(ISEVEN((ABS([.A56])*10));(MOD((ABS([.A56])*10);1)&lt;=0.5));ROUNDDOWN(ABS([.A56]);1);ROUND(ABS([.A56]);1)))"/>
          <table:table-cell office:value-type="error" table:formula="of:=([.D56]-[.E56])"/>
          <table:table-cell office:value-type="error" table:formula="of:=IF(([.F56]&lt;&gt;0);&quot;ERROR&quot;;&quot;&quot;)"/>
        </table:table-row>
        <table:table-row>
          <table:table-cell office:value-type="float" office:value="-0.05">
            <text:p>-0.05</text:p>
          </table:table-cell>
          <table:table-cell office:value-type="error" table:formula="of:=ROUND([.A57];1)"/>
          <table:table-cell office:value-type="float" office:value="-0.1">
            <text:p>-0.1</text:p>
          </table:table-cell>
          <table:table-cell office:value-type="float" office:value="0.0">
            <text:p>0.0</text:p>
          </table:table-cell>
          <table:table-cell office:value-type="error" table:formula="of:=(SIGN([.A57])*IF(AND(ISEVEN((ABS([.A57])*10));(MOD((ABS([.A57])*10);1)&lt;=0.5));ROUNDDOWN(ABS([.A57]);1);ROUND(ABS([.A57]);1)))"/>
          <table:table-cell office:value-type="error" table:formula="of:=([.D57]-[.E57])"/>
          <table:table-cell office:value-type="error" table:formula="of:=IF(([.F57]&lt;&gt;0);&quot;ERROR&quot;;&quot;&quot;)"/>
        </table:table-row>
        <table:table-row>
          <table:table-cell office:value-type="float" office:value="-0.04">
            <text:p>-0.04</text:p>
          </table:table-cell>
          <table:table-cell office:value-type="error" table:formula="of:=ROUND([.A58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(SIGN([.A58])*IF(AND(ISEVEN((ABS([.A58])*10));(MOD((ABS([.A58])*10);1)&lt;=0.5));ROUNDDOWN(ABS([.A58]);1);ROUND(ABS([.A58]);1)))"/>
          <table:table-cell office:value-type="error" table:formula="of:=([.D58]-[.E58])"/>
          <table:table-cell office:value-type="error" table:formula="of:=IF(([.F58]&lt;&gt;0);&quot;ERROR&quot;;&quot;&quot;)"/>
        </table:table-row>
        <table:table-row>
          <table:table-cell office:value-type="float" office:value="-0.03">
            <text:p>-0.03</text:p>
          </table:table-cell>
          <table:table-cell office:value-type="error" table:formula="of:=ROUND([.A59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(SIGN([.A59])*IF(AND(ISEVEN((ABS([.A59])*10));(MOD((ABS([.A59])*10);1)&lt;=0.5));ROUNDDOWN(ABS([.A59]);1);ROUND(ABS([.A59]);1)))"/>
          <table:table-cell office:value-type="error" table:formula="of:=([.D59]-[.E59])"/>
          <table:table-cell office:value-type="error" table:formula="of:=IF(([.F59]&lt;&gt;0);&quot;ERROR&quot;;&quot;&quot;)"/>
        </table:table-row>
        <table:table-row>
          <table:table-cell office:value-type="float" office:value="-0.02">
            <text:p>-0.02</text:p>
          </table:table-cell>
          <table:table-cell office:value-type="error" table:formula="of:=ROUND([.A60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(SIGN([.A60])*IF(AND(ISEVEN((ABS([.A60])*10));(MOD((ABS([.A60])*10);1)&lt;=0.5));ROUNDDOWN(ABS([.A60]);1);ROUND(ABS([.A60]);1)))"/>
          <table:table-cell office:value-type="error" table:formula="of:=([.D60]-[.E60])"/>
          <table:table-cell office:value-type="error" table:formula="of:=IF(([.F60]&lt;&gt;0);&quot;ERROR&quot;;&quot;&quot;)"/>
        </table:table-row>
        <table:table-row>
          <table:table-cell office:value-type="float" office:value="-0.01">
            <text:p>-0.01</text:p>
          </table:table-cell>
          <table:table-cell office:value-type="error" table:formula="of:=ROUND([.A61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(SIGN([.A61])*IF(AND(ISEVEN((ABS([.A61])*10));(MOD((ABS([.A61])*10);1)&lt;=0.5));ROUNDDOWN(ABS([.A61]);1);ROUND(ABS([.A61]);1)))"/>
          <table:table-cell office:value-type="error" table:formula="of:=([.D61]-[.E61])"/>
          <table:table-cell office:value-type="error" table:formula="of:=IF(([.F61]&lt;&gt;0);&quot;ERROR&quot;;&quot;&quot;)"/>
        </table:table-row>
        <table:table-row>
          <table:table-cell office:value-type="float" office:value="0.0">
            <text:p>0.0</text:p>
          </table:table-cell>
          <table:table-cell office:value-type="error" table:formula="of:=ROUND([.A62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(SIGN([.A62])*IF(AND(ISEVEN((ABS([.A62])*10));(MOD((ABS([.A62])*10);1)&lt;=0.5));ROUNDDOWN(ABS([.A62]);1);ROUND(ABS([.A62]);1)))"/>
          <table:table-cell office:value-type="error" table:formula="of:=([.D62]-[.E62])"/>
          <table:table-cell office:value-type="error" table:formula="of:=IF(([.F62]&lt;&gt;0);&quot;ERROR&quot;;&quot;&quot;)"/>
        </table:table-row>
        <table:table-row>
          <table:table-cell office:value-type="float" office:value="0.01">
            <text:p>0.01</text:p>
          </table:table-cell>
          <table:table-cell office:value-type="error" table:formula="of:=ROUND([.A63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(SIGN([.A63])*IF(AND(ISEVEN((ABS([.A63])*10));(MOD((ABS([.A63])*10);1)&lt;=0.5));ROUNDDOWN(ABS([.A63]);1);ROUND(ABS([.A63]);1)))"/>
          <table:table-cell office:value-type="error" table:formula="of:=([.D63]-[.E63])"/>
          <table:table-cell office:value-type="error" table:formula="of:=IF(([.F63]&lt;&gt;0);&quot;ERROR&quot;;&quot;&quot;)"/>
        </table:table-row>
        <table:table-row>
          <table:table-cell office:value-type="float" office:value="0.02">
            <text:p>0.02</text:p>
          </table:table-cell>
          <table:table-cell office:value-type="error" table:formula="of:=ROUND([.A64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(SIGN([.A64])*IF(AND(ISEVEN((ABS([.A64])*10));(MOD((ABS([.A64])*10);1)&lt;=0.5));ROUNDDOWN(ABS([.A64]);1);ROUND(ABS([.A64]);1)))"/>
          <table:table-cell office:value-type="error" table:formula="of:=([.D64]-[.E64])"/>
          <table:table-cell office:value-type="error" table:formula="of:=IF(([.F64]&lt;&gt;0);&quot;ERROR&quot;;&quot;&quot;)"/>
        </table:table-row>
        <table:table-row>
          <table:table-cell office:value-type="float" office:value="0.03">
            <text:p>0.03</text:p>
          </table:table-cell>
          <table:table-cell office:value-type="error" table:formula="of:=ROUND([.A65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(SIGN([.A65])*IF(AND(ISEVEN((ABS([.A65])*10));(MOD((ABS([.A65])*10);1)&lt;=0.5));ROUNDDOWN(ABS([.A65]);1);ROUND(ABS([.A65]);1)))"/>
          <table:table-cell office:value-type="error" table:formula="of:=([.D65]-[.E65])"/>
          <table:table-cell office:value-type="error" table:formula="of:=IF(([.F65]&lt;&gt;0);&quot;ERROR&quot;;&quot;&quot;)"/>
        </table:table-row>
        <table:table-row>
          <table:table-cell office:value-type="float" office:value="0.04">
            <text:p>0.04</text:p>
          </table:table-cell>
          <table:table-cell office:value-type="error" table:formula="of:=ROUND([.A66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(SIGN([.A66])*IF(AND(ISEVEN((ABS([.A66])*10));(MOD((ABS([.A66])*10);1)&lt;=0.5));ROUNDDOWN(ABS([.A66]);1);ROUND(ABS([.A66]);1)))"/>
          <table:table-cell office:value-type="error" table:formula="of:=([.D66]-[.E66])"/>
          <table:table-cell office:value-type="error" table:formula="of:=IF(([.F66]&lt;&gt;0);&quot;ERROR&quot;;&quot;&quot;)"/>
        </table:table-row>
        <table:table-row>
          <table:table-cell office:value-type="float" office:value="0.05">
            <text:p>0.05</text:p>
          </table:table-cell>
          <table:table-cell office:value-type="error" table:formula="of:=ROUND([.A67];1)"/>
          <table:table-cell office:value-type="float" office:value="0.1">
            <text:p>0.1</text:p>
          </table:table-cell>
          <table:table-cell office:value-type="float" office:value="0.0">
            <text:p>0.0</text:p>
          </table:table-cell>
          <table:table-cell office:value-type="error" table:formula="of:=(SIGN([.A67])*IF(AND(ISEVEN((ABS([.A67])*10));(MOD((ABS([.A67])*10);1)&lt;=0.5));ROUNDDOWN(ABS([.A67]);1);ROUND(ABS([.A67]);1)))"/>
          <table:table-cell office:value-type="error" table:formula="of:=([.D67]-[.E67])"/>
          <table:table-cell office:value-type="error" table:formula="of:=IF(([.F67]&lt;&gt;0);&quot;ERROR&quot;;&quot;&quot;)"/>
        </table:table-row>
        <table:table-row>
          <table:table-cell office:value-type="float" office:value="0.06">
            <text:p>0.06</text:p>
          </table:table-cell>
          <table:table-cell office:value-type="error" table:formula="of:=ROUND([.A68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68])*IF(AND(ISEVEN((ABS([.A68])*10));(MOD((ABS([.A68])*10);1)&lt;=0.5));ROUNDDOWN(ABS([.A68]);1);ROUND(ABS([.A68]);1)))"/>
          <table:table-cell office:value-type="error" table:formula="of:=([.D68]-[.E68])"/>
          <table:table-cell office:value-type="error" table:formula="of:=IF(([.F68]&lt;&gt;0);&quot;ERROR&quot;;&quot;&quot;)"/>
        </table:table-row>
        <table:table-row>
          <table:table-cell office:value-type="float" office:value="0.07">
            <text:p>0.07</text:p>
          </table:table-cell>
          <table:table-cell office:value-type="error" table:formula="of:=ROUND([.A69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69])*IF(AND(ISEVEN((ABS([.A69])*10));(MOD((ABS([.A69])*10);1)&lt;=0.5));ROUNDDOWN(ABS([.A69]);1);ROUND(ABS([.A69]);1)))"/>
          <table:table-cell office:value-type="error" table:formula="of:=([.D69]-[.E69])"/>
          <table:table-cell office:value-type="error" table:formula="of:=IF(([.F69]&lt;&gt;0);&quot;ERROR&quot;;&quot;&quot;)"/>
        </table:table-row>
        <table:table-row>
          <table:table-cell office:value-type="float" office:value="0.08">
            <text:p>0.08</text:p>
          </table:table-cell>
          <table:table-cell office:value-type="error" table:formula="of:=ROUND([.A70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0])*IF(AND(ISEVEN((ABS([.A70])*10));(MOD((ABS([.A70])*10);1)&lt;=0.5));ROUNDDOWN(ABS([.A70]);1);ROUND(ABS([.A70]);1)))"/>
          <table:table-cell office:value-type="error" table:formula="of:=([.D70]-[.E70])"/>
          <table:table-cell office:value-type="error" table:formula="of:=IF(([.F70]&lt;&gt;0);&quot;ERROR&quot;;&quot;&quot;)"/>
        </table:table-row>
        <table:table-row>
          <table:table-cell office:value-type="float" office:value="0.09">
            <text:p>0.09</text:p>
          </table:table-cell>
          <table:table-cell office:value-type="error" table:formula="of:=ROUND([.A71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1])*IF(AND(ISEVEN((ABS([.A71])*10));(MOD((ABS([.A71])*10);1)&lt;=0.5));ROUNDDOWN(ABS([.A71]);1);ROUND(ABS([.A71]);1)))"/>
          <table:table-cell office:value-type="error" table:formula="of:=([.D71]-[.E71])"/>
          <table:table-cell office:value-type="error" table:formula="of:=IF(([.F71]&lt;&gt;0);&quot;ERROR&quot;;&quot;&quot;)"/>
        </table:table-row>
        <table:table-row>
          <table:table-cell office:value-type="float" office:value="0.1">
            <text:p>0.1</text:p>
          </table:table-cell>
          <table:table-cell office:value-type="error" table:formula="of:=ROUND([.A72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2])*IF(AND(ISEVEN((ABS([.A72])*10));(MOD((ABS([.A72])*10);1)&lt;=0.5));ROUNDDOWN(ABS([.A72]);1);ROUND(ABS([.A72]);1)))"/>
          <table:table-cell office:value-type="error" table:formula="of:=([.D72]-[.E72])"/>
          <table:table-cell office:value-type="error" table:formula="of:=IF(([.F72]&lt;&gt;0);&quot;ERROR&quot;;&quot;&quot;)"/>
        </table:table-row>
        <table:table-row>
          <table:table-cell office:value-type="float" office:value="0.11">
            <text:p>0.11</text:p>
          </table:table-cell>
          <table:table-cell office:value-type="error" table:formula="of:=ROUND([.A73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3])*IF(AND(ISEVEN((ABS([.A73])*10));(MOD((ABS([.A73])*10);1)&lt;=0.5));ROUNDDOWN(ABS([.A73]);1);ROUND(ABS([.A73]);1)))"/>
          <table:table-cell office:value-type="error" table:formula="of:=([.D73]-[.E73])"/>
          <table:table-cell office:value-type="error" table:formula="of:=IF(([.F73]&lt;&gt;0);&quot;ERROR&quot;;&quot;&quot;)"/>
        </table:table-row>
        <table:table-row>
          <table:table-cell office:value-type="float" office:value="0.12">
            <text:p>0.12</text:p>
          </table:table-cell>
          <table:table-cell office:value-type="error" table:formula="of:=ROUND([.A74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4])*IF(AND(ISEVEN((ABS([.A74])*10));(MOD((ABS([.A74])*10);1)&lt;=0.5));ROUNDDOWN(ABS([.A74]);1);ROUND(ABS([.A74]);1)))"/>
          <table:table-cell office:value-type="error" table:formula="of:=([.D74]-[.E74])"/>
          <table:table-cell office:value-type="error" table:formula="of:=IF(([.F74]&lt;&gt;0);&quot;ERROR&quot;;&quot;&quot;)"/>
        </table:table-row>
        <table:table-row>
          <table:table-cell office:value-type="float" office:value="0.13">
            <text:p>0.13</text:p>
          </table:table-cell>
          <table:table-cell office:value-type="error" table:formula="of:=ROUND([.A75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5])*IF(AND(ISEVEN((ABS([.A75])*10));(MOD((ABS([.A75])*10);1)&lt;=0.5));ROUNDDOWN(ABS([.A75]);1);ROUND(ABS([.A75]);1)))"/>
          <table:table-cell office:value-type="error" table:formula="of:=([.D75]-[.E75])"/>
          <table:table-cell office:value-type="error" table:formula="of:=IF(([.F75]&lt;&gt;0);&quot;ERROR&quot;;&quot;&quot;)"/>
        </table:table-row>
        <table:table-row>
          <table:table-cell office:value-type="float" office:value="0.14">
            <text:p>0.14</text:p>
          </table:table-cell>
          <table:table-cell office:value-type="error" table:formula="of:=ROUND([.A76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6])*IF(AND(ISEVEN((ABS([.A76])*10));(MOD((ABS([.A76])*10);1)&lt;=0.5));ROUNDDOWN(ABS([.A76]);1);ROUND(ABS([.A76]);1)))"/>
          <table:table-cell office:value-type="error" table:formula="of:=([.D76]-[.E76])"/>
          <table:table-cell office:value-type="error" table:formula="of:=IF(([.F76]&lt;&gt;0);&quot;ERROR&quot;;&quot;&quot;)"/>
        </table:table-row>
        <table:table-row>
          <table:table-cell office:value-type="float" office:value="0.15">
            <text:p>0.15</text:p>
          </table:table-cell>
          <table:table-cell office:value-type="error" table:formula="of:=ROUND([.A77];1)"/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error" table:formula="of:=(SIGN([.A77])*IF(AND(ISEVEN((ABS([.A77])*10));(MOD((ABS([.A77])*10);1)&lt;=0.5));ROUNDDOWN(ABS([.A77]);1);ROUND(ABS([.A77]);1)))"/>
          <table:table-cell office:value-type="error" table:formula="of:=([.D77]-[.E77])"/>
          <table:table-cell office:value-type="error" table:formula="of:=IF(([.F77]&lt;&gt;0);&quot;ERROR&quot;;&quot;&quot;)"/>
        </table:table-row>
        <table:table-row>
          <table:table-cell office:value-type="float" office:value="0.16">
            <text:p>0.16</text:p>
          </table:table-cell>
          <table:table-cell office:value-type="error" table:formula="of:=ROUND([.A78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78])*IF(AND(ISEVEN((ABS([.A78])*10));(MOD((ABS([.A78])*10);1)&lt;=0.5));ROUNDDOWN(ABS([.A78]);1);ROUND(ABS([.A78]);1)))"/>
          <table:table-cell office:value-type="error" table:formula="of:=([.D78]-[.E78])"/>
          <table:table-cell office:value-type="error" table:formula="of:=IF(([.F78]&lt;&gt;0);&quot;ERROR&quot;;&quot;&quot;)"/>
        </table:table-row>
        <table:table-row>
          <table:table-cell office:value-type="float" office:value="0.17">
            <text:p>0.17</text:p>
          </table:table-cell>
          <table:table-cell office:value-type="error" table:formula="of:=ROUND([.A79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79])*IF(AND(ISEVEN((ABS([.A79])*10));(MOD((ABS([.A79])*10);1)&lt;=0.5));ROUNDDOWN(ABS([.A79]);1);ROUND(ABS([.A79]);1)))"/>
          <table:table-cell office:value-type="error" table:formula="of:=([.D79]-[.E79])"/>
          <table:table-cell office:value-type="error" table:formula="of:=IF(([.F79]&lt;&gt;0);&quot;ERROR&quot;;&quot;&quot;)"/>
        </table:table-row>
        <table:table-row>
          <table:table-cell office:value-type="float" office:value="0.18">
            <text:p>0.18</text:p>
          </table:table-cell>
          <table:table-cell office:value-type="error" table:formula="of:=ROUND([.A80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0])*IF(AND(ISEVEN((ABS([.A80])*10));(MOD((ABS([.A80])*10);1)&lt;=0.5));ROUNDDOWN(ABS([.A80]);1);ROUND(ABS([.A80]);1)))"/>
          <table:table-cell office:value-type="error" table:formula="of:=([.D80]-[.E80])"/>
          <table:table-cell office:value-type="error" table:formula="of:=IF(([.F80]&lt;&gt;0);&quot;ERROR&quot;;&quot;&quot;)"/>
        </table:table-row>
        <table:table-row>
          <table:table-cell office:value-type="float" office:value="0.19">
            <text:p>0.19</text:p>
          </table:table-cell>
          <table:table-cell office:value-type="error" table:formula="of:=ROUND([.A81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1])*IF(AND(ISEVEN((ABS([.A81])*10));(MOD((ABS([.A81])*10);1)&lt;=0.5));ROUNDDOWN(ABS([.A81]);1);ROUND(ABS([.A81]);1)))"/>
          <table:table-cell office:value-type="error" table:formula="of:=([.D81]-[.E81])"/>
          <table:table-cell office:value-type="error" table:formula="of:=IF(([.F81]&lt;&gt;0);&quot;ERROR&quot;;&quot;&quot;)"/>
        </table:table-row>
        <table:table-row>
          <table:table-cell office:value-type="float" office:value="0.2">
            <text:p>0.2</text:p>
          </table:table-cell>
          <table:table-cell office:value-type="error" table:formula="of:=ROUND([.A82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2])*IF(AND(ISEVEN((ABS([.A82])*10));(MOD((ABS([.A82])*10);1)&lt;=0.5));ROUNDDOWN(ABS([.A82]);1);ROUND(ABS([.A82]);1)))"/>
          <table:table-cell office:value-type="error" table:formula="of:=([.D82]-[.E82])"/>
          <table:table-cell office:value-type="error" table:formula="of:=IF(([.F82]&lt;&gt;0);&quot;ERROR&quot;;&quot;&quot;)"/>
        </table:table-row>
        <table:table-row>
          <table:table-cell office:value-type="float" office:value="0.21">
            <text:p>0.21</text:p>
          </table:table-cell>
          <table:table-cell office:value-type="error" table:formula="of:=ROUND([.A83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3])*IF(AND(ISEVEN((ABS([.A83])*10));(MOD((ABS([.A83])*10);1)&lt;=0.5));ROUNDDOWN(ABS([.A83]);1);ROUND(ABS([.A83]);1)))"/>
          <table:table-cell office:value-type="error" table:formula="of:=([.D83]-[.E83])"/>
          <table:table-cell office:value-type="error" table:formula="of:=IF(([.F83]&lt;&gt;0);&quot;ERROR&quot;;&quot;&quot;)"/>
        </table:table-row>
        <table:table-row>
          <table:table-cell office:value-type="float" office:value="0.22">
            <text:p>0.22</text:p>
          </table:table-cell>
          <table:table-cell office:value-type="error" table:formula="of:=ROUND([.A84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4])*IF(AND(ISEVEN((ABS([.A84])*10));(MOD((ABS([.A84])*10);1)&lt;=0.5));ROUNDDOWN(ABS([.A84]);1);ROUND(ABS([.A84]);1)))"/>
          <table:table-cell office:value-type="error" table:formula="of:=([.D84]-[.E84])"/>
          <table:table-cell office:value-type="error" table:formula="of:=IF(([.F84]&lt;&gt;0);&quot;ERROR&quot;;&quot;&quot;)"/>
        </table:table-row>
        <table:table-row>
          <table:table-cell office:value-type="float" office:value="0.23">
            <text:p>0.23</text:p>
          </table:table-cell>
          <table:table-cell office:value-type="error" table:formula="of:=ROUND([.A85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5])*IF(AND(ISEVEN((ABS([.A85])*10));(MOD((ABS([.A85])*10);1)&lt;=0.5));ROUNDDOWN(ABS([.A85]);1);ROUND(ABS([.A85]);1)))"/>
          <table:table-cell office:value-type="error" table:formula="of:=([.D85]-[.E85])"/>
          <table:table-cell office:value-type="error" table:formula="of:=IF(([.F85]&lt;&gt;0);&quot;ERROR&quot;;&quot;&quot;)"/>
        </table:table-row>
        <table:table-row>
          <table:table-cell office:value-type="float" office:value="0.24">
            <text:p>0.24</text:p>
          </table:table-cell>
          <table:table-cell office:value-type="error" table:formula="of:=ROUND([.A86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6])*IF(AND(ISEVEN((ABS([.A86])*10));(MOD((ABS([.A86])*10);1)&lt;=0.5));ROUNDDOWN(ABS([.A86]);1);ROUND(ABS([.A86]);1)))"/>
          <table:table-cell office:value-type="error" table:formula="of:=([.D86]-[.E86])"/>
          <table:table-cell office:value-type="error" table:formula="of:=IF(([.F86]&lt;&gt;0);&quot;ERROR&quot;;&quot;&quot;)"/>
        </table:table-row>
        <table:table-row>
          <table:table-cell office:value-type="float" office:value="0.25">
            <text:p>0.25</text:p>
          </table:table-cell>
          <table:table-cell office:value-type="error" table:formula="of:=ROUND([.A87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7])*IF(AND(ISEVEN((ABS([.A87])*10));(MOD((ABS([.A87])*10);1)&lt;=0.5));ROUNDDOWN(ABS([.A87]);1);ROUND(ABS([.A87]);1)))"/>
          <table:table-cell office:value-type="error" table:formula="of:=([.D87]-[.E87])"/>
          <table:table-cell office:value-type="error" table:formula="of:=IF(([.F87]&lt;&gt;0);&quot;ERROR&quot;;&quot;&quot;)"/>
        </table:table-row>
        <table:table-row>
          <table:table-cell office:value-type="float" office:value="0.26">
            <text:p>0.26</text:p>
          </table:table-cell>
          <table:table-cell office:value-type="error" table:formula="of:=ROUND([.A88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88])*IF(AND(ISEVEN((ABS([.A88])*10));(MOD((ABS([.A88])*10);1)&lt;=0.5));ROUNDDOWN(ABS([.A88]);1);ROUND(ABS([.A88]);1)))"/>
          <table:table-cell office:value-type="error" table:formula="of:=([.D88]-[.E88])"/>
          <table:table-cell office:value-type="error" table:formula="of:=IF(([.F88]&lt;&gt;0);&quot;ERROR&quot;;&quot;&quot;)"/>
        </table:table-row>
        <table:table-row>
          <table:table-cell office:value-type="float" office:value="0.27">
            <text:p>0.27</text:p>
          </table:table-cell>
          <table:table-cell office:value-type="error" table:formula="of:=ROUND([.A89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89])*IF(AND(ISEVEN((ABS([.A89])*10));(MOD((ABS([.A89])*10);1)&lt;=0.5));ROUNDDOWN(ABS([.A89]);1);ROUND(ABS([.A89]);1)))"/>
          <table:table-cell office:value-type="error" table:formula="of:=([.D89]-[.E89])"/>
          <table:table-cell office:value-type="error" table:formula="of:=IF(([.F89]&lt;&gt;0);&quot;ERROR&quot;;&quot;&quot;)"/>
        </table:table-row>
        <table:table-row>
          <table:table-cell office:value-type="float" office:value="0.28">
            <text:p>0.28</text:p>
          </table:table-cell>
          <table:table-cell office:value-type="error" table:formula="of:=ROUND([.A90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0])*IF(AND(ISEVEN((ABS([.A90])*10));(MOD((ABS([.A90])*10);1)&lt;=0.5));ROUNDDOWN(ABS([.A90]);1);ROUND(ABS([.A90]);1)))"/>
          <table:table-cell office:value-type="error" table:formula="of:=([.D90]-[.E90])"/>
          <table:table-cell office:value-type="error" table:formula="of:=IF(([.F90]&lt;&gt;0);&quot;ERROR&quot;;&quot;&quot;)"/>
        </table:table-row>
        <table:table-row>
          <table:table-cell office:value-type="float" office:value="0.29">
            <text:p>0.29</text:p>
          </table:table-cell>
          <table:table-cell office:value-type="error" table:formula="of:=ROUND([.A91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1])*IF(AND(ISEVEN((ABS([.A91])*10));(MOD((ABS([.A91])*10);1)&lt;=0.5));ROUNDDOWN(ABS([.A91]);1);ROUND(ABS([.A91]);1)))"/>
          <table:table-cell office:value-type="error" table:formula="of:=([.D91]-[.E91])"/>
          <table:table-cell office:value-type="error" table:formula="of:=IF(([.F91]&lt;&gt;0);&quot;ERROR&quot;;&quot;&quot;)"/>
        </table:table-row>
        <table:table-row>
          <table:table-cell office:value-type="float" office:value="0.3">
            <text:p>0.3</text:p>
          </table:table-cell>
          <table:table-cell office:value-type="error" table:formula="of:=ROUND([.A92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2])*IF(AND(ISEVEN((ABS([.A92])*10));(MOD((ABS([.A92])*10);1)&lt;=0.5));ROUNDDOWN(ABS([.A92]);1);ROUND(ABS([.A92]);1)))"/>
          <table:table-cell office:value-type="error" table:formula="of:=([.D92]-[.E92])"/>
          <table:table-cell office:value-type="error" table:formula="of:=IF(([.F92]&lt;&gt;0);&quot;ERROR&quot;;&quot;&quot;)"/>
        </table:table-row>
        <table:table-row>
          <table:table-cell office:value-type="float" office:value="0.31">
            <text:p>0.31</text:p>
          </table:table-cell>
          <table:table-cell office:value-type="error" table:formula="of:=ROUND([.A93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3])*IF(AND(ISEVEN((ABS([.A93])*10));(MOD((ABS([.A93])*10);1)&lt;=0.5));ROUNDDOWN(ABS([.A93]);1);ROUND(ABS([.A93]);1)))"/>
          <table:table-cell office:value-type="error" table:formula="of:=([.D93]-[.E93])"/>
          <table:table-cell office:value-type="error" table:formula="of:=IF(([.F93]&lt;&gt;0);&quot;ERROR&quot;;&quot;&quot;)"/>
        </table:table-row>
        <table:table-row>
          <table:table-cell office:value-type="float" office:value="0.32">
            <text:p>0.32</text:p>
          </table:table-cell>
          <table:table-cell office:value-type="error" table:formula="of:=ROUND([.A94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4])*IF(AND(ISEVEN((ABS([.A94])*10));(MOD((ABS([.A94])*10);1)&lt;=0.5));ROUNDDOWN(ABS([.A94]);1);ROUND(ABS([.A94]);1)))"/>
          <table:table-cell office:value-type="error" table:formula="of:=([.D94]-[.E94])"/>
          <table:table-cell office:value-type="error" table:formula="of:=IF(([.F94]&lt;&gt;0);&quot;ERROR&quot;;&quot;&quot;)"/>
        </table:table-row>
        <table:table-row>
          <table:table-cell office:value-type="float" office:value="0.33">
            <text:p>0.33</text:p>
          </table:table-cell>
          <table:table-cell office:value-type="error" table:formula="of:=ROUND([.A95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5])*IF(AND(ISEVEN((ABS([.A95])*10));(MOD((ABS([.A95])*10);1)&lt;=0.5));ROUNDDOWN(ABS([.A95]);1);ROUND(ABS([.A95]);1)))"/>
          <table:table-cell office:value-type="error" table:formula="of:=([.D95]-[.E95])"/>
          <table:table-cell office:value-type="error" table:formula="of:=IF(([.F95]&lt;&gt;0);&quot;ERROR&quot;;&quot;&quot;)"/>
        </table:table-row>
        <table:table-row>
          <table:table-cell office:value-type="float" office:value="0.34">
            <text:p>0.34</text:p>
          </table:table-cell>
          <table:table-cell office:value-type="error" table:formula="of:=ROUND([.A96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6])*IF(AND(ISEVEN((ABS([.A96])*10));(MOD((ABS([.A96])*10);1)&lt;=0.5));ROUNDDOWN(ABS([.A96]);1);ROUND(ABS([.A96]);1)))"/>
          <table:table-cell office:value-type="error" table:formula="of:=([.D96]-[.E96])"/>
          <table:table-cell office:value-type="error" table:formula="of:=IF(([.F96]&lt;&gt;0);&quot;ERROR&quot;;&quot;&quot;)"/>
        </table:table-row>
        <table:table-row>
          <table:table-cell office:value-type="float" office:value="0.35">
            <text:p>0.35</text:p>
          </table:table-cell>
          <table:table-cell office:value-type="error" table:formula="of:=ROUND([.A97];1)"/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error" table:formula="of:=(SIGN([.A97])*IF(AND(ISEVEN((ABS([.A97])*10));(MOD((ABS([.A97])*10);1)&lt;=0.5));ROUNDDOWN(ABS([.A97]);1);ROUND(ABS([.A97]);1)))"/>
          <table:table-cell office:value-type="error" table:formula="of:=([.D97]-[.E97])"/>
          <table:table-cell office:value-type="error" table:formula="of:=IF(([.F97]&lt;&gt;0);&quot;ERROR&quot;;&quot;&quot;)"/>
        </table:table-row>
        <table:table-row>
          <table:table-cell office:value-type="float" office:value="0.36">
            <text:p>0.36</text:p>
          </table:table-cell>
          <table:table-cell office:value-type="error" table:formula="of:=ROUND([.A98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98])*IF(AND(ISEVEN((ABS([.A98])*10));(MOD((ABS([.A98])*10);1)&lt;=0.5));ROUNDDOWN(ABS([.A98]);1);ROUND(ABS([.A98]);1)))"/>
          <table:table-cell office:value-type="error" table:formula="of:=([.D98]-[.E98])"/>
          <table:table-cell office:value-type="error" table:formula="of:=IF(([.F98]&lt;&gt;0);&quot;ERROR&quot;;&quot;&quot;)"/>
        </table:table-row>
        <table:table-row>
          <table:table-cell office:value-type="float" office:value="0.37">
            <text:p>0.37</text:p>
          </table:table-cell>
          <table:table-cell office:value-type="error" table:formula="of:=ROUND([.A99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99])*IF(AND(ISEVEN((ABS([.A99])*10));(MOD((ABS([.A99])*10);1)&lt;=0.5));ROUNDDOWN(ABS([.A99]);1);ROUND(ABS([.A99]);1)))"/>
          <table:table-cell office:value-type="error" table:formula="of:=([.D99]-[.E99])"/>
          <table:table-cell office:value-type="error" table:formula="of:=IF(([.F99]&lt;&gt;0);&quot;ERROR&quot;;&quot;&quot;)"/>
        </table:table-row>
        <table:table-row>
          <table:table-cell office:value-type="float" office:value="0.38">
            <text:p>0.38</text:p>
          </table:table-cell>
          <table:table-cell office:value-type="error" table:formula="of:=ROUND([.A100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0])*IF(AND(ISEVEN((ABS([.A100])*10));(MOD((ABS([.A100])*10);1)&lt;=0.5));ROUNDDOWN(ABS([.A100]);1);ROUND(ABS([.A100]);1)))"/>
          <table:table-cell office:value-type="error" table:formula="of:=([.D100]-[.E100])"/>
          <table:table-cell office:value-type="error" table:formula="of:=IF(([.F100]&lt;&gt;0);&quot;ERROR&quot;;&quot;&quot;)"/>
        </table:table-row>
        <table:table-row>
          <table:table-cell office:value-type="float" office:value="0.39">
            <text:p>0.39</text:p>
          </table:table-cell>
          <table:table-cell office:value-type="error" table:formula="of:=ROUND([.A101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1])*IF(AND(ISEVEN((ABS([.A101])*10));(MOD((ABS([.A101])*10);1)&lt;=0.5));ROUNDDOWN(ABS([.A101]);1);ROUND(ABS([.A101]);1)))"/>
          <table:table-cell office:value-type="error" table:formula="of:=([.D101]-[.E101])"/>
          <table:table-cell office:value-type="error" table:formula="of:=IF(([.F101]&lt;&gt;0);&quot;ERROR&quot;;&quot;&quot;)"/>
        </table:table-row>
        <table:table-row>
          <table:table-cell office:value-type="float" office:value="0.4">
            <text:p>0.4</text:p>
          </table:table-cell>
          <table:table-cell office:value-type="error" table:formula="of:=ROUND([.A102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2])*IF(AND(ISEVEN((ABS([.A102])*10));(MOD((ABS([.A102])*10);1)&lt;=0.5));ROUNDDOWN(ABS([.A102]);1);ROUND(ABS([.A102]);1)))"/>
          <table:table-cell office:value-type="error" table:formula="of:=([.D102]-[.E102])"/>
          <table:table-cell office:value-type="error" table:formula="of:=IF(([.F102]&lt;&gt;0);&quot;ERROR&quot;;&quot;&quot;)"/>
        </table:table-row>
        <table:table-row>
          <table:table-cell office:value-type="float" office:value="0.41">
            <text:p>0.41</text:p>
          </table:table-cell>
          <table:table-cell office:value-type="error" table:formula="of:=ROUND([.A103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3])*IF(AND(ISEVEN((ABS([.A103])*10));(MOD((ABS([.A103])*10);1)&lt;=0.5));ROUNDDOWN(ABS([.A103]);1);ROUND(ABS([.A103]);1)))"/>
          <table:table-cell office:value-type="error" table:formula="of:=([.D103]-[.E103])"/>
          <table:table-cell office:value-type="error" table:formula="of:=IF(([.F103]&lt;&gt;0);&quot;ERROR&quot;;&quot;&quot;)"/>
        </table:table-row>
        <table:table-row>
          <table:table-cell office:value-type="float" office:value="0.42">
            <text:p>0.42</text:p>
          </table:table-cell>
          <table:table-cell office:value-type="error" table:formula="of:=ROUND([.A104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4])*IF(AND(ISEVEN((ABS([.A104])*10));(MOD((ABS([.A104])*10);1)&lt;=0.5));ROUNDDOWN(ABS([.A104]);1);ROUND(ABS([.A104]);1)))"/>
          <table:table-cell office:value-type="error" table:formula="of:=([.D104]-[.E104])"/>
          <table:table-cell office:value-type="error" table:formula="of:=IF(([.F104]&lt;&gt;0);&quot;ERROR&quot;;&quot;&quot;)"/>
        </table:table-row>
        <table:table-row>
          <table:table-cell office:value-type="float" office:value="0.43">
            <text:p>0.43</text:p>
          </table:table-cell>
          <table:table-cell office:value-type="error" table:formula="of:=ROUND([.A105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5])*IF(AND(ISEVEN((ABS([.A105])*10));(MOD((ABS([.A105])*10);1)&lt;=0.5));ROUNDDOWN(ABS([.A105]);1);ROUND(ABS([.A105]);1)))"/>
          <table:table-cell office:value-type="error" table:formula="of:=([.D105]-[.E105])"/>
          <table:table-cell office:value-type="error" table:formula="of:=IF(([.F105]&lt;&gt;0);&quot;ERROR&quot;;&quot;&quot;)"/>
        </table:table-row>
        <table:table-row>
          <table:table-cell office:value-type="float" office:value="0.44">
            <text:p>0.44</text:p>
          </table:table-cell>
          <table:table-cell office:value-type="error" table:formula="of:=ROUND([.A106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6])*IF(AND(ISEVEN((ABS([.A106])*10));(MOD((ABS([.A106])*10);1)&lt;=0.5));ROUNDDOWN(ABS([.A106]);1);ROUND(ABS([.A106]);1)))"/>
          <table:table-cell office:value-type="error" table:formula="of:=([.D106]-[.E106])"/>
          <table:table-cell office:value-type="error" table:formula="of:=IF(([.F106]&lt;&gt;0);&quot;ERROR&quot;;&quot;&quot;)"/>
        </table:table-row>
        <table:table-row>
          <table:table-cell office:value-type="float" office:value="0.45">
            <text:p>0.45</text:p>
          </table:table-cell>
          <table:table-cell office:value-type="error" table:formula="of:=ROUND([.A107];1)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error" table:formula="of:=(SIGN([.A107])*IF(AND(ISEVEN((ABS([.A107])*10));(MOD((ABS([.A107])*10);1)&lt;=0.5));ROUNDDOWN(ABS([.A107]);1);ROUND(ABS([.A107]);1)))"/>
          <table:table-cell office:value-type="error" table:formula="of:=([.D107]-[.E107])"/>
          <table:table-cell office:value-type="error" table:formula="of:=IF(([.F107]&lt;&gt;0);&quot;ERROR&quot;;&quot;&quot;)"/>
        </table:table-row>
        <table:table-row>
          <table:table-cell office:value-type="float" office:value="0.46">
            <text:p>0.46</text:p>
          </table:table-cell>
          <table:table-cell office:value-type="error" table:formula="of:=ROUND([.A108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08])*IF(AND(ISEVEN((ABS([.A108])*10));(MOD((ABS([.A108])*10);1)&lt;=0.5));ROUNDDOWN(ABS([.A108]);1);ROUND(ABS([.A108]);1)))"/>
          <table:table-cell office:value-type="error" table:formula="of:=([.D108]-[.E108])"/>
          <table:table-cell office:value-type="error" table:formula="of:=IF(([.F108]&lt;&gt;0);&quot;ERROR&quot;;&quot;&quot;)"/>
        </table:table-row>
        <table:table-row>
          <table:table-cell office:value-type="float" office:value="0.47">
            <text:p>0.47</text:p>
          </table:table-cell>
          <table:table-cell office:value-type="error" table:formula="of:=ROUND([.A109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09])*IF(AND(ISEVEN((ABS([.A109])*10));(MOD((ABS([.A109])*10);1)&lt;=0.5));ROUNDDOWN(ABS([.A109]);1);ROUND(ABS([.A109]);1)))"/>
          <table:table-cell office:value-type="error" table:formula="of:=([.D109]-[.E109])"/>
          <table:table-cell office:value-type="error" table:formula="of:=IF(([.F109]&lt;&gt;0);&quot;ERROR&quot;;&quot;&quot;)"/>
        </table:table-row>
        <table:table-row>
          <table:table-cell office:value-type="float" office:value="0.48">
            <text:p>0.48</text:p>
          </table:table-cell>
          <table:table-cell office:value-type="error" table:formula="of:=ROUND([.A110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0])*IF(AND(ISEVEN((ABS([.A110])*10));(MOD((ABS([.A110])*10);1)&lt;=0.5));ROUNDDOWN(ABS([.A110]);1);ROUND(ABS([.A110]);1)))"/>
          <table:table-cell office:value-type="error" table:formula="of:=([.D110]-[.E110])"/>
          <table:table-cell office:value-type="error" table:formula="of:=IF(([.F110]&lt;&gt;0);&quot;ERROR&quot;;&quot;&quot;)"/>
        </table:table-row>
        <table:table-row>
          <table:table-cell office:value-type="float" office:value="0.49">
            <text:p>0.49</text:p>
          </table:table-cell>
          <table:table-cell office:value-type="error" table:formula="of:=ROUND([.A111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1])*IF(AND(ISEVEN((ABS([.A111])*10));(MOD((ABS([.A111])*10);1)&lt;=0.5));ROUNDDOWN(ABS([.A111]);1);ROUND(ABS([.A111]);1)))"/>
          <table:table-cell office:value-type="error" table:formula="of:=([.D111]-[.E111])"/>
          <table:table-cell office:value-type="error" table:formula="of:=IF(([.F111]&lt;&gt;0);&quot;ERROR&quot;;&quot;&quot;)"/>
        </table:table-row>
        <table:table-row>
          <table:table-cell office:value-type="float" office:value="0.5">
            <text:p>0.5</text:p>
          </table:table-cell>
          <table:table-cell office:value-type="error" table:formula="of:=ROUND([.A112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2])*IF(AND(ISEVEN((ABS([.A112])*10));(MOD((ABS([.A112])*10);1)&lt;=0.5));ROUNDDOWN(ABS([.A112]);1);ROUND(ABS([.A112]);1)))"/>
          <table:table-cell office:value-type="error" table:formula="of:=([.D112]-[.E112])"/>
          <table:table-cell office:value-type="error" table:formula="of:=IF(([.F112]&lt;&gt;0);&quot;ERROR&quot;;&quot;&quot;)"/>
        </table:table-row>
        <table:table-row>
          <table:table-cell office:value-type="float" office:value="0.51">
            <text:p>0.51</text:p>
          </table:table-cell>
          <table:table-cell office:value-type="error" table:formula="of:=ROUND([.A113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3])*IF(AND(ISEVEN((ABS([.A113])*10));(MOD((ABS([.A113])*10);1)&lt;=0.5));ROUNDDOWN(ABS([.A113]);1);ROUND(ABS([.A113]);1)))"/>
          <table:table-cell office:value-type="error" table:formula="of:=([.D113]-[.E113])"/>
          <table:table-cell office:value-type="error" table:formula="of:=IF(([.F113]&lt;&gt;0);&quot;ERROR&quot;;&quot;&quot;)"/>
        </table:table-row>
        <table:table-row>
          <table:table-cell office:value-type="float" office:value="0.52">
            <text:p>0.52</text:p>
          </table:table-cell>
          <table:table-cell office:value-type="error" table:formula="of:=ROUND([.A114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4])*IF(AND(ISEVEN((ABS([.A114])*10));(MOD((ABS([.A114])*10);1)&lt;=0.5));ROUNDDOWN(ABS([.A114]);1);ROUND(ABS([.A114]);1)))"/>
          <table:table-cell office:value-type="error" table:formula="of:=([.D114]-[.E114])"/>
          <table:table-cell office:value-type="error" table:formula="of:=IF(([.F114]&lt;&gt;0);&quot;ERROR&quot;;&quot;&quot;)"/>
        </table:table-row>
        <table:table-row>
          <table:table-cell office:value-type="float" office:value="0.53">
            <text:p>0.53</text:p>
          </table:table-cell>
          <table:table-cell office:value-type="error" table:formula="of:=ROUND([.A115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5])*IF(AND(ISEVEN((ABS([.A115])*10));(MOD((ABS([.A115])*10);1)&lt;=0.5));ROUNDDOWN(ABS([.A115]);1);ROUND(ABS([.A115]);1)))"/>
          <table:table-cell office:value-type="error" table:formula="of:=([.D115]-[.E115])"/>
          <table:table-cell office:value-type="error" table:formula="of:=IF(([.F115]&lt;&gt;0);&quot;ERROR&quot;;&quot;&quot;)"/>
        </table:table-row>
        <table:table-row>
          <table:table-cell office:value-type="float" office:value="0.54">
            <text:p>0.54</text:p>
          </table:table-cell>
          <table:table-cell office:value-type="error" table:formula="of:=ROUND([.A116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6])*IF(AND(ISEVEN((ABS([.A116])*10));(MOD((ABS([.A116])*10);1)&lt;=0.5));ROUNDDOWN(ABS([.A116]);1);ROUND(ABS([.A116]);1)))"/>
          <table:table-cell office:value-type="error" table:formula="of:=([.D116]-[.E116])"/>
          <table:table-cell office:value-type="error" table:formula="of:=IF(([.F116]&lt;&gt;0);&quot;ERROR&quot;;&quot;&quot;)"/>
        </table:table-row>
        <table:table-row>
          <table:table-cell office:value-type="float" office:value="0.55">
            <text:p>0.55</text:p>
          </table:table-cell>
          <table:table-cell office:value-type="error" table:formula="of:=ROUND([.A117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17])*IF(AND(ISEVEN((ABS([.A117])*10));(MOD((ABS([.A117])*10);1)&lt;=0.5));ROUNDDOWN(ABS([.A117]);1);ROUND(ABS([.A117]);1)))"/>
          <table:table-cell office:value-type="error" table:formula="of:=([.D117]-[.E117])"/>
          <table:table-cell office:value-type="error" table:formula="of:=IF(([.F117]&lt;&gt;0);&quot;ERROR&quot;;&quot;&quot;)"/>
        </table:table-row>
        <table:table-row>
          <table:table-cell office:value-type="float" office:value="0.56">
            <text:p>0.56</text:p>
          </table:table-cell>
          <table:table-cell office:value-type="error" table:formula="of:=ROUND([.A118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18])*IF(AND(ISEVEN((ABS([.A118])*10));(MOD((ABS([.A118])*10);1)&lt;=0.5));ROUNDDOWN(ABS([.A118]);1);ROUND(ABS([.A118]);1)))"/>
          <table:table-cell office:value-type="error" table:formula="of:=([.D118]-[.E118])"/>
          <table:table-cell office:value-type="error" table:formula="of:=IF(([.F118]&lt;&gt;0);&quot;ERROR&quot;;&quot;&quot;)"/>
        </table:table-row>
        <table:table-row>
          <table:table-cell office:value-type="float" office:value="0.57">
            <text:p>0.57</text:p>
          </table:table-cell>
          <table:table-cell office:value-type="error" table:formula="of:=ROUND([.A119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19])*IF(AND(ISEVEN((ABS([.A119])*10));(MOD((ABS([.A119])*10);1)&lt;=0.5));ROUNDDOWN(ABS([.A119]);1);ROUND(ABS([.A119]);1)))"/>
          <table:table-cell office:value-type="error" table:formula="of:=([.D119]-[.E119])"/>
          <table:table-cell office:value-type="error" table:formula="of:=IF(([.F119]&lt;&gt;0);&quot;ERROR&quot;;&quot;&quot;)"/>
        </table:table-row>
        <table:table-row>
          <table:table-cell office:value-type="float" office:value="0.58">
            <text:p>0.58</text:p>
          </table:table-cell>
          <table:table-cell office:value-type="error" table:formula="of:=ROUND([.A120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20])*IF(AND(ISEVEN((ABS([.A120])*10));(MOD((ABS([.A120])*10);1)&lt;=0.5));ROUNDDOWN(ABS([.A120]);1);ROUND(ABS([.A120]);1)))"/>
          <table:table-cell office:value-type="error" table:formula="of:=([.D120]-[.E120])"/>
          <table:table-cell office:value-type="error" table:formula="of:=IF(([.F120]&lt;&gt;0);&quot;ERROR&quot;;&quot;&quot;)"/>
        </table:table-row>
        <table:table-row>
          <table:table-cell office:value-type="float" office:value="0.59">
            <text:p>0.59</text:p>
          </table:table-cell>
          <table:table-cell office:value-type="error" table:formula="of:=ROUND([.A121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21])*IF(AND(ISEVEN((ABS([.A121])*10));(MOD((ABS([.A121])*10);1)&lt;=0.5));ROUNDDOWN(ABS([.A121]);1);ROUND(ABS([.A121]);1)))"/>
          <table:table-cell office:value-type="error" table:formula="of:=([.D121]-[.E121])"/>
          <table:table-cell office:value-type="error" table:formula="of:=IF(([.F121]&lt;&gt;0);&quot;ERROR&quot;;&quot;&quot;)"/>
        </table:table-row>
        <table:table-row>
          <table:table-cell office:value-type="float" office:value="0.6">
            <text:p>0.6</text:p>
          </table:table-cell>
          <table:table-cell office:value-type="error" table:formula="of:=ROUND([.A122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22])*IF(AND(ISEVEN((ABS([.A122])*10));(MOD((ABS([.A122])*10);1)&lt;=0.5));ROUNDDOWN(ABS([.A122]);1);ROUND(ABS([.A122]);1)))"/>
          <table:table-cell office:value-type="error" table:formula="of:=([.D122]-[.E122])"/>
          <table:table-cell office:value-type="error" table:formula="of:=IF(([.F122]&lt;&gt;0);&quot;ERROR&quot;;&quot;&quot;)"/>
        </table:table-row>
      </table:table>
      <table:table table:name="Data table">
        <table:table-column/>
        <table:table-column/>
        <table:table-column/>
        <table:table-column/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Brown Skunk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Yellow Skunk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Pink Turd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Brown Flamingo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Brown Bear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Brown Flamingo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Pink Flamingo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Brown Skunk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Ugly Turd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Ugly Turd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Pink Turd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Yellow Flamingo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Fast Bear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Pink Flamingo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Brown Turd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Yellow Flamingo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Brown Skunk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Brown Flamingo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Brown Skunk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Fast Skunk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Pink Flamingo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Pink Bear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Yellow Skunk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Ugly Bear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Brown Turd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Pink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Ugly Turd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Brown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Pink Skunk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Yellow Flamingo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Ugly Turd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Ugly Bear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Ugly Skunk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Yellow Flamingo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Ugly Turd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Brown Flamingo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Brown Skunk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Yellow Bear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Ugly Skunk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Yellow Bear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Fast Skunk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Yellow Bear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Ugly Bear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Brown Flamingo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Yellow Bear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Ugly Bear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Yellow Turd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Yellow Turd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Yellow Turd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Yellow Bear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Brown Turd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Ugly Skunk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Brown Skunk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Pink Turd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Pink Flamingo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Fast Skunk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Brown Bear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Fast Bear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Ugly Flamingo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Pink Skunk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Fast Flamingo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Brown Bear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Yellow Turd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Yellow Skunk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Yellow Bear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Ugly Skunk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Yellow Skunk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Fast Bear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Ugly Bear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Fast Turd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Yellow Flamingo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Yellow Bear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Yellow Bear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Fast Flamingo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Fast Bear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Yellow Skunk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Yellow Bear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Yellow Turd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Pink Bear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Pink Turd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Fast Turd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Pink Turd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Fast Flamingo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Brown Bear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Yellow Bear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Fast Skunk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Ugly Turd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41">
            <text:p>41</text:p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 unless no data:</text:p>
          </table:table-cell>
          <table:table-cell office:value-type="error" table:formula="of:=IF((SUBTOTAL(102;[.D2:.D101])&gt;0);SUBTOTAL(101;[.D2:.D101]);&quot;&quot;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:</text:p>
          </table:table-cell>
          <table:table-cell office:value-type="error" table:formula="of:=SUBTOTAL(101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m:</text:p>
          </table:table-cell>
          <table:table-cell office:value-type="error" table:formula="of:=SUBTOTAL(109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:</text:p>
          </table:table-cell>
          <table:table-cell office:value-type="error" table:formula="of:=SUBTOTAL(105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:</text:p>
          </table:table-cell>
          <table:table-cell office:value-type="error" table:formula="of:=SUBTOTAL(104;[.D2:.D101])"/>
        </table:table-row>
      </table:table>
      <table:database-ranges>
        <table:database-range table:name="__datatbl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4">
  <office:styles>
    <style:style style:name="glbl0" style:display-name="glbl0" style:family="table-cell">
      <style:table-cell-properties fo:background-color="#ff0000"/>
      <style:text-properties/>
    </style:style>
    <style:style style:name="glbl1" style:display-name="glbl1" style:family="table-cell">
      <style:table-cell-properties fo:background-color="#0000ff"/>
      <style:text-properties/>
    </style:style>
    <style:style style:name="glbl2" style:display-name="glbl2" style:family="table-cell">
      <style:table-cell-properties fo:background-color="#00ff00"/>
      <style:text-properties/>
    </style:style>
    <style:style style:name="glbl3" style:display-name="glbl3" style:family="table-cell">
      <style:table-cell-properties fo:background-color="#00ffff"/>
      <style:text-properties/>
    </style:style>
    <style:style style:name="glbl4" style:display-name="glbl4" style:family="table-cell">
      <style:table-cell-properties fo:background-color="#dbd8c4"/>
      <style:text-properties/>
    </style:style>
    <style:style style:name="glbl5" style:display-name="glbl5" style:family="table-cell">
      <style:table-cell-properties fo:background-color="#ed1c24"/>
      <style:text-properties/>
    </style:style>
    <style:style style:name="glbl6" style:display-name="glbl6" style:family="table-cell">
      <style:table-cell-properties fo:background-color="#f44336"/>
      <style:text-properties/>
    </style:style>
    <style:style style:name="glbl7" style:display-name="glbl7" style:family="table-cell">
      <style:table-cell-properties fo:background-color="#4caf50"/>
      <style:text-properties/>
    </style:style>
    <style:style style:name="glbl8" style:display-name="glbl8" style:family="table-cell">
      <style:table-cell-properties fo:background-color="#000000"/>
      <style:text-properties/>
    </style:style>
    <style:style style:name="glbl9" style:display-name="glbl9" style:family="table-cell">
      <style:table-cell-properties fo:background-color="#ede7f6"/>
      <style:text-properties/>
    </style:style>
    <number:number-style style:name="auto10">
      <number:number number:decimal-places="1" number:min-decimal-places="1" number:min-integer-digits="1"/>
    </number:number-style>
    <number:number-style style:name="auto12">
      <number:number number:decimal-places="3" number:min-decimal-places="3" number:min-integer-digits="1"/>
    </number:number-style>
    <number:percentage-style style:name="auto14">
      <number:number number:decimal-places="1" number:min-decimal-places="1" number:min-integer-digits="1"/>
      <number:text> %</number:text>
    </number:percentage-style>
    <number:percentage-style style:name="auto16">
      <number:number number:decimal-places="2" number:min-decimal-places="2" number:min-integer-digits="1"/>
      <number:text> %</number:text>
    </number:percentage-style>
    <number:number-style style:name="auto40">
      <number:number number:decimal-places="0" number:min-decimal-places="0" number:min-integer-digits="1"/>
    </number:number-style>
    <number:number-style style:name="auto42">
      <number:number number:decimal-places="2" number:min-decimal-places="2" number:min-integer-digits="1"/>
    </number:number-style>
    <number:number-style style:name="auto44">
      <number:number number:decimal-places="4" number:min-decimal-places="4" number:min-integer-digits="1"/>
    </number:number-style>
    <number:number-style style:name="auto46">
      <number:number number:decimal-places="5" number:min-decimal-places="5" number:min-integer-digits="1"/>
    </number:number-style>
    <number:percentage-style style:name="auto48">
      <number:number number:decimal-places="0" number:min-decimal-places="0" number:min-integer-digits="1"/>
      <number:text> %</number:text>
    </number:percentage-style>
    <number:date-style style:name="auto50" number:automatic-order="true" number:format-source="languag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auto52" number:automatic-order="true" number:format-source="languag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https://github.com/johndoe31415/odsexport v0.0.6rc0</meta:generator>
    <meta:creation-date>2026-07-15T13:41:27</meta:creation-date>
    <dc:date>2026-07-15T13:41:27</dc:date>
  </office:meta>
</office:document-meta>
</file>