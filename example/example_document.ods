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font-face-decls>
    <style:font-face style:name="Arial" svg:font-family="'Arial'"/>
  </office:font-face-decls>
  <office:automatic-styles>
    <style:style style:name="cond0" style:display-name="cond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" style:display-name="cond1" style:family="table-cell">
      <style:map style:apply-style-name="glbl0" style:condition="is-true-formula(['Conditional Formatting'.$A1]&lt;16)" style:base-cell-address="'Conditional Formatting'.B1"/>
      <style:map style:apply-style-name="glbl1" style:condition="is-true-formula(['Conditional Formatting'.$A1]&lt;32)" style:base-cell-address="'Conditional Formatting'.B1"/>
    </style:style>
    <style:style style:name="cond2" style:display-name="cond2" style:family="table-cell">
      <style:map style:apply-style-name="glbl0" style:condition="is-true-formula(['Conditional Formatting'.$A1]&lt;8)" style:base-cell-address="'Conditional Formatting'.C1"/>
      <style:map style:apply-style-name="glbl2" style:condition="is-true-formula(['Conditional Formatting'.$A1]&lt;16)" style:base-cell-address="'Conditional Formatting'.C1"/>
      <style:map style:apply-style-name="glbl1" style:condition="is-true-formula(['Conditional Formatting'.$A1]&lt;24)" style:base-cell-address="'Conditional Formatting'.C1"/>
      <style:map style:apply-style-name="glbl3" style:condition="is-true-formula(['Conditional Formatting'.$A1]&lt;32)" style:base-cell-address="'Conditional Formatting'.C1"/>
    </style:style>
    <style:style style:name="auto4" style:display-name="auto4" style:family="table-cell">
      <style:paragraph-properties fo:text-align="start"/>
      <style:table-cell-properties style:rotation-angle="45"/>
      <style:text-properties style:font-name="Arial" fo:font-size="9pt" fo:font-weight="bold" fo:font-style="italic"/>
    </style:style>
    <style:style style:name="auto5" style:display-name="auto5" style:family="table-cell">
      <style:text-properties fo:font-weight="bold"/>
    </style:style>
    <style:style style:name="auto6" style:display-name="auto6" style:family="table-cell">
      <style:text-properties fo:font-style="italic"/>
    </style:style>
    <style:style style:name="auto7" style:display-name="auto7" style:family="table-cell">
      <style:paragraph-properties fo:text-align="start"/>
      <style:text-properties/>
    </style:style>
    <style:style style:name="auto8" style:display-name="auto8" style:family="table-cell">
      <style:paragraph-properties fo:text-align="center"/>
      <style:text-properties/>
    </style:style>
    <style:style style:name="auto9" style:display-name="auto9" style:family="table-cell">
      <style:paragraph-properties fo:text-align="end"/>
      <style:text-properties/>
    </style:style>
    <style:style style:name="auto10" style:display-name="auto10" style:family="table-cell">
      <style:text-properties fo:color="#0000ff"/>
    </style:style>
    <style:style style:name="auto11" style:display-name="auto11" style:family="table-cell">
      <style:table-cell-properties fo:background-color="#aaaaff"/>
      <style:text-properties/>
    </style:style>
    <style:style style:name="auto12" style:display-name="auto12" style:family="table-cell">
      <style:table-cell-properties fo:border-top="0.7500pt solid #ff0000" fo:border-left="0.7500pt solid #ff0000"/>
      <style:text-properties/>
    </style:style>
    <style:style style:name="auto13" style:display-name="auto13" style:family="table-cell">
      <style:table-cell-properties fo:border-top="0.7500pt solid #ff0000"/>
      <style:text-properties/>
    </style:style>
    <style:style style:name="auto14" style:display-name="auto14" style:family="table-cell">
      <style:table-cell-properties fo:border-top="0.7500pt solid #ff0000" fo:border-right="0.7500pt solid #ff0000"/>
      <style:text-properties/>
    </style:style>
    <style:style style:name="auto15" style:display-name="auto15" style:family="table-cell">
      <style:table-cell-properties fo:border-left="0.7500pt solid #ff0000"/>
      <style:text-properties/>
    </style:style>
    <style:style style:name="auto16" style:display-name="auto16" style:family="table-cell">
      <style:table-cell-properties fo:border-right="0.7500pt solid #ff0000"/>
      <style:text-properties/>
    </style:style>
    <style:style style:name="auto17" style:display-name="auto17" style:family="table-cell">
      <style:table-cell-properties fo:border-bottom="0.7500pt solid #ff0000" fo:border-left="0.7500pt solid #ff0000"/>
      <style:text-properties/>
    </style:style>
    <style:style style:name="auto18" style:display-name="auto18" style:family="table-cell">
      <style:table-cell-properties fo:border-bottom="0.7500pt solid #ff0000"/>
      <style:text-properties/>
    </style:style>
    <style:style style:name="auto19" style:display-name="auto19" style:family="table-cell">
      <style:table-cell-properties fo:wrap-option="wrap" fo:border-bottom="0.7500pt solid #ff0000" fo:border-right="0.7500pt solid #ff0000"/>
      <style:text-properties/>
    </style:style>
    <style:style style:name="auto20" style:display-name="auto20" style:family="table-row">
      <style:table-row-properties style:row-height="1cm"/>
    </style:style>
    <style:style style:name="auto21" style:display-name="auto21" style:family="table-cell">
      <style:table-cell-properties style:vertical-align="middle"/>
      <style:text-properties/>
    </style:style>
    <style:style style:name="auto22" style:display-name="auto22" style:family="table-row">
      <style:table-row-properties style:row-height="2cm"/>
    </style:style>
    <style:style style:name="auto23" style:display-name="auto23" style:family="table-column">
      <style:table-column-properties style:column-width="4cm"/>
    </style:style>
    <style:style style:name="auto24" style:display-name="auto24" style:family="table-column">
      <style:table-column-properties style:column-width="5cm"/>
    </style:style>
    <style:style style:name="auto25" style:display-name="auto25" style:family="table-cell" style:data-style-name="auto26">
      <style:text-properties/>
    </style:style>
    <style:style style:name="auto27" style:display-name="auto27" style:family="table-cell" style:data-style-name="auto28">
      <style:text-properties/>
    </style:style>
    <style:style style:name="auto29" style:display-name="auto29" style:family="table-cell" style:data-style-name="auto30">
      <style:text-properties/>
    </style:style>
    <style:style style:name="auto31" style:display-name="auto31" style:family="table-cell" style:data-style-name="auto32">
      <style:text-properties/>
    </style:style>
    <style:style style:name="auto33" style:display-name="auto33" style:family="table-cell" style:data-style-name="auto34">
      <style:text-properties/>
    </style:style>
    <style:style style:name="auto35" style:display-name="auto35" style:family="table-cell" style:data-style-name="auto36">
      <style:text-properties/>
    </style:style>
    <style:style style:name="auto37" style:display-name="auto37" style:family="table-cell" style:data-style-name="auto38">
      <style:text-properties/>
    </style:style>
    <style:style style:name="auto39" style:display-name="auto39" style:family="table-cell" style:data-style-name="auto40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olumn">
      <style:table-column-properties style:column-width="3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4" office:value-type="string">
            <text:p>Rotated Arial</text:p>
          </table:table-cell>
          <table:table-cell table:style-name="auto5" office:value-type="string">
            <text:p>Bold only</text:p>
          </table:table-cell>
          <table:table-cell table:style-name="auto6" office:value-type="string">
            <text:p>Italics only</text:p>
          </table:table-cell>
          <table:table-cell table:style-name="auto7" office:value-type="string">
            <text:p>Left adjust</text:p>
          </table:table-cell>
          <table:table-cell table:style-name="auto8" office:value-type="string">
            <text:p>Centered</text:p>
          </table:table-cell>
          <table:table-cell table:style-name="auto9" office:value-type="string">
            <text:p>Right adjust</text:p>
          </table:table-cell>
          <table:table-cell table:style-name="auto10" office:value-type="string">
            <text:p>Blue text</text:p>
          </table:table-cell>
          <table:table-cell table:style-name="auto11" office:value-type="string">
            <text:p>Blue background</text:p>
          </table:table-cell>
          <table:table-cell/>
          <table:table-cell/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2" office:value-type="string">
            <text:p>Top left corner of red box</text:p>
          </table:table-cell>
          <table:table-cell table:style-name="auto13"/>
          <table:table-cell table:style-name="auto13"/>
          <table:table-cell table:style-name="auto13"/>
          <table:table-cell table:style-name="auto13"/>
          <table:table-cell table:style-name="auto1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5"/>
          <table:table-cell/>
          <table:table-cell/>
          <table:table-cell/>
          <table:table-cell/>
          <table:table-cell table:style-name="auto1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7"/>
          <table:table-cell table:style-name="auto18"/>
          <table:table-cell table:style-name="auto18"/>
          <table:table-cell table:style-name="auto18"/>
          <table:table-cell table:style-name="auto18"/>
          <table:table-cell table:style-name="auto19" office:value-type="string">
            <text:p>Bottom right corner of red box with wrapped text as well because the content in here is so long</text:p>
          </table:table-cell>
          <table:table-cell/>
          <table:table-cell/>
          <table:table-cell office:value-type="string">
            <text:p>This is K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This is AB5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low here is a row that is hidden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visibility="collapse">
          <table:table-cell office:value-type="string">
            <text:p>I'm hidden!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bove this row is a row that is hidden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auto20">
          <table:table-cell table:style-name="auto21" office:value-type="string">
            <text:p>This row is exactly 1cm in height and text is vertically cen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auto22">
          <table:table-cell table:style-name="auto21" office:value-type="string">
            <text:p>This row is exactly 2cm in height and text is vertically cen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Formulas">
        <table:table-column table:style-name="auto23"/>
        <table:table-column table:style-name="auto24"/>
        <table:table-row>
          <table:table-cell table:style-name="auto5" office:value-type="string">
            <text:p>Imported value:</text:p>
          </table:table-cell>
          <table:table-cell table:formula="of:=['Formatting'.B15]" calcext:value-type="float"/>
        </table:table-row>
        <table:table-row>
          <table:table-cell table:style-name="auto5" office:value-type="string">
            <text:p>Computed value 1:</text:p>
          </table:table-cell>
          <table:table-cell table:formula="of:=([.B1]*2/3) + 123 + Pi()" calcext:value-type="float"/>
        </table:table-row>
        <table:table-row>
          <table:table-cell table:style-name="auto5" office:value-type="string">
            <text:p>Computed value 2:</text:p>
          </table:table-cell>
          <table:table-cell table:formula="of:=[.B2]/300" calcext:value-type="float"/>
        </table:table-row>
        <table:table-row>
          <table:table-cell table:style-name="auto5" office:value-type="string">
            <text:p>Rounded with 0 digits:</text:p>
          </table:table-cell>
          <table:table-cell table:style-name="auto25" table:formula="of:=[.B2]" calcext:value-type="float"/>
        </table:table-row>
        <table:table-row>
          <table:table-cell table:style-name="auto5" office:value-type="string">
            <text:p>Rounded with 1 digits:</text:p>
          </table:table-cell>
          <table:table-cell table:style-name="auto27" table:formula="of:=[.B2]" calcext:value-type="float"/>
        </table:table-row>
        <table:table-row>
          <table:table-cell table:style-name="auto5" office:value-type="string">
            <text:p>Rounded with 2 digits:</text:p>
          </table:table-cell>
          <table:table-cell table:style-name="auto29" table:formula="of:=[.B2]" calcext:value-type="float"/>
        </table:table-row>
        <table:table-row>
          <table:table-cell table:style-name="auto5" office:value-type="string">
            <text:p>Rounded with 3 digits:</text:p>
          </table:table-cell>
          <table:table-cell table:style-name="auto31" table:formula="of:=[.B2]" calcext:value-type="float"/>
        </table:table-row>
        <table:table-row>
          <table:table-cell table:style-name="auto5" office:value-type="string">
            <text:p>Rounded with 4 digits:</text:p>
          </table:table-cell>
          <table:table-cell table:style-name="auto33" table:formula="of:=[.B2]" calcext:value-type="float"/>
        </table:table-row>
        <table:table-row>
          <table:table-cell table:style-name="auto5" office:value-type="string">
            <text:p>Rounded with 5 digits:</text:p>
          </table:table-cell>
          <table:table-cell table:style-name="auto35" table:formula="of:=[.B2]" calcext:value-type="float"/>
        </table:table-row>
        <table:table-row>
          <table:table-cell table:style-name="auto5" office:value-type="string">
            <text:p>Percent with 0 digits:</text:p>
          </table:table-cell>
          <table:table-cell table:style-name="auto37" table:formula="of:=[.B3]" calcext:value-type="float"/>
        </table:table-row>
        <table:table-row>
          <table:table-cell table:style-name="auto5" office:value-type="string">
            <text:p>Percent with 1 digits:</text:p>
          </table:table-cell>
          <table:table-cell table:style-name="auto39" table:formula="of:=[.B3]" calcext:value-type="float"/>
        </table:table-row>
        <table:table-row>
          <table:table-cell table:style-name="auto5" office:value-type="string">
            <text:p>Percent with 2 digits:</text:p>
          </table:table-cell>
          <table:table-cell table:style-name="auto41" table:formula="of:=[.B3]" calcext:value-type="float"/>
        </table:table-row>
        <table:table-row>
          <table:table-cell table:style-name="auto5" office:value-type="string">
            <text:p>Datetime as ISO:</text:p>
          </table:table-cell>
          <table:table-cell table:style-name="auto43" office:value-type="date" calcext:value-type="date" office:date-value="2026-05-22T11:30:03"/>
        </table:table-row>
        <table:table-row>
          <table:table-cell table:style-name="auto5" office:value-type="string">
            <text:p>Datetime as German:</text:p>
          </table:table-cell>
          <table:table-cell table:style-name="auto45" office:value-type="date" calcext:value-type="date" office:date-value="2026-05-22T11:30:03"/>
        </table:table-row>
      </table:table>
      <table:table table:name="Conditional Formatting">
        <table:table-column/>
        <table:table-column table:style-name="auto47"/>
        <table:table-column table:style-name="auto23"/>
        <table:table-row>
          <table:table-cell table:style-name="cond0" office:value-type="float" office:value="0">
            <text:p>0</text:p>
          </table:table-cell>
          <table:table-cell table:style-name="cond1" office:value-type="string">
            <text:p>Hexvalue 0x00</text:p>
          </table:table-cell>
          <table:table-cell table:style-name="cond2" office:value-type="string">
            <text:p>Octvalue 0o000000</text:p>
          </table:table-cell>
        </table:table-row>
        <table:table-row>
          <table:table-cell table:style-name="cond0" office:value-type="float" office:value="1">
            <text:p>1</text:p>
          </table:table-cell>
          <table:table-cell table:style-name="cond1" office:value-type="string">
            <text:p>Hexvalue 0x01</text:p>
          </table:table-cell>
          <table:table-cell table:style-name="cond2" office:value-type="string">
            <text:p>Octvalue 0o000001</text:p>
          </table:table-cell>
        </table:table-row>
        <table:table-row>
          <table:table-cell table:style-name="cond0" office:value-type="float" office:value="2">
            <text:p>2</text:p>
          </table:table-cell>
          <table:table-cell table:style-name="cond1" office:value-type="string">
            <text:p>Hexvalue 0x02</text:p>
          </table:table-cell>
          <table:table-cell table:style-name="cond2" office:value-type="string">
            <text:p>Octvalue 0o000002</text:p>
          </table:table-cell>
        </table:table-row>
        <table:table-row>
          <table:table-cell table:style-name="cond0" office:value-type="float" office:value="3">
            <text:p>3</text:p>
          </table:table-cell>
          <table:table-cell table:style-name="cond1" office:value-type="string">
            <text:p>Hexvalue 0x03</text:p>
          </table:table-cell>
          <table:table-cell table:style-name="cond2" office:value-type="string">
            <text:p>Octvalue 0o000003</text:p>
          </table:table-cell>
        </table:table-row>
        <table:table-row>
          <table:table-cell table:style-name="cond0" office:value-type="float" office:value="4">
            <text:p>4</text:p>
          </table:table-cell>
          <table:table-cell table:style-name="cond1" office:value-type="string">
            <text:p>Hexvalue 0x04</text:p>
          </table:table-cell>
          <table:table-cell table:style-name="cond2" office:value-type="string">
            <text:p>Octvalue 0o000004</text:p>
          </table:table-cell>
        </table:table-row>
        <table:table-row>
          <table:table-cell table:style-name="cond0" office:value-type="float" office:value="5">
            <text:p>5</text:p>
          </table:table-cell>
          <table:table-cell table:style-name="cond1" office:value-type="string">
            <text:p>Hexvalue 0x05</text:p>
          </table:table-cell>
          <table:table-cell table:style-name="cond2" office:value-type="string">
            <text:p>Octvalue 0o000005</text:p>
          </table:table-cell>
        </table:table-row>
        <table:table-row>
          <table:table-cell table:style-name="cond0" office:value-type="float" office:value="6">
            <text:p>6</text:p>
          </table:table-cell>
          <table:table-cell table:style-name="cond1" office:value-type="string">
            <text:p>Hexvalue 0x06</text:p>
          </table:table-cell>
          <table:table-cell table:style-name="cond2" office:value-type="string">
            <text:p>Octvalue 0o000006</text:p>
          </table:table-cell>
        </table:table-row>
        <table:table-row>
          <table:table-cell table:style-name="cond0" office:value-type="float" office:value="7">
            <text:p>7</text:p>
          </table:table-cell>
          <table:table-cell table:style-name="cond1" office:value-type="string">
            <text:p>Hexvalue 0x07</text:p>
          </table:table-cell>
          <table:table-cell table:style-name="cond2" office:value-type="string">
            <text:p>Octvalue 0o000007</text:p>
          </table:table-cell>
        </table:table-row>
        <table:table-row>
          <table:table-cell table:style-name="cond0" office:value-type="float" office:value="8">
            <text:p>8</text:p>
          </table:table-cell>
          <table:table-cell table:style-name="cond1" office:value-type="string">
            <text:p>Hexvalue 0x08</text:p>
          </table:table-cell>
          <table:table-cell table:style-name="cond2" office:value-type="string">
            <text:p>Octvalue 0o000010</text:p>
          </table:table-cell>
        </table:table-row>
        <table:table-row>
          <table:table-cell table:style-name="cond0" office:value-type="float" office:value="9">
            <text:p>9</text:p>
          </table:table-cell>
          <table:table-cell table:style-name="cond1" office:value-type="string">
            <text:p>Hexvalue 0x09</text:p>
          </table:table-cell>
          <table:table-cell table:style-name="cond2" office:value-type="string">
            <text:p>Octvalue 0o000011</text:p>
          </table:table-cell>
        </table:table-row>
        <table:table-row>
          <table:table-cell table:style-name="cond0" office:value-type="float" office:value="10">
            <text:p>10</text:p>
          </table:table-cell>
          <table:table-cell table:style-name="cond1" office:value-type="string">
            <text:p>Hexvalue 0x0a</text:p>
          </table:table-cell>
          <table:table-cell table:style-name="cond2" office:value-type="string">
            <text:p>Octvalue 0o000012</text:p>
          </table:table-cell>
        </table:table-row>
        <table:table-row>
          <table:table-cell table:style-name="cond0" office:value-type="float" office:value="11">
            <text:p>11</text:p>
          </table:table-cell>
          <table:table-cell table:style-name="cond1" office:value-type="string">
            <text:p>Hexvalue 0x0b</text:p>
          </table:table-cell>
          <table:table-cell table:style-name="cond2" office:value-type="string">
            <text:p>Octvalue 0o000013</text:p>
          </table:table-cell>
        </table:table-row>
        <table:table-row>
          <table:table-cell table:style-name="cond0" office:value-type="float" office:value="12">
            <text:p>12</text:p>
          </table:table-cell>
          <table:table-cell table:style-name="cond1" office:value-type="string">
            <text:p>Hexvalue 0x0c</text:p>
          </table:table-cell>
          <table:table-cell table:style-name="cond2" office:value-type="string">
            <text:p>Octvalue 0o000014</text:p>
          </table:table-cell>
        </table:table-row>
        <table:table-row>
          <table:table-cell table:style-name="cond0" office:value-type="float" office:value="13">
            <text:p>13</text:p>
          </table:table-cell>
          <table:table-cell table:style-name="cond1" office:value-type="string">
            <text:p>Hexvalue 0x0d</text:p>
          </table:table-cell>
          <table:table-cell table:style-name="cond2" office:value-type="string">
            <text:p>Octvalue 0o000015</text:p>
          </table:table-cell>
        </table:table-row>
        <table:table-row>
          <table:table-cell table:style-name="cond0" office:value-type="float" office:value="14">
            <text:p>14</text:p>
          </table:table-cell>
          <table:table-cell table:style-name="cond1" office:value-type="string">
            <text:p>Hexvalue 0x0e</text:p>
          </table:table-cell>
          <table:table-cell table:style-name="cond2" office:value-type="string">
            <text:p>Octvalue 0o000016</text:p>
          </table:table-cell>
        </table:table-row>
        <table:table-row>
          <table:table-cell table:style-name="cond0" office:value-type="float" office:value="15">
            <text:p>15</text:p>
          </table:table-cell>
          <table:table-cell table:style-name="cond1" office:value-type="string">
            <text:p>Hexvalue 0x0f</text:p>
          </table:table-cell>
          <table:table-cell table:style-name="cond2" office:value-type="string">
            <text:p>Octvalue 0o000017</text:p>
          </table:table-cell>
        </table:table-row>
        <table:table-row>
          <table:table-cell table:style-name="cond0" office:value-type="float" office:value="16">
            <text:p>16</text:p>
          </table:table-cell>
          <table:table-cell table:style-name="cond1" office:value-type="string">
            <text:p>Hexvalue 0x10</text:p>
          </table:table-cell>
          <table:table-cell table:style-name="cond2" office:value-type="string">
            <text:p>Octvalue 0o000020</text:p>
          </table:table-cell>
        </table:table-row>
        <table:table-row>
          <table:table-cell table:style-name="cond0" office:value-type="float" office:value="17">
            <text:p>17</text:p>
          </table:table-cell>
          <table:table-cell table:style-name="cond1" office:value-type="string">
            <text:p>Hexvalue 0x11</text:p>
          </table:table-cell>
          <table:table-cell table:style-name="cond2" office:value-type="string">
            <text:p>Octvalue 0o000021</text:p>
          </table:table-cell>
        </table:table-row>
        <table:table-row>
          <table:table-cell table:style-name="cond0" office:value-type="float" office:value="18">
            <text:p>18</text:p>
          </table:table-cell>
          <table:table-cell table:style-name="cond1" office:value-type="string">
            <text:p>Hexvalue 0x12</text:p>
          </table:table-cell>
          <table:table-cell table:style-name="cond2" office:value-type="string">
            <text:p>Octvalue 0o000022</text:p>
          </table:table-cell>
        </table:table-row>
        <table:table-row>
          <table:table-cell table:style-name="cond0" office:value-type="float" office:value="19">
            <text:p>19</text:p>
          </table:table-cell>
          <table:table-cell table:style-name="cond1" office:value-type="string">
            <text:p>Hexvalue 0x13</text:p>
          </table:table-cell>
          <table:table-cell table:style-name="cond2" office:value-type="string">
            <text:p>Octvalue 0o000023</text:p>
          </table:table-cell>
        </table:table-row>
        <table:table-row>
          <table:table-cell table:style-name="cond0" office:value-type="float" office:value="20">
            <text:p>20</text:p>
          </table:table-cell>
          <table:table-cell table:style-name="cond1" office:value-type="string">
            <text:p>Hexvalue 0x14</text:p>
          </table:table-cell>
          <table:table-cell table:style-name="cond2" office:value-type="string">
            <text:p>Octvalue 0o000024</text:p>
          </table:table-cell>
        </table:table-row>
        <table:table-row>
          <table:table-cell table:style-name="cond0" office:value-type="float" office:value="21">
            <text:p>21</text:p>
          </table:table-cell>
          <table:table-cell table:style-name="cond1" office:value-type="string">
            <text:p>Hexvalue 0x15</text:p>
          </table:table-cell>
          <table:table-cell table:style-name="cond2" office:value-type="string">
            <text:p>Octvalue 0o000025</text:p>
          </table:table-cell>
        </table:table-row>
        <table:table-row>
          <table:table-cell table:style-name="cond0" office:value-type="float" office:value="22">
            <text:p>22</text:p>
          </table:table-cell>
          <table:table-cell table:style-name="cond1" office:value-type="string">
            <text:p>Hexvalue 0x16</text:p>
          </table:table-cell>
          <table:table-cell table:style-name="cond2" office:value-type="string">
            <text:p>Octvalue 0o000026</text:p>
          </table:table-cell>
        </table:table-row>
        <table:table-row>
          <table:table-cell table:style-name="cond0" office:value-type="float" office:value="23">
            <text:p>23</text:p>
          </table:table-cell>
          <table:table-cell table:style-name="cond1" office:value-type="string">
            <text:p>Hexvalue 0x17</text:p>
          </table:table-cell>
          <table:table-cell table:style-name="cond2" office:value-type="string">
            <text:p>Octvalue 0o000027</text:p>
          </table:table-cell>
        </table:table-row>
        <table:table-row>
          <table:table-cell table:style-name="cond0" office:value-type="float" office:value="24">
            <text:p>24</text:p>
          </table:table-cell>
          <table:table-cell table:style-name="cond1" office:value-type="string">
            <text:p>Hexvalue 0x18</text:p>
          </table:table-cell>
          <table:table-cell table:style-name="cond2" office:value-type="string">
            <text:p>Octvalue 0o000030</text:p>
          </table:table-cell>
        </table:table-row>
        <calcext:conditional-formats>
          <calcext:conditional-format calcext:target-range-address="'Conditional Formatting'.A1:'Conditional Formatting'.A25">
            <calcext:condition calcext:apply-style-name="glbl0" calcext:value="&lt;10" calcext:base-cell-address="'Conditional Formatting'.A1"/>
            <calcext:condition calcext:apply-style-name="glbl1" calcext:value="&lt;20" calcext:base-cell-address="'Conditional Formatting'.A1"/>
            <calcext:condition calcext:apply-style-name="glbl2" calcext:value="&lt;30" calcext:base-cell-address="'Conditional Formatting'.A1"/>
          </calcext:conditional-format>
          <calcext:conditional-format calcext:target-range-address="'Conditional Formatting'.B1:'Conditional Formatting'.B25">
            <calcext:condition calcext:apply-style-name="glbl0" calcext:value="formula-is(['Conditional Formatting'.$A1]&lt;16)" calcext:base-cell-address="'Conditional Formatting'.B1"/>
            <calcext:condition calcext:apply-style-name="glbl1" calcext:value="formula-is(['Conditional Formatting'.$A1]&lt;32)" calcext:base-cell-address="'Conditional Formatting'.B1"/>
          </calcext:conditional-format>
          <calcext:conditional-format calcext:target-range-address="'Conditional Formatting'.C1:'Conditional Formatting'.C25">
            <calcext:condition calcext:apply-style-name="glbl0" calcext:value="formula-is(['Conditional Formatting'.$A1]&lt;8)" calcext:base-cell-address="'Conditional Formatting'.C1"/>
            <calcext:condition calcext:apply-style-name="glbl2" calcext:value="formula-is(['Conditional Formatting'.$A1]&lt;16)" calcext:base-cell-address="'Conditional Formatting'.C1"/>
            <calcext:condition calcext:apply-style-name="glbl1" calcext:value="formula-is(['Conditional Formatting'.$A1]&lt;24)" calcext:base-cell-address="'Conditional Formatting'.C1"/>
            <calcext:condition calcext:apply-style-name="glbl3" calcext:value="formula-is(['Conditional Formatting'.$A1]&lt;32)" calcext:base-cell-address="'Conditional Formatting'.C1"/>
          </calcext:conditional-format>
        </calcext:conditional-formats>
      </table:table>
      <table:table table:name="Simple row-writer"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table:formula="of:=[.B2]*4" calcext:value-type="float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table:formula="of:=[.B3]*4" calcext:value-type="float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table:formula="of:=[.B4]*4" calcext:value-type="float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table:formula="of:=[.B5]*4" calcext:value-type="float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table:formula="of:=[.B6]*4" calcext:value-type="float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table:formula="of:=[.B7]*4" calcext:value-type="float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table:formula="of:=[.B8]*4" calcext:value-type="float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table:formula="of:=[.B9]*4" calcext:value-type="float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table:formula="of:=[.B10]*4" calcext:value-type="float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table:formula="of:=[.B11]*4" calcext:value-type="float"/>
        </table:table-row>
      </table:table>
      <table:table table:name="High-level functions">
        <table:table-row>
          <table:table-cell office:value-type="string">
            <text:p>Value</text:p>
          </table:table-cell>
          <table:table-cell office:value-type="string">
            <text:p>ROUND(x; 1)</text:p>
          </table:table-cell>
          <table:table-cell office:value-type="string">
            <text:p>ROUND_HALF_TO_EVEN(x; 1)</text:p>
          </table:table-cell>
          <table:table-cell office:value-type="string">
            <text:p>Difference</text:p>
          </table:table-cell>
        </table:table-row>
        <table:table-row>
          <table:table-cell office:value-type="float" office:value="-0.6">
            <text:p>-0.6</text:p>
          </table:table-cell>
          <table:table-cell table:formula="of:=ROUND([.A2];1)" calcext:value-type="float"/>
          <table:table-cell table:formula="of:=(SIGN([.A2])*IF(AND(ISEVEN((ABS([.A2]))*10^1);MOD((ABS([.A2]))*10^1;1)&lt;=0.5);ROUNDDOWN(ABS([.A2]);1);ROUND(ABS([.A2]);1)))" calcext:value-type="float"/>
          <table:table-cell table:formula="of:=[.B2]-[.C2]" calcext:value-type="float"/>
        </table:table-row>
        <table:table-row>
          <table:table-cell office:value-type="float" office:value="-0.59">
            <text:p>-0.59</text:p>
          </table:table-cell>
          <table:table-cell table:formula="of:=ROUND([.A3];1)" calcext:value-type="float"/>
          <table:table-cell table:formula="of:=(SIGN([.A3])*IF(AND(ISEVEN((ABS([.A3]))*10^1);MOD((ABS([.A3]))*10^1;1)&lt;=0.5);ROUNDDOWN(ABS([.A3]);1);ROUND(ABS([.A3]);1)))" calcext:value-type="float"/>
          <table:table-cell table:formula="of:=[.B3]-[.C3]" calcext:value-type="float"/>
        </table:table-row>
        <table:table-row>
          <table:table-cell office:value-type="float" office:value="-0.58">
            <text:p>-0.58</text:p>
          </table:table-cell>
          <table:table-cell table:formula="of:=ROUND([.A4];1)" calcext:value-type="float"/>
          <table:table-cell table:formula="of:=(SIGN([.A4])*IF(AND(ISEVEN((ABS([.A4]))*10^1);MOD((ABS([.A4]))*10^1;1)&lt;=0.5);ROUNDDOWN(ABS([.A4]);1);ROUND(ABS([.A4]);1)))" calcext:value-type="float"/>
          <table:table-cell table:formula="of:=[.B4]-[.C4]" calcext:value-type="float"/>
        </table:table-row>
        <table:table-row>
          <table:table-cell office:value-type="float" office:value="-0.57">
            <text:p>-0.57</text:p>
          </table:table-cell>
          <table:table-cell table:formula="of:=ROUND([.A5];1)" calcext:value-type="float"/>
          <table:table-cell table:formula="of:=(SIGN([.A5])*IF(AND(ISEVEN((ABS([.A5]))*10^1);MOD((ABS([.A5]))*10^1;1)&lt;=0.5);ROUNDDOWN(ABS([.A5]);1);ROUND(ABS([.A5]);1)))" calcext:value-type="float"/>
          <table:table-cell table:formula="of:=[.B5]-[.C5]" calcext:value-type="float"/>
        </table:table-row>
        <table:table-row>
          <table:table-cell office:value-type="float" office:value="-0.56">
            <text:p>-0.56</text:p>
          </table:table-cell>
          <table:table-cell table:formula="of:=ROUND([.A6];1)" calcext:value-type="float"/>
          <table:table-cell table:formula="of:=(SIGN([.A6])*IF(AND(ISEVEN((ABS([.A6]))*10^1);MOD((ABS([.A6]))*10^1;1)&lt;=0.5);ROUNDDOWN(ABS([.A6]);1);ROUND(ABS([.A6]);1)))" calcext:value-type="float"/>
          <table:table-cell table:formula="of:=[.B6]-[.C6]" calcext:value-type="float"/>
        </table:table-row>
        <table:table-row>
          <table:table-cell office:value-type="float" office:value="-0.55">
            <text:p>-0.55</text:p>
          </table:table-cell>
          <table:table-cell table:formula="of:=ROUND([.A7];1)" calcext:value-type="float"/>
          <table:table-cell table:formula="of:=(SIGN([.A7])*IF(AND(ISEVEN((ABS([.A7]))*10^1);MOD((ABS([.A7]))*10^1;1)&lt;=0.5);ROUNDDOWN(ABS([.A7]);1);ROUND(ABS([.A7]);1)))" calcext:value-type="float"/>
          <table:table-cell table:formula="of:=[.B7]-[.C7]" calcext:value-type="float"/>
        </table:table-row>
        <table:table-row>
          <table:table-cell office:value-type="float" office:value="-0.54">
            <text:p>-0.54</text:p>
          </table:table-cell>
          <table:table-cell table:formula="of:=ROUND([.A8];1)" calcext:value-type="float"/>
          <table:table-cell table:formula="of:=(SIGN([.A8])*IF(AND(ISEVEN((ABS([.A8]))*10^1);MOD((ABS([.A8]))*10^1;1)&lt;=0.5);ROUNDDOWN(ABS([.A8]);1);ROUND(ABS([.A8]);1)))" calcext:value-type="float"/>
          <table:table-cell table:formula="of:=[.B8]-[.C8]" calcext:value-type="float"/>
        </table:table-row>
        <table:table-row>
          <table:table-cell office:value-type="float" office:value="-0.53">
            <text:p>-0.53</text:p>
          </table:table-cell>
          <table:table-cell table:formula="of:=ROUND([.A9];1)" calcext:value-type="float"/>
          <table:table-cell table:formula="of:=(SIGN([.A9])*IF(AND(ISEVEN((ABS([.A9]))*10^1);MOD((ABS([.A9]))*10^1;1)&lt;=0.5);ROUNDDOWN(ABS([.A9]);1);ROUND(ABS([.A9]);1)))" calcext:value-type="float"/>
          <table:table-cell table:formula="of:=[.B9]-[.C9]" calcext:value-type="float"/>
        </table:table-row>
        <table:table-row>
          <table:table-cell office:value-type="float" office:value="-0.52">
            <text:p>-0.52</text:p>
          </table:table-cell>
          <table:table-cell table:formula="of:=ROUND([.A10];1)" calcext:value-type="float"/>
          <table:table-cell table:formula="of:=(SIGN([.A10])*IF(AND(ISEVEN((ABS([.A10]))*10^1);MOD((ABS([.A10]))*10^1;1)&lt;=0.5);ROUNDDOWN(ABS([.A10]);1);ROUND(ABS([.A10]);1)))" calcext:value-type="float"/>
          <table:table-cell table:formula="of:=[.B10]-[.C10]" calcext:value-type="float"/>
        </table:table-row>
        <table:table-row>
          <table:table-cell office:value-type="float" office:value="-0.51">
            <text:p>-0.51</text:p>
          </table:table-cell>
          <table:table-cell table:formula="of:=ROUND([.A11];1)" calcext:value-type="float"/>
          <table:table-cell table:formula="of:=(SIGN([.A11])*IF(AND(ISEVEN((ABS([.A11]))*10^1);MOD((ABS([.A11]))*10^1;1)&lt;=0.5);ROUNDDOWN(ABS([.A11]);1);ROUND(ABS([.A11]);1)))" calcext:value-type="float"/>
          <table:table-cell table:formula="of:=[.B11]-[.C11]" calcext:value-type="float"/>
        </table:table-row>
        <table:table-row>
          <table:table-cell office:value-type="float" office:value="-0.5">
            <text:p>-0.5</text:p>
          </table:table-cell>
          <table:table-cell table:formula="of:=ROUND([.A12];1)" calcext:value-type="float"/>
          <table:table-cell table:formula="of:=(SIGN([.A12])*IF(AND(ISEVEN((ABS([.A12]))*10^1);MOD((ABS([.A12]))*10^1;1)&lt;=0.5);ROUNDDOWN(ABS([.A12]);1);ROUND(ABS([.A12]);1)))" calcext:value-type="float"/>
          <table:table-cell table:formula="of:=[.B12]-[.C12]" calcext:value-type="float"/>
        </table:table-row>
        <table:table-row>
          <table:table-cell office:value-type="float" office:value="-0.49">
            <text:p>-0.49</text:p>
          </table:table-cell>
          <table:table-cell table:formula="of:=ROUND([.A13];1)" calcext:value-type="float"/>
          <table:table-cell table:formula="of:=(SIGN([.A13])*IF(AND(ISEVEN((ABS([.A13]))*10^1);MOD((ABS([.A13]))*10^1;1)&lt;=0.5);ROUNDDOWN(ABS([.A13]);1);ROUND(ABS([.A13]);1)))" calcext:value-type="float"/>
          <table:table-cell table:formula="of:=[.B13]-[.C13]" calcext:value-type="float"/>
        </table:table-row>
        <table:table-row>
          <table:table-cell office:value-type="float" office:value="-0.48">
            <text:p>-0.48</text:p>
          </table:table-cell>
          <table:table-cell table:formula="of:=ROUND([.A14];1)" calcext:value-type="float"/>
          <table:table-cell table:formula="of:=(SIGN([.A14])*IF(AND(ISEVEN((ABS([.A14]))*10^1);MOD((ABS([.A14]))*10^1;1)&lt;=0.5);ROUNDDOWN(ABS([.A14]);1);ROUND(ABS([.A14]);1)))" calcext:value-type="float"/>
          <table:table-cell table:formula="of:=[.B14]-[.C14]" calcext:value-type="float"/>
        </table:table-row>
        <table:table-row>
          <table:table-cell office:value-type="float" office:value="-0.47">
            <text:p>-0.47</text:p>
          </table:table-cell>
          <table:table-cell table:formula="of:=ROUND([.A15];1)" calcext:value-type="float"/>
          <table:table-cell table:formula="of:=(SIGN([.A15])*IF(AND(ISEVEN((ABS([.A15]))*10^1);MOD((ABS([.A15]))*10^1;1)&lt;=0.5);ROUNDDOWN(ABS([.A15]);1);ROUND(ABS([.A15]);1)))" calcext:value-type="float"/>
          <table:table-cell table:formula="of:=[.B15]-[.C15]" calcext:value-type="float"/>
        </table:table-row>
        <table:table-row>
          <table:table-cell office:value-type="float" office:value="-0.46">
            <text:p>-0.46</text:p>
          </table:table-cell>
          <table:table-cell table:formula="of:=ROUND([.A16];1)" calcext:value-type="float"/>
          <table:table-cell table:formula="of:=(SIGN([.A16])*IF(AND(ISEVEN((ABS([.A16]))*10^1);MOD((ABS([.A16]))*10^1;1)&lt;=0.5);ROUNDDOWN(ABS([.A16]);1);ROUND(ABS([.A16]);1)))" calcext:value-type="float"/>
          <table:table-cell table:formula="of:=[.B16]-[.C16]" calcext:value-type="float"/>
        </table:table-row>
        <table:table-row>
          <table:table-cell office:value-type="float" office:value="-0.45">
            <text:p>-0.45</text:p>
          </table:table-cell>
          <table:table-cell table:formula="of:=ROUND([.A17];1)" calcext:value-type="float"/>
          <table:table-cell table:formula="of:=(SIGN([.A17])*IF(AND(ISEVEN((ABS([.A17]))*10^1);MOD((ABS([.A17]))*10^1;1)&lt;=0.5);ROUNDDOWN(ABS([.A17]);1);ROUND(ABS([.A17]);1)))" calcext:value-type="float"/>
          <table:table-cell table:formula="of:=[.B17]-[.C17]" calcext:value-type="float"/>
        </table:table-row>
        <table:table-row>
          <table:table-cell office:value-type="float" office:value="-0.44">
            <text:p>-0.44</text:p>
          </table:table-cell>
          <table:table-cell table:formula="of:=ROUND([.A18];1)" calcext:value-type="float"/>
          <table:table-cell table:formula="of:=(SIGN([.A18])*IF(AND(ISEVEN((ABS([.A18]))*10^1);MOD((ABS([.A18]))*10^1;1)&lt;=0.5);ROUNDDOWN(ABS([.A18]);1);ROUND(ABS([.A18]);1)))" calcext:value-type="float"/>
          <table:table-cell table:formula="of:=[.B18]-[.C18]" calcext:value-type="float"/>
        </table:table-row>
        <table:table-row>
          <table:table-cell office:value-type="float" office:value="-0.43">
            <text:p>-0.43</text:p>
          </table:table-cell>
          <table:table-cell table:formula="of:=ROUND([.A19];1)" calcext:value-type="float"/>
          <table:table-cell table:formula="of:=(SIGN([.A19])*IF(AND(ISEVEN((ABS([.A19]))*10^1);MOD((ABS([.A19]))*10^1;1)&lt;=0.5);ROUNDDOWN(ABS([.A19]);1);ROUND(ABS([.A19]);1)))" calcext:value-type="float"/>
          <table:table-cell table:formula="of:=[.B19]-[.C19]" calcext:value-type="float"/>
        </table:table-row>
        <table:table-row>
          <table:table-cell office:value-type="float" office:value="-0.42">
            <text:p>-0.42</text:p>
          </table:table-cell>
          <table:table-cell table:formula="of:=ROUND([.A20];1)" calcext:value-type="float"/>
          <table:table-cell table:formula="of:=(SIGN([.A20])*IF(AND(ISEVEN((ABS([.A20]))*10^1);MOD((ABS([.A20]))*10^1;1)&lt;=0.5);ROUNDDOWN(ABS([.A20]);1);ROUND(ABS([.A20]);1)))" calcext:value-type="float"/>
          <table:table-cell table:formula="of:=[.B20]-[.C20]" calcext:value-type="float"/>
        </table:table-row>
        <table:table-row>
          <table:table-cell office:value-type="float" office:value="-0.41">
            <text:p>-0.41</text:p>
          </table:table-cell>
          <table:table-cell table:formula="of:=ROUND([.A21];1)" calcext:value-type="float"/>
          <table:table-cell table:formula="of:=(SIGN([.A21])*IF(AND(ISEVEN((ABS([.A21]))*10^1);MOD((ABS([.A21]))*10^1;1)&lt;=0.5);ROUNDDOWN(ABS([.A21]);1);ROUND(ABS([.A21]);1)))" calcext:value-type="float"/>
          <table:table-cell table:formula="of:=[.B21]-[.C21]" calcext:value-type="float"/>
        </table:table-row>
        <table:table-row>
          <table:table-cell office:value-type="float" office:value="-0.4">
            <text:p>-0.4</text:p>
          </table:table-cell>
          <table:table-cell table:formula="of:=ROUND([.A22];1)" calcext:value-type="float"/>
          <table:table-cell table:formula="of:=(SIGN([.A22])*IF(AND(ISEVEN((ABS([.A22]))*10^1);MOD((ABS([.A22]))*10^1;1)&lt;=0.5);ROUNDDOWN(ABS([.A22]);1);ROUND(ABS([.A22]);1)))" calcext:value-type="float"/>
          <table:table-cell table:formula="of:=[.B22]-[.C22]" calcext:value-type="float"/>
        </table:table-row>
        <table:table-row>
          <table:table-cell office:value-type="float" office:value="-0.39">
            <text:p>-0.39</text:p>
          </table:table-cell>
          <table:table-cell table:formula="of:=ROUND([.A23];1)" calcext:value-type="float"/>
          <table:table-cell table:formula="of:=(SIGN([.A23])*IF(AND(ISEVEN((ABS([.A23]))*10^1);MOD((ABS([.A23]))*10^1;1)&lt;=0.5);ROUNDDOWN(ABS([.A23]);1);ROUND(ABS([.A23]);1)))" calcext:value-type="float"/>
          <table:table-cell table:formula="of:=[.B23]-[.C23]" calcext:value-type="float"/>
        </table:table-row>
        <table:table-row>
          <table:table-cell office:value-type="float" office:value="-0.38">
            <text:p>-0.38</text:p>
          </table:table-cell>
          <table:table-cell table:formula="of:=ROUND([.A24];1)" calcext:value-type="float"/>
          <table:table-cell table:formula="of:=(SIGN([.A24])*IF(AND(ISEVEN((ABS([.A24]))*10^1);MOD((ABS([.A24]))*10^1;1)&lt;=0.5);ROUNDDOWN(ABS([.A24]);1);ROUND(ABS([.A24]);1)))" calcext:value-type="float"/>
          <table:table-cell table:formula="of:=[.B24]-[.C24]" calcext:value-type="float"/>
        </table:table-row>
        <table:table-row>
          <table:table-cell office:value-type="float" office:value="-0.37">
            <text:p>-0.37</text:p>
          </table:table-cell>
          <table:table-cell table:formula="of:=ROUND([.A25];1)" calcext:value-type="float"/>
          <table:table-cell table:formula="of:=(SIGN([.A25])*IF(AND(ISEVEN((ABS([.A25]))*10^1);MOD((ABS([.A25]))*10^1;1)&lt;=0.5);ROUNDDOWN(ABS([.A25]);1);ROUND(ABS([.A25]);1)))" calcext:value-type="float"/>
          <table:table-cell table:formula="of:=[.B25]-[.C25]" calcext:value-type="float"/>
        </table:table-row>
        <table:table-row>
          <table:table-cell office:value-type="float" office:value="-0.36">
            <text:p>-0.36</text:p>
          </table:table-cell>
          <table:table-cell table:formula="of:=ROUND([.A26];1)" calcext:value-type="float"/>
          <table:table-cell table:formula="of:=(SIGN([.A26])*IF(AND(ISEVEN((ABS([.A26]))*10^1);MOD((ABS([.A26]))*10^1;1)&lt;=0.5);ROUNDDOWN(ABS([.A26]);1);ROUND(ABS([.A26]);1)))" calcext:value-type="float"/>
          <table:table-cell table:formula="of:=[.B26]-[.C26]" calcext:value-type="float"/>
        </table:table-row>
        <table:table-row>
          <table:table-cell office:value-type="float" office:value="-0.35">
            <text:p>-0.35</text:p>
          </table:table-cell>
          <table:table-cell table:formula="of:=ROUND([.A27];1)" calcext:value-type="float"/>
          <table:table-cell table:formula="of:=(SIGN([.A27])*IF(AND(ISEVEN((ABS([.A27]))*10^1);MOD((ABS([.A27]))*10^1;1)&lt;=0.5);ROUNDDOWN(ABS([.A27]);1);ROUND(ABS([.A27]);1)))" calcext:value-type="float"/>
          <table:table-cell table:formula="of:=[.B27]-[.C27]" calcext:value-type="float"/>
        </table:table-row>
        <table:table-row>
          <table:table-cell office:value-type="float" office:value="-0.34">
            <text:p>-0.34</text:p>
          </table:table-cell>
          <table:table-cell table:formula="of:=ROUND([.A28];1)" calcext:value-type="float"/>
          <table:table-cell table:formula="of:=(SIGN([.A28])*IF(AND(ISEVEN((ABS([.A28]))*10^1);MOD((ABS([.A28]))*10^1;1)&lt;=0.5);ROUNDDOWN(ABS([.A28]);1);ROUND(ABS([.A28]);1)))" calcext:value-type="float"/>
          <table:table-cell table:formula="of:=[.B28]-[.C28]" calcext:value-type="float"/>
        </table:table-row>
        <table:table-row>
          <table:table-cell office:value-type="float" office:value="-0.33">
            <text:p>-0.33</text:p>
          </table:table-cell>
          <table:table-cell table:formula="of:=ROUND([.A29];1)" calcext:value-type="float"/>
          <table:table-cell table:formula="of:=(SIGN([.A29])*IF(AND(ISEVEN((ABS([.A29]))*10^1);MOD((ABS([.A29]))*10^1;1)&lt;=0.5);ROUNDDOWN(ABS([.A29]);1);ROUND(ABS([.A29]);1)))" calcext:value-type="float"/>
          <table:table-cell table:formula="of:=[.B29]-[.C29]" calcext:value-type="float"/>
        </table:table-row>
        <table:table-row>
          <table:table-cell office:value-type="float" office:value="-0.32">
            <text:p>-0.32</text:p>
          </table:table-cell>
          <table:table-cell table:formula="of:=ROUND([.A30];1)" calcext:value-type="float"/>
          <table:table-cell table:formula="of:=(SIGN([.A30])*IF(AND(ISEVEN((ABS([.A30]))*10^1);MOD((ABS([.A30]))*10^1;1)&lt;=0.5);ROUNDDOWN(ABS([.A30]);1);ROUND(ABS([.A30]);1)))" calcext:value-type="float"/>
          <table:table-cell table:formula="of:=[.B30]-[.C30]" calcext:value-type="float"/>
        </table:table-row>
        <table:table-row>
          <table:table-cell office:value-type="float" office:value="-0.31">
            <text:p>-0.31</text:p>
          </table:table-cell>
          <table:table-cell table:formula="of:=ROUND([.A31];1)" calcext:value-type="float"/>
          <table:table-cell table:formula="of:=(SIGN([.A31])*IF(AND(ISEVEN((ABS([.A31]))*10^1);MOD((ABS([.A31]))*10^1;1)&lt;=0.5);ROUNDDOWN(ABS([.A31]);1);ROUND(ABS([.A31]);1)))" calcext:value-type="float"/>
          <table:table-cell table:formula="of:=[.B31]-[.C31]" calcext:value-type="float"/>
        </table:table-row>
        <table:table-row>
          <table:table-cell office:value-type="float" office:value="-0.3">
            <text:p>-0.3</text:p>
          </table:table-cell>
          <table:table-cell table:formula="of:=ROUND([.A32];1)" calcext:value-type="float"/>
          <table:table-cell table:formula="of:=(SIGN([.A32])*IF(AND(ISEVEN((ABS([.A32]))*10^1);MOD((ABS([.A32]))*10^1;1)&lt;=0.5);ROUNDDOWN(ABS([.A32]);1);ROUND(ABS([.A32]);1)))" calcext:value-type="float"/>
          <table:table-cell table:formula="of:=[.B32]-[.C32]" calcext:value-type="float"/>
        </table:table-row>
        <table:table-row>
          <table:table-cell office:value-type="float" office:value="-0.29">
            <text:p>-0.29</text:p>
          </table:table-cell>
          <table:table-cell table:formula="of:=ROUND([.A33];1)" calcext:value-type="float"/>
          <table:table-cell table:formula="of:=(SIGN([.A33])*IF(AND(ISEVEN((ABS([.A33]))*10^1);MOD((ABS([.A33]))*10^1;1)&lt;=0.5);ROUNDDOWN(ABS([.A33]);1);ROUND(ABS([.A33]);1)))" calcext:value-type="float"/>
          <table:table-cell table:formula="of:=[.B33]-[.C33]" calcext:value-type="float"/>
        </table:table-row>
        <table:table-row>
          <table:table-cell office:value-type="float" office:value="-0.28">
            <text:p>-0.28</text:p>
          </table:table-cell>
          <table:table-cell table:formula="of:=ROUND([.A34];1)" calcext:value-type="float"/>
          <table:table-cell table:formula="of:=(SIGN([.A34])*IF(AND(ISEVEN((ABS([.A34]))*10^1);MOD((ABS([.A34]))*10^1;1)&lt;=0.5);ROUNDDOWN(ABS([.A34]);1);ROUND(ABS([.A34]);1)))" calcext:value-type="float"/>
          <table:table-cell table:formula="of:=[.B34]-[.C34]" calcext:value-type="float"/>
        </table:table-row>
        <table:table-row>
          <table:table-cell office:value-type="float" office:value="-0.27">
            <text:p>-0.27</text:p>
          </table:table-cell>
          <table:table-cell table:formula="of:=ROUND([.A35];1)" calcext:value-type="float"/>
          <table:table-cell table:formula="of:=(SIGN([.A35])*IF(AND(ISEVEN((ABS([.A35]))*10^1);MOD((ABS([.A35]))*10^1;1)&lt;=0.5);ROUNDDOWN(ABS([.A35]);1);ROUND(ABS([.A35]);1)))" calcext:value-type="float"/>
          <table:table-cell table:formula="of:=[.B35]-[.C35]" calcext:value-type="float"/>
        </table:table-row>
        <table:table-row>
          <table:table-cell office:value-type="float" office:value="-0.26">
            <text:p>-0.26</text:p>
          </table:table-cell>
          <table:table-cell table:formula="of:=ROUND([.A36];1)" calcext:value-type="float"/>
          <table:table-cell table:formula="of:=(SIGN([.A36])*IF(AND(ISEVEN((ABS([.A36]))*10^1);MOD((ABS([.A36]))*10^1;1)&lt;=0.5);ROUNDDOWN(ABS([.A36]);1);ROUND(ABS([.A36]);1)))" calcext:value-type="float"/>
          <table:table-cell table:formula="of:=[.B36]-[.C36]" calcext:value-type="float"/>
        </table:table-row>
        <table:table-row>
          <table:table-cell office:value-type="float" office:value="-0.25">
            <text:p>-0.25</text:p>
          </table:table-cell>
          <table:table-cell table:formula="of:=ROUND([.A37];1)" calcext:value-type="float"/>
          <table:table-cell table:formula="of:=(SIGN([.A37])*IF(AND(ISEVEN((ABS([.A37]))*10^1);MOD((ABS([.A37]))*10^1;1)&lt;=0.5);ROUNDDOWN(ABS([.A37]);1);ROUND(ABS([.A37]);1)))" calcext:value-type="float"/>
          <table:table-cell table:formula="of:=[.B37]-[.C37]" calcext:value-type="float"/>
        </table:table-row>
        <table:table-row>
          <table:table-cell office:value-type="float" office:value="-0.24">
            <text:p>-0.24</text:p>
          </table:table-cell>
          <table:table-cell table:formula="of:=ROUND([.A38];1)" calcext:value-type="float"/>
          <table:table-cell table:formula="of:=(SIGN([.A38])*IF(AND(ISEVEN((ABS([.A38]))*10^1);MOD((ABS([.A38]))*10^1;1)&lt;=0.5);ROUNDDOWN(ABS([.A38]);1);ROUND(ABS([.A38]);1)))" calcext:value-type="float"/>
          <table:table-cell table:formula="of:=[.B38]-[.C38]" calcext:value-type="float"/>
        </table:table-row>
        <table:table-row>
          <table:table-cell office:value-type="float" office:value="-0.23">
            <text:p>-0.23</text:p>
          </table:table-cell>
          <table:table-cell table:formula="of:=ROUND([.A39];1)" calcext:value-type="float"/>
          <table:table-cell table:formula="of:=(SIGN([.A39])*IF(AND(ISEVEN((ABS([.A39]))*10^1);MOD((ABS([.A39]))*10^1;1)&lt;=0.5);ROUNDDOWN(ABS([.A39]);1);ROUND(ABS([.A39]);1)))" calcext:value-type="float"/>
          <table:table-cell table:formula="of:=[.B39]-[.C39]" calcext:value-type="float"/>
        </table:table-row>
        <table:table-row>
          <table:table-cell office:value-type="float" office:value="-0.22">
            <text:p>-0.22</text:p>
          </table:table-cell>
          <table:table-cell table:formula="of:=ROUND([.A40];1)" calcext:value-type="float"/>
          <table:table-cell table:formula="of:=(SIGN([.A40])*IF(AND(ISEVEN((ABS([.A40]))*10^1);MOD((ABS([.A40]))*10^1;1)&lt;=0.5);ROUNDDOWN(ABS([.A40]);1);ROUND(ABS([.A40]);1)))" calcext:value-type="float"/>
          <table:table-cell table:formula="of:=[.B40]-[.C40]" calcext:value-type="float"/>
        </table:table-row>
        <table:table-row>
          <table:table-cell office:value-type="float" office:value="-0.21">
            <text:p>-0.21</text:p>
          </table:table-cell>
          <table:table-cell table:formula="of:=ROUND([.A41];1)" calcext:value-type="float"/>
          <table:table-cell table:formula="of:=(SIGN([.A41])*IF(AND(ISEVEN((ABS([.A41]))*10^1);MOD((ABS([.A41]))*10^1;1)&lt;=0.5);ROUNDDOWN(ABS([.A41]);1);ROUND(ABS([.A41]);1)))" calcext:value-type="float"/>
          <table:table-cell table:formula="of:=[.B41]-[.C41]" calcext:value-type="float"/>
        </table:table-row>
        <table:table-row>
          <table:table-cell office:value-type="float" office:value="-0.2">
            <text:p>-0.2</text:p>
          </table:table-cell>
          <table:table-cell table:formula="of:=ROUND([.A42];1)" calcext:value-type="float"/>
          <table:table-cell table:formula="of:=(SIGN([.A42])*IF(AND(ISEVEN((ABS([.A42]))*10^1);MOD((ABS([.A42]))*10^1;1)&lt;=0.5);ROUNDDOWN(ABS([.A42]);1);ROUND(ABS([.A42]);1)))" calcext:value-type="float"/>
          <table:table-cell table:formula="of:=[.B42]-[.C42]" calcext:value-type="float"/>
        </table:table-row>
        <table:table-row>
          <table:table-cell office:value-type="float" office:value="-0.19">
            <text:p>-0.19</text:p>
          </table:table-cell>
          <table:table-cell table:formula="of:=ROUND([.A43];1)" calcext:value-type="float"/>
          <table:table-cell table:formula="of:=(SIGN([.A43])*IF(AND(ISEVEN((ABS([.A43]))*10^1);MOD((ABS([.A43]))*10^1;1)&lt;=0.5);ROUNDDOWN(ABS([.A43]);1);ROUND(ABS([.A43]);1)))" calcext:value-type="float"/>
          <table:table-cell table:formula="of:=[.B43]-[.C43]" calcext:value-type="float"/>
        </table:table-row>
        <table:table-row>
          <table:table-cell office:value-type="float" office:value="-0.18">
            <text:p>-0.18</text:p>
          </table:table-cell>
          <table:table-cell table:formula="of:=ROUND([.A44];1)" calcext:value-type="float"/>
          <table:table-cell table:formula="of:=(SIGN([.A44])*IF(AND(ISEVEN((ABS([.A44]))*10^1);MOD((ABS([.A44]))*10^1;1)&lt;=0.5);ROUNDDOWN(ABS([.A44]);1);ROUND(ABS([.A44]);1)))" calcext:value-type="float"/>
          <table:table-cell table:formula="of:=[.B44]-[.C44]" calcext:value-type="float"/>
        </table:table-row>
        <table:table-row>
          <table:table-cell office:value-type="float" office:value="-0.17">
            <text:p>-0.17</text:p>
          </table:table-cell>
          <table:table-cell table:formula="of:=ROUND([.A45];1)" calcext:value-type="float"/>
          <table:table-cell table:formula="of:=(SIGN([.A45])*IF(AND(ISEVEN((ABS([.A45]))*10^1);MOD((ABS([.A45]))*10^1;1)&lt;=0.5);ROUNDDOWN(ABS([.A45]);1);ROUND(ABS([.A45]);1)))" calcext:value-type="float"/>
          <table:table-cell table:formula="of:=[.B45]-[.C45]" calcext:value-type="float"/>
        </table:table-row>
        <table:table-row>
          <table:table-cell office:value-type="float" office:value="-0.16">
            <text:p>-0.16</text:p>
          </table:table-cell>
          <table:table-cell table:formula="of:=ROUND([.A46];1)" calcext:value-type="float"/>
          <table:table-cell table:formula="of:=(SIGN([.A46])*IF(AND(ISEVEN((ABS([.A46]))*10^1);MOD((ABS([.A46]))*10^1;1)&lt;=0.5);ROUNDDOWN(ABS([.A46]);1);ROUND(ABS([.A46]);1)))" calcext:value-type="float"/>
          <table:table-cell table:formula="of:=[.B46]-[.C46]" calcext:value-type="float"/>
        </table:table-row>
        <table:table-row>
          <table:table-cell office:value-type="float" office:value="-0.15">
            <text:p>-0.15</text:p>
          </table:table-cell>
          <table:table-cell table:formula="of:=ROUND([.A47];1)" calcext:value-type="float"/>
          <table:table-cell table:formula="of:=(SIGN([.A47])*IF(AND(ISEVEN((ABS([.A47]))*10^1);MOD((ABS([.A47]))*10^1;1)&lt;=0.5);ROUNDDOWN(ABS([.A47]);1);ROUND(ABS([.A47]);1)))" calcext:value-type="float"/>
          <table:table-cell table:formula="of:=[.B47]-[.C47]" calcext:value-type="float"/>
        </table:table-row>
        <table:table-row>
          <table:table-cell office:value-type="float" office:value="-0.14">
            <text:p>-0.14</text:p>
          </table:table-cell>
          <table:table-cell table:formula="of:=ROUND([.A48];1)" calcext:value-type="float"/>
          <table:table-cell table:formula="of:=(SIGN([.A48])*IF(AND(ISEVEN((ABS([.A48]))*10^1);MOD((ABS([.A48]))*10^1;1)&lt;=0.5);ROUNDDOWN(ABS([.A48]);1);ROUND(ABS([.A48]);1)))" calcext:value-type="float"/>
          <table:table-cell table:formula="of:=[.B48]-[.C48]" calcext:value-type="float"/>
        </table:table-row>
        <table:table-row>
          <table:table-cell office:value-type="float" office:value="-0.13">
            <text:p>-0.13</text:p>
          </table:table-cell>
          <table:table-cell table:formula="of:=ROUND([.A49];1)" calcext:value-type="float"/>
          <table:table-cell table:formula="of:=(SIGN([.A49])*IF(AND(ISEVEN((ABS([.A49]))*10^1);MOD((ABS([.A49]))*10^1;1)&lt;=0.5);ROUNDDOWN(ABS([.A49]);1);ROUND(ABS([.A49]);1)))" calcext:value-type="float"/>
          <table:table-cell table:formula="of:=[.B49]-[.C49]" calcext:value-type="float"/>
        </table:table-row>
        <table:table-row>
          <table:table-cell office:value-type="float" office:value="-0.12">
            <text:p>-0.12</text:p>
          </table:table-cell>
          <table:table-cell table:formula="of:=ROUND([.A50];1)" calcext:value-type="float"/>
          <table:table-cell table:formula="of:=(SIGN([.A50])*IF(AND(ISEVEN((ABS([.A50]))*10^1);MOD((ABS([.A50]))*10^1;1)&lt;=0.5);ROUNDDOWN(ABS([.A50]);1);ROUND(ABS([.A50]);1)))" calcext:value-type="float"/>
          <table:table-cell table:formula="of:=[.B50]-[.C50]" calcext:value-type="float"/>
        </table:table-row>
        <table:table-row>
          <table:table-cell office:value-type="float" office:value="-0.11">
            <text:p>-0.11</text:p>
          </table:table-cell>
          <table:table-cell table:formula="of:=ROUND([.A51];1)" calcext:value-type="float"/>
          <table:table-cell table:formula="of:=(SIGN([.A51])*IF(AND(ISEVEN((ABS([.A51]))*10^1);MOD((ABS([.A51]))*10^1;1)&lt;=0.5);ROUNDDOWN(ABS([.A51]);1);ROUND(ABS([.A51]);1)))" calcext:value-type="float"/>
          <table:table-cell table:formula="of:=[.B51]-[.C51]" calcext:value-type="float"/>
        </table:table-row>
        <table:table-row>
          <table:table-cell office:value-type="float" office:value="-0.1">
            <text:p>-0.1</text:p>
          </table:table-cell>
          <table:table-cell table:formula="of:=ROUND([.A52];1)" calcext:value-type="float"/>
          <table:table-cell table:formula="of:=(SIGN([.A52])*IF(AND(ISEVEN((ABS([.A52]))*10^1);MOD((ABS([.A52]))*10^1;1)&lt;=0.5);ROUNDDOWN(ABS([.A52]);1);ROUND(ABS([.A52]);1)))" calcext:value-type="float"/>
          <table:table-cell table:formula="of:=[.B52]-[.C52]" calcext:value-type="float"/>
        </table:table-row>
        <table:table-row>
          <table:table-cell office:value-type="float" office:value="-0.09">
            <text:p>-0.09</text:p>
          </table:table-cell>
          <table:table-cell table:formula="of:=ROUND([.A53];1)" calcext:value-type="float"/>
          <table:table-cell table:formula="of:=(SIGN([.A53])*IF(AND(ISEVEN((ABS([.A53]))*10^1);MOD((ABS([.A53]))*10^1;1)&lt;=0.5);ROUNDDOWN(ABS([.A53]);1);ROUND(ABS([.A53]);1)))" calcext:value-type="float"/>
          <table:table-cell table:formula="of:=[.B53]-[.C53]" calcext:value-type="float"/>
        </table:table-row>
        <table:table-row>
          <table:table-cell office:value-type="float" office:value="-0.08">
            <text:p>-0.08</text:p>
          </table:table-cell>
          <table:table-cell table:formula="of:=ROUND([.A54];1)" calcext:value-type="float"/>
          <table:table-cell table:formula="of:=(SIGN([.A54])*IF(AND(ISEVEN((ABS([.A54]))*10^1);MOD((ABS([.A54]))*10^1;1)&lt;=0.5);ROUNDDOWN(ABS([.A54]);1);ROUND(ABS([.A54]);1)))" calcext:value-type="float"/>
          <table:table-cell table:formula="of:=[.B54]-[.C54]" calcext:value-type="float"/>
        </table:table-row>
        <table:table-row>
          <table:table-cell office:value-type="float" office:value="-0.07">
            <text:p>-0.07</text:p>
          </table:table-cell>
          <table:table-cell table:formula="of:=ROUND([.A55];1)" calcext:value-type="float"/>
          <table:table-cell table:formula="of:=(SIGN([.A55])*IF(AND(ISEVEN((ABS([.A55]))*10^1);MOD((ABS([.A55]))*10^1;1)&lt;=0.5);ROUNDDOWN(ABS([.A55]);1);ROUND(ABS([.A55]);1)))" calcext:value-type="float"/>
          <table:table-cell table:formula="of:=[.B55]-[.C55]" calcext:value-type="float"/>
        </table:table-row>
        <table:table-row>
          <table:table-cell office:value-type="float" office:value="-0.06">
            <text:p>-0.06</text:p>
          </table:table-cell>
          <table:table-cell table:formula="of:=ROUND([.A56];1)" calcext:value-type="float"/>
          <table:table-cell table:formula="of:=(SIGN([.A56])*IF(AND(ISEVEN((ABS([.A56]))*10^1);MOD((ABS([.A56]))*10^1;1)&lt;=0.5);ROUNDDOWN(ABS([.A56]);1);ROUND(ABS([.A56]);1)))" calcext:value-type="float"/>
          <table:table-cell table:formula="of:=[.B56]-[.C56]" calcext:value-type="float"/>
        </table:table-row>
        <table:table-row>
          <table:table-cell office:value-type="float" office:value="-0.05">
            <text:p>-0.05</text:p>
          </table:table-cell>
          <table:table-cell table:formula="of:=ROUND([.A57];1)" calcext:value-type="float"/>
          <table:table-cell table:formula="of:=(SIGN([.A57])*IF(AND(ISEVEN((ABS([.A57]))*10^1);MOD((ABS([.A57]))*10^1;1)&lt;=0.5);ROUNDDOWN(ABS([.A57]);1);ROUND(ABS([.A57]);1)))" calcext:value-type="float"/>
          <table:table-cell table:formula="of:=[.B57]-[.C57]" calcext:value-type="float"/>
        </table:table-row>
        <table:table-row>
          <table:table-cell office:value-type="float" office:value="-0.04">
            <text:p>-0.04</text:p>
          </table:table-cell>
          <table:table-cell table:formula="of:=ROUND([.A58];1)" calcext:value-type="float"/>
          <table:table-cell table:formula="of:=(SIGN([.A58])*IF(AND(ISEVEN((ABS([.A58]))*10^1);MOD((ABS([.A58]))*10^1;1)&lt;=0.5);ROUNDDOWN(ABS([.A58]);1);ROUND(ABS([.A58]);1)))" calcext:value-type="float"/>
          <table:table-cell table:formula="of:=[.B58]-[.C58]" calcext:value-type="float"/>
        </table:table-row>
        <table:table-row>
          <table:table-cell office:value-type="float" office:value="-0.03">
            <text:p>-0.03</text:p>
          </table:table-cell>
          <table:table-cell table:formula="of:=ROUND([.A59];1)" calcext:value-type="float"/>
          <table:table-cell table:formula="of:=(SIGN([.A59])*IF(AND(ISEVEN((ABS([.A59]))*10^1);MOD((ABS([.A59]))*10^1;1)&lt;=0.5);ROUNDDOWN(ABS([.A59]);1);ROUND(ABS([.A59]);1)))" calcext:value-type="float"/>
          <table:table-cell table:formula="of:=[.B59]-[.C59]" calcext:value-type="float"/>
        </table:table-row>
        <table:table-row>
          <table:table-cell office:value-type="float" office:value="-0.02">
            <text:p>-0.02</text:p>
          </table:table-cell>
          <table:table-cell table:formula="of:=ROUND([.A60];1)" calcext:value-type="float"/>
          <table:table-cell table:formula="of:=(SIGN([.A60])*IF(AND(ISEVEN((ABS([.A60]))*10^1);MOD((ABS([.A60]))*10^1;1)&lt;=0.5);ROUNDDOWN(ABS([.A60]);1);ROUND(ABS([.A60]);1)))" calcext:value-type="float"/>
          <table:table-cell table:formula="of:=[.B60]-[.C60]" calcext:value-type="float"/>
        </table:table-row>
        <table:table-row>
          <table:table-cell office:value-type="float" office:value="-0.01">
            <text:p>-0.01</text:p>
          </table:table-cell>
          <table:table-cell table:formula="of:=ROUND([.A61];1)" calcext:value-type="float"/>
          <table:table-cell table:formula="of:=(SIGN([.A61])*IF(AND(ISEVEN((ABS([.A61]))*10^1);MOD((ABS([.A61]))*10^1;1)&lt;=0.5);ROUNDDOWN(ABS([.A61]);1);ROUND(ABS([.A61]);1)))" calcext:value-type="float"/>
          <table:table-cell table:formula="of:=[.B61]-[.C61]" calcext:value-type="float"/>
        </table:table-row>
        <table:table-row>
          <table:table-cell office:value-type="float" office:value="0.0">
            <text:p>0.0</text:p>
          </table:table-cell>
          <table:table-cell table:formula="of:=ROUND([.A62];1)" calcext:value-type="float"/>
          <table:table-cell table:formula="of:=(SIGN([.A62])*IF(AND(ISEVEN((ABS([.A62]))*10^1);MOD((ABS([.A62]))*10^1;1)&lt;=0.5);ROUNDDOWN(ABS([.A62]);1);ROUND(ABS([.A62]);1)))" calcext:value-type="float"/>
          <table:table-cell table:formula="of:=[.B62]-[.C62]" calcext:value-type="float"/>
        </table:table-row>
        <table:table-row>
          <table:table-cell office:value-type="float" office:value="0.01">
            <text:p>0.01</text:p>
          </table:table-cell>
          <table:table-cell table:formula="of:=ROUND([.A63];1)" calcext:value-type="float"/>
          <table:table-cell table:formula="of:=(SIGN([.A63])*IF(AND(ISEVEN((ABS([.A63]))*10^1);MOD((ABS([.A63]))*10^1;1)&lt;=0.5);ROUNDDOWN(ABS([.A63]);1);ROUND(ABS([.A63]);1)))" calcext:value-type="float"/>
          <table:table-cell table:formula="of:=[.B63]-[.C63]" calcext:value-type="float"/>
        </table:table-row>
        <table:table-row>
          <table:table-cell office:value-type="float" office:value="0.02">
            <text:p>0.02</text:p>
          </table:table-cell>
          <table:table-cell table:formula="of:=ROUND([.A64];1)" calcext:value-type="float"/>
          <table:table-cell table:formula="of:=(SIGN([.A64])*IF(AND(ISEVEN((ABS([.A64]))*10^1);MOD((ABS([.A64]))*10^1;1)&lt;=0.5);ROUNDDOWN(ABS([.A64]);1);ROUND(ABS([.A64]);1)))" calcext:value-type="float"/>
          <table:table-cell table:formula="of:=[.B64]-[.C64]" calcext:value-type="float"/>
        </table:table-row>
        <table:table-row>
          <table:table-cell office:value-type="float" office:value="0.03">
            <text:p>0.03</text:p>
          </table:table-cell>
          <table:table-cell table:formula="of:=ROUND([.A65];1)" calcext:value-type="float"/>
          <table:table-cell table:formula="of:=(SIGN([.A65])*IF(AND(ISEVEN((ABS([.A65]))*10^1);MOD((ABS([.A65]))*10^1;1)&lt;=0.5);ROUNDDOWN(ABS([.A65]);1);ROUND(ABS([.A65]);1)))" calcext:value-type="float"/>
          <table:table-cell table:formula="of:=[.B65]-[.C65]" calcext:value-type="float"/>
        </table:table-row>
        <table:table-row>
          <table:table-cell office:value-type="float" office:value="0.04">
            <text:p>0.04</text:p>
          </table:table-cell>
          <table:table-cell table:formula="of:=ROUND([.A66];1)" calcext:value-type="float"/>
          <table:table-cell table:formula="of:=(SIGN([.A66])*IF(AND(ISEVEN((ABS([.A66]))*10^1);MOD((ABS([.A66]))*10^1;1)&lt;=0.5);ROUNDDOWN(ABS([.A66]);1);ROUND(ABS([.A66]);1)))" calcext:value-type="float"/>
          <table:table-cell table:formula="of:=[.B66]-[.C66]" calcext:value-type="float"/>
        </table:table-row>
        <table:table-row>
          <table:table-cell office:value-type="float" office:value="0.05">
            <text:p>0.05</text:p>
          </table:table-cell>
          <table:table-cell table:formula="of:=ROUND([.A67];1)" calcext:value-type="float"/>
          <table:table-cell table:formula="of:=(SIGN([.A67])*IF(AND(ISEVEN((ABS([.A67]))*10^1);MOD((ABS([.A67]))*10^1;1)&lt;=0.5);ROUNDDOWN(ABS([.A67]);1);ROUND(ABS([.A67]);1)))" calcext:value-type="float"/>
          <table:table-cell table:formula="of:=[.B67]-[.C67]" calcext:value-type="float"/>
        </table:table-row>
        <table:table-row>
          <table:table-cell office:value-type="float" office:value="0.06">
            <text:p>0.06</text:p>
          </table:table-cell>
          <table:table-cell table:formula="of:=ROUND([.A68];1)" calcext:value-type="float"/>
          <table:table-cell table:formula="of:=(SIGN([.A68])*IF(AND(ISEVEN((ABS([.A68]))*10^1);MOD((ABS([.A68]))*10^1;1)&lt;=0.5);ROUNDDOWN(ABS([.A68]);1);ROUND(ABS([.A68]);1)))" calcext:value-type="float"/>
          <table:table-cell table:formula="of:=[.B68]-[.C68]" calcext:value-type="float"/>
        </table:table-row>
        <table:table-row>
          <table:table-cell office:value-type="float" office:value="0.07">
            <text:p>0.07</text:p>
          </table:table-cell>
          <table:table-cell table:formula="of:=ROUND([.A69];1)" calcext:value-type="float"/>
          <table:table-cell table:formula="of:=(SIGN([.A69])*IF(AND(ISEVEN((ABS([.A69]))*10^1);MOD((ABS([.A69]))*10^1;1)&lt;=0.5);ROUNDDOWN(ABS([.A69]);1);ROUND(ABS([.A69]);1)))" calcext:value-type="float"/>
          <table:table-cell table:formula="of:=[.B69]-[.C69]" calcext:value-type="float"/>
        </table:table-row>
        <table:table-row>
          <table:table-cell office:value-type="float" office:value="0.08">
            <text:p>0.08</text:p>
          </table:table-cell>
          <table:table-cell table:formula="of:=ROUND([.A70];1)" calcext:value-type="float"/>
          <table:table-cell table:formula="of:=(SIGN([.A70])*IF(AND(ISEVEN((ABS([.A70]))*10^1);MOD((ABS([.A70]))*10^1;1)&lt;=0.5);ROUNDDOWN(ABS([.A70]);1);ROUND(ABS([.A70]);1)))" calcext:value-type="float"/>
          <table:table-cell table:formula="of:=[.B70]-[.C70]" calcext:value-type="float"/>
        </table:table-row>
        <table:table-row>
          <table:table-cell office:value-type="float" office:value="0.09">
            <text:p>0.09</text:p>
          </table:table-cell>
          <table:table-cell table:formula="of:=ROUND([.A71];1)" calcext:value-type="float"/>
          <table:table-cell table:formula="of:=(SIGN([.A71])*IF(AND(ISEVEN((ABS([.A71]))*10^1);MOD((ABS([.A71]))*10^1;1)&lt;=0.5);ROUNDDOWN(ABS([.A71]);1);ROUND(ABS([.A71]);1)))" calcext:value-type="float"/>
          <table:table-cell table:formula="of:=[.B71]-[.C71]" calcext:value-type="float"/>
        </table:table-row>
        <table:table-row>
          <table:table-cell office:value-type="float" office:value="0.1">
            <text:p>0.1</text:p>
          </table:table-cell>
          <table:table-cell table:formula="of:=ROUND([.A72];1)" calcext:value-type="float"/>
          <table:table-cell table:formula="of:=(SIGN([.A72])*IF(AND(ISEVEN((ABS([.A72]))*10^1);MOD((ABS([.A72]))*10^1;1)&lt;=0.5);ROUNDDOWN(ABS([.A72]);1);ROUND(ABS([.A72]);1)))" calcext:value-type="float"/>
          <table:table-cell table:formula="of:=[.B72]-[.C72]" calcext:value-type="float"/>
        </table:table-row>
        <table:table-row>
          <table:table-cell office:value-type="float" office:value="0.11">
            <text:p>0.11</text:p>
          </table:table-cell>
          <table:table-cell table:formula="of:=ROUND([.A73];1)" calcext:value-type="float"/>
          <table:table-cell table:formula="of:=(SIGN([.A73])*IF(AND(ISEVEN((ABS([.A73]))*10^1);MOD((ABS([.A73]))*10^1;1)&lt;=0.5);ROUNDDOWN(ABS([.A73]);1);ROUND(ABS([.A73]);1)))" calcext:value-type="float"/>
          <table:table-cell table:formula="of:=[.B73]-[.C73]" calcext:value-type="float"/>
        </table:table-row>
        <table:table-row>
          <table:table-cell office:value-type="float" office:value="0.12">
            <text:p>0.12</text:p>
          </table:table-cell>
          <table:table-cell table:formula="of:=ROUND([.A74];1)" calcext:value-type="float"/>
          <table:table-cell table:formula="of:=(SIGN([.A74])*IF(AND(ISEVEN((ABS([.A74]))*10^1);MOD((ABS([.A74]))*10^1;1)&lt;=0.5);ROUNDDOWN(ABS([.A74]);1);ROUND(ABS([.A74]);1)))" calcext:value-type="float"/>
          <table:table-cell table:formula="of:=[.B74]-[.C74]" calcext:value-type="float"/>
        </table:table-row>
        <table:table-row>
          <table:table-cell office:value-type="float" office:value="0.13">
            <text:p>0.13</text:p>
          </table:table-cell>
          <table:table-cell table:formula="of:=ROUND([.A75];1)" calcext:value-type="float"/>
          <table:table-cell table:formula="of:=(SIGN([.A75])*IF(AND(ISEVEN((ABS([.A75]))*10^1);MOD((ABS([.A75]))*10^1;1)&lt;=0.5);ROUNDDOWN(ABS([.A75]);1);ROUND(ABS([.A75]);1)))" calcext:value-type="float"/>
          <table:table-cell table:formula="of:=[.B75]-[.C75]" calcext:value-type="float"/>
        </table:table-row>
        <table:table-row>
          <table:table-cell office:value-type="float" office:value="0.14">
            <text:p>0.14</text:p>
          </table:table-cell>
          <table:table-cell table:formula="of:=ROUND([.A76];1)" calcext:value-type="float"/>
          <table:table-cell table:formula="of:=(SIGN([.A76])*IF(AND(ISEVEN((ABS([.A76]))*10^1);MOD((ABS([.A76]))*10^1;1)&lt;=0.5);ROUNDDOWN(ABS([.A76]);1);ROUND(ABS([.A76]);1)))" calcext:value-type="float"/>
          <table:table-cell table:formula="of:=[.B76]-[.C76]" calcext:value-type="float"/>
        </table:table-row>
        <table:table-row>
          <table:table-cell office:value-type="float" office:value="0.15">
            <text:p>0.15</text:p>
          </table:table-cell>
          <table:table-cell table:formula="of:=ROUND([.A77];1)" calcext:value-type="float"/>
          <table:table-cell table:formula="of:=(SIGN([.A77])*IF(AND(ISEVEN((ABS([.A77]))*10^1);MOD((ABS([.A77]))*10^1;1)&lt;=0.5);ROUNDDOWN(ABS([.A77]);1);ROUND(ABS([.A77]);1)))" calcext:value-type="float"/>
          <table:table-cell table:formula="of:=[.B77]-[.C77]" calcext:value-type="float"/>
        </table:table-row>
        <table:table-row>
          <table:table-cell office:value-type="float" office:value="0.16">
            <text:p>0.16</text:p>
          </table:table-cell>
          <table:table-cell table:formula="of:=ROUND([.A78];1)" calcext:value-type="float"/>
          <table:table-cell table:formula="of:=(SIGN([.A78])*IF(AND(ISEVEN((ABS([.A78]))*10^1);MOD((ABS([.A78]))*10^1;1)&lt;=0.5);ROUNDDOWN(ABS([.A78]);1);ROUND(ABS([.A78]);1)))" calcext:value-type="float"/>
          <table:table-cell table:formula="of:=[.B78]-[.C78]" calcext:value-type="float"/>
        </table:table-row>
        <table:table-row>
          <table:table-cell office:value-type="float" office:value="0.17">
            <text:p>0.17</text:p>
          </table:table-cell>
          <table:table-cell table:formula="of:=ROUND([.A79];1)" calcext:value-type="float"/>
          <table:table-cell table:formula="of:=(SIGN([.A79])*IF(AND(ISEVEN((ABS([.A79]))*10^1);MOD((ABS([.A79]))*10^1;1)&lt;=0.5);ROUNDDOWN(ABS([.A79]);1);ROUND(ABS([.A79]);1)))" calcext:value-type="float"/>
          <table:table-cell table:formula="of:=[.B79]-[.C79]" calcext:value-type="float"/>
        </table:table-row>
        <table:table-row>
          <table:table-cell office:value-type="float" office:value="0.18">
            <text:p>0.18</text:p>
          </table:table-cell>
          <table:table-cell table:formula="of:=ROUND([.A80];1)" calcext:value-type="float"/>
          <table:table-cell table:formula="of:=(SIGN([.A80])*IF(AND(ISEVEN((ABS([.A80]))*10^1);MOD((ABS([.A80]))*10^1;1)&lt;=0.5);ROUNDDOWN(ABS([.A80]);1);ROUND(ABS([.A80]);1)))" calcext:value-type="float"/>
          <table:table-cell table:formula="of:=[.B80]-[.C80]" calcext:value-type="float"/>
        </table:table-row>
        <table:table-row>
          <table:table-cell office:value-type="float" office:value="0.19">
            <text:p>0.19</text:p>
          </table:table-cell>
          <table:table-cell table:formula="of:=ROUND([.A81];1)" calcext:value-type="float"/>
          <table:table-cell table:formula="of:=(SIGN([.A81])*IF(AND(ISEVEN((ABS([.A81]))*10^1);MOD((ABS([.A81]))*10^1;1)&lt;=0.5);ROUNDDOWN(ABS([.A81]);1);ROUND(ABS([.A81]);1)))" calcext:value-type="float"/>
          <table:table-cell table:formula="of:=[.B81]-[.C81]" calcext:value-type="float"/>
        </table:table-row>
        <table:table-row>
          <table:table-cell office:value-type="float" office:value="0.2">
            <text:p>0.2</text:p>
          </table:table-cell>
          <table:table-cell table:formula="of:=ROUND([.A82];1)" calcext:value-type="float"/>
          <table:table-cell table:formula="of:=(SIGN([.A82])*IF(AND(ISEVEN((ABS([.A82]))*10^1);MOD((ABS([.A82]))*10^1;1)&lt;=0.5);ROUNDDOWN(ABS([.A82]);1);ROUND(ABS([.A82]);1)))" calcext:value-type="float"/>
          <table:table-cell table:formula="of:=[.B82]-[.C82]" calcext:value-type="float"/>
        </table:table-row>
        <table:table-row>
          <table:table-cell office:value-type="float" office:value="0.21">
            <text:p>0.21</text:p>
          </table:table-cell>
          <table:table-cell table:formula="of:=ROUND([.A83];1)" calcext:value-type="float"/>
          <table:table-cell table:formula="of:=(SIGN([.A83])*IF(AND(ISEVEN((ABS([.A83]))*10^1);MOD((ABS([.A83]))*10^1;1)&lt;=0.5);ROUNDDOWN(ABS([.A83]);1);ROUND(ABS([.A83]);1)))" calcext:value-type="float"/>
          <table:table-cell table:formula="of:=[.B83]-[.C83]" calcext:value-type="float"/>
        </table:table-row>
        <table:table-row>
          <table:table-cell office:value-type="float" office:value="0.22">
            <text:p>0.22</text:p>
          </table:table-cell>
          <table:table-cell table:formula="of:=ROUND([.A84];1)" calcext:value-type="float"/>
          <table:table-cell table:formula="of:=(SIGN([.A84])*IF(AND(ISEVEN((ABS([.A84]))*10^1);MOD((ABS([.A84]))*10^1;1)&lt;=0.5);ROUNDDOWN(ABS([.A84]);1);ROUND(ABS([.A84]);1)))" calcext:value-type="float"/>
          <table:table-cell table:formula="of:=[.B84]-[.C84]" calcext:value-type="float"/>
        </table:table-row>
        <table:table-row>
          <table:table-cell office:value-type="float" office:value="0.23">
            <text:p>0.23</text:p>
          </table:table-cell>
          <table:table-cell table:formula="of:=ROUND([.A85];1)" calcext:value-type="float"/>
          <table:table-cell table:formula="of:=(SIGN([.A85])*IF(AND(ISEVEN((ABS([.A85]))*10^1);MOD((ABS([.A85]))*10^1;1)&lt;=0.5);ROUNDDOWN(ABS([.A85]);1);ROUND(ABS([.A85]);1)))" calcext:value-type="float"/>
          <table:table-cell table:formula="of:=[.B85]-[.C85]" calcext:value-type="float"/>
        </table:table-row>
        <table:table-row>
          <table:table-cell office:value-type="float" office:value="0.24">
            <text:p>0.24</text:p>
          </table:table-cell>
          <table:table-cell table:formula="of:=ROUND([.A86];1)" calcext:value-type="float"/>
          <table:table-cell table:formula="of:=(SIGN([.A86])*IF(AND(ISEVEN((ABS([.A86]))*10^1);MOD((ABS([.A86]))*10^1;1)&lt;=0.5);ROUNDDOWN(ABS([.A86]);1);ROUND(ABS([.A86]);1)))" calcext:value-type="float"/>
          <table:table-cell table:formula="of:=[.B86]-[.C86]" calcext:value-type="float"/>
        </table:table-row>
        <table:table-row>
          <table:table-cell office:value-type="float" office:value="0.25">
            <text:p>0.25</text:p>
          </table:table-cell>
          <table:table-cell table:formula="of:=ROUND([.A87];1)" calcext:value-type="float"/>
          <table:table-cell table:formula="of:=(SIGN([.A87])*IF(AND(ISEVEN((ABS([.A87]))*10^1);MOD((ABS([.A87]))*10^1;1)&lt;=0.5);ROUNDDOWN(ABS([.A87]);1);ROUND(ABS([.A87]);1)))" calcext:value-type="float"/>
          <table:table-cell table:formula="of:=[.B87]-[.C87]" calcext:value-type="float"/>
        </table:table-row>
        <table:table-row>
          <table:table-cell office:value-type="float" office:value="0.26">
            <text:p>0.26</text:p>
          </table:table-cell>
          <table:table-cell table:formula="of:=ROUND([.A88];1)" calcext:value-type="float"/>
          <table:table-cell table:formula="of:=(SIGN([.A88])*IF(AND(ISEVEN((ABS([.A88]))*10^1);MOD((ABS([.A88]))*10^1;1)&lt;=0.5);ROUNDDOWN(ABS([.A88]);1);ROUND(ABS([.A88]);1)))" calcext:value-type="float"/>
          <table:table-cell table:formula="of:=[.B88]-[.C88]" calcext:value-type="float"/>
        </table:table-row>
        <table:table-row>
          <table:table-cell office:value-type="float" office:value="0.27">
            <text:p>0.27</text:p>
          </table:table-cell>
          <table:table-cell table:formula="of:=ROUND([.A89];1)" calcext:value-type="float"/>
          <table:table-cell table:formula="of:=(SIGN([.A89])*IF(AND(ISEVEN((ABS([.A89]))*10^1);MOD((ABS([.A89]))*10^1;1)&lt;=0.5);ROUNDDOWN(ABS([.A89]);1);ROUND(ABS([.A89]);1)))" calcext:value-type="float"/>
          <table:table-cell table:formula="of:=[.B89]-[.C89]" calcext:value-type="float"/>
        </table:table-row>
        <table:table-row>
          <table:table-cell office:value-type="float" office:value="0.28">
            <text:p>0.28</text:p>
          </table:table-cell>
          <table:table-cell table:formula="of:=ROUND([.A90];1)" calcext:value-type="float"/>
          <table:table-cell table:formula="of:=(SIGN([.A90])*IF(AND(ISEVEN((ABS([.A90]))*10^1);MOD((ABS([.A90]))*10^1;1)&lt;=0.5);ROUNDDOWN(ABS([.A90]);1);ROUND(ABS([.A90]);1)))" calcext:value-type="float"/>
          <table:table-cell table:formula="of:=[.B90]-[.C90]" calcext:value-type="float"/>
        </table:table-row>
        <table:table-row>
          <table:table-cell office:value-type="float" office:value="0.29">
            <text:p>0.29</text:p>
          </table:table-cell>
          <table:table-cell table:formula="of:=ROUND([.A91];1)" calcext:value-type="float"/>
          <table:table-cell table:formula="of:=(SIGN([.A91])*IF(AND(ISEVEN((ABS([.A91]))*10^1);MOD((ABS([.A91]))*10^1;1)&lt;=0.5);ROUNDDOWN(ABS([.A91]);1);ROUND(ABS([.A91]);1)))" calcext:value-type="float"/>
          <table:table-cell table:formula="of:=[.B91]-[.C91]" calcext:value-type="float"/>
        </table:table-row>
        <table:table-row>
          <table:table-cell office:value-type="float" office:value="0.3">
            <text:p>0.3</text:p>
          </table:table-cell>
          <table:table-cell table:formula="of:=ROUND([.A92];1)" calcext:value-type="float"/>
          <table:table-cell table:formula="of:=(SIGN([.A92])*IF(AND(ISEVEN((ABS([.A92]))*10^1);MOD((ABS([.A92]))*10^1;1)&lt;=0.5);ROUNDDOWN(ABS([.A92]);1);ROUND(ABS([.A92]);1)))" calcext:value-type="float"/>
          <table:table-cell table:formula="of:=[.B92]-[.C92]" calcext:value-type="float"/>
        </table:table-row>
        <table:table-row>
          <table:table-cell office:value-type="float" office:value="0.31">
            <text:p>0.31</text:p>
          </table:table-cell>
          <table:table-cell table:formula="of:=ROUND([.A93];1)" calcext:value-type="float"/>
          <table:table-cell table:formula="of:=(SIGN([.A93])*IF(AND(ISEVEN((ABS([.A93]))*10^1);MOD((ABS([.A93]))*10^1;1)&lt;=0.5);ROUNDDOWN(ABS([.A93]);1);ROUND(ABS([.A93]);1)))" calcext:value-type="float"/>
          <table:table-cell table:formula="of:=[.B93]-[.C93]" calcext:value-type="float"/>
        </table:table-row>
        <table:table-row>
          <table:table-cell office:value-type="float" office:value="0.32">
            <text:p>0.32</text:p>
          </table:table-cell>
          <table:table-cell table:formula="of:=ROUND([.A94];1)" calcext:value-type="float"/>
          <table:table-cell table:formula="of:=(SIGN([.A94])*IF(AND(ISEVEN((ABS([.A94]))*10^1);MOD((ABS([.A94]))*10^1;1)&lt;=0.5);ROUNDDOWN(ABS([.A94]);1);ROUND(ABS([.A94]);1)))" calcext:value-type="float"/>
          <table:table-cell table:formula="of:=[.B94]-[.C94]" calcext:value-type="float"/>
        </table:table-row>
        <table:table-row>
          <table:table-cell office:value-type="float" office:value="0.33">
            <text:p>0.33</text:p>
          </table:table-cell>
          <table:table-cell table:formula="of:=ROUND([.A95];1)" calcext:value-type="float"/>
          <table:table-cell table:formula="of:=(SIGN([.A95])*IF(AND(ISEVEN((ABS([.A95]))*10^1);MOD((ABS([.A95]))*10^1;1)&lt;=0.5);ROUNDDOWN(ABS([.A95]);1);ROUND(ABS([.A95]);1)))" calcext:value-type="float"/>
          <table:table-cell table:formula="of:=[.B95]-[.C95]" calcext:value-type="float"/>
        </table:table-row>
        <table:table-row>
          <table:table-cell office:value-type="float" office:value="0.34">
            <text:p>0.34</text:p>
          </table:table-cell>
          <table:table-cell table:formula="of:=ROUND([.A96];1)" calcext:value-type="float"/>
          <table:table-cell table:formula="of:=(SIGN([.A96])*IF(AND(ISEVEN((ABS([.A96]))*10^1);MOD((ABS([.A96]))*10^1;1)&lt;=0.5);ROUNDDOWN(ABS([.A96]);1);ROUND(ABS([.A96]);1)))" calcext:value-type="float"/>
          <table:table-cell table:formula="of:=[.B96]-[.C96]" calcext:value-type="float"/>
        </table:table-row>
        <table:table-row>
          <table:table-cell office:value-type="float" office:value="0.35">
            <text:p>0.35</text:p>
          </table:table-cell>
          <table:table-cell table:formula="of:=ROUND([.A97];1)" calcext:value-type="float"/>
          <table:table-cell table:formula="of:=(SIGN([.A97])*IF(AND(ISEVEN((ABS([.A97]))*10^1);MOD((ABS([.A97]))*10^1;1)&lt;=0.5);ROUNDDOWN(ABS([.A97]);1);ROUND(ABS([.A97]);1)))" calcext:value-type="float"/>
          <table:table-cell table:formula="of:=[.B97]-[.C97]" calcext:value-type="float"/>
        </table:table-row>
        <table:table-row>
          <table:table-cell office:value-type="float" office:value="0.36">
            <text:p>0.36</text:p>
          </table:table-cell>
          <table:table-cell table:formula="of:=ROUND([.A98];1)" calcext:value-type="float"/>
          <table:table-cell table:formula="of:=(SIGN([.A98])*IF(AND(ISEVEN((ABS([.A98]))*10^1);MOD((ABS([.A98]))*10^1;1)&lt;=0.5);ROUNDDOWN(ABS([.A98]);1);ROUND(ABS([.A98]);1)))" calcext:value-type="float"/>
          <table:table-cell table:formula="of:=[.B98]-[.C98]" calcext:value-type="float"/>
        </table:table-row>
        <table:table-row>
          <table:table-cell office:value-type="float" office:value="0.37">
            <text:p>0.37</text:p>
          </table:table-cell>
          <table:table-cell table:formula="of:=ROUND([.A99];1)" calcext:value-type="float"/>
          <table:table-cell table:formula="of:=(SIGN([.A99])*IF(AND(ISEVEN((ABS([.A99]))*10^1);MOD((ABS([.A99]))*10^1;1)&lt;=0.5);ROUNDDOWN(ABS([.A99]);1);ROUND(ABS([.A99]);1)))" calcext:value-type="float"/>
          <table:table-cell table:formula="of:=[.B99]-[.C99]" calcext:value-type="float"/>
        </table:table-row>
        <table:table-row>
          <table:table-cell office:value-type="float" office:value="0.38">
            <text:p>0.38</text:p>
          </table:table-cell>
          <table:table-cell table:formula="of:=ROUND([.A100];1)" calcext:value-type="float"/>
          <table:table-cell table:formula="of:=(SIGN([.A100])*IF(AND(ISEVEN((ABS([.A100]))*10^1);MOD((ABS([.A100]))*10^1;1)&lt;=0.5);ROUNDDOWN(ABS([.A100]);1);ROUND(ABS([.A100]);1)))" calcext:value-type="float"/>
          <table:table-cell table:formula="of:=[.B100]-[.C100]" calcext:value-type="float"/>
        </table:table-row>
        <table:table-row>
          <table:table-cell office:value-type="float" office:value="0.39">
            <text:p>0.39</text:p>
          </table:table-cell>
          <table:table-cell table:formula="of:=ROUND([.A101];1)" calcext:value-type="float"/>
          <table:table-cell table:formula="of:=(SIGN([.A101])*IF(AND(ISEVEN((ABS([.A101]))*10^1);MOD((ABS([.A101]))*10^1;1)&lt;=0.5);ROUNDDOWN(ABS([.A101]);1);ROUND(ABS([.A101]);1)))" calcext:value-type="float"/>
          <table:table-cell table:formula="of:=[.B101]-[.C101]" calcext:value-type="float"/>
        </table:table-row>
        <table:table-row>
          <table:table-cell office:value-type="float" office:value="0.4">
            <text:p>0.4</text:p>
          </table:table-cell>
          <table:table-cell table:formula="of:=ROUND([.A102];1)" calcext:value-type="float"/>
          <table:table-cell table:formula="of:=(SIGN([.A102])*IF(AND(ISEVEN((ABS([.A102]))*10^1);MOD((ABS([.A102]))*10^1;1)&lt;=0.5);ROUNDDOWN(ABS([.A102]);1);ROUND(ABS([.A102]);1)))" calcext:value-type="float"/>
          <table:table-cell table:formula="of:=[.B102]-[.C102]" calcext:value-type="float"/>
        </table:table-row>
        <table:table-row>
          <table:table-cell office:value-type="float" office:value="0.41">
            <text:p>0.41</text:p>
          </table:table-cell>
          <table:table-cell table:formula="of:=ROUND([.A103];1)" calcext:value-type="float"/>
          <table:table-cell table:formula="of:=(SIGN([.A103])*IF(AND(ISEVEN((ABS([.A103]))*10^1);MOD((ABS([.A103]))*10^1;1)&lt;=0.5);ROUNDDOWN(ABS([.A103]);1);ROUND(ABS([.A103]);1)))" calcext:value-type="float"/>
          <table:table-cell table:formula="of:=[.B103]-[.C103]" calcext:value-type="float"/>
        </table:table-row>
        <table:table-row>
          <table:table-cell office:value-type="float" office:value="0.42">
            <text:p>0.42</text:p>
          </table:table-cell>
          <table:table-cell table:formula="of:=ROUND([.A104];1)" calcext:value-type="float"/>
          <table:table-cell table:formula="of:=(SIGN([.A104])*IF(AND(ISEVEN((ABS([.A104]))*10^1);MOD((ABS([.A104]))*10^1;1)&lt;=0.5);ROUNDDOWN(ABS([.A104]);1);ROUND(ABS([.A104]);1)))" calcext:value-type="float"/>
          <table:table-cell table:formula="of:=[.B104]-[.C104]" calcext:value-type="float"/>
        </table:table-row>
        <table:table-row>
          <table:table-cell office:value-type="float" office:value="0.43">
            <text:p>0.43</text:p>
          </table:table-cell>
          <table:table-cell table:formula="of:=ROUND([.A105];1)" calcext:value-type="float"/>
          <table:table-cell table:formula="of:=(SIGN([.A105])*IF(AND(ISEVEN((ABS([.A105]))*10^1);MOD((ABS([.A105]))*10^1;1)&lt;=0.5);ROUNDDOWN(ABS([.A105]);1);ROUND(ABS([.A105]);1)))" calcext:value-type="float"/>
          <table:table-cell table:formula="of:=[.B105]-[.C105]" calcext:value-type="float"/>
        </table:table-row>
        <table:table-row>
          <table:table-cell office:value-type="float" office:value="0.44">
            <text:p>0.44</text:p>
          </table:table-cell>
          <table:table-cell table:formula="of:=ROUND([.A106];1)" calcext:value-type="float"/>
          <table:table-cell table:formula="of:=(SIGN([.A106])*IF(AND(ISEVEN((ABS([.A106]))*10^1);MOD((ABS([.A106]))*10^1;1)&lt;=0.5);ROUNDDOWN(ABS([.A106]);1);ROUND(ABS([.A106]);1)))" calcext:value-type="float"/>
          <table:table-cell table:formula="of:=[.B106]-[.C106]" calcext:value-type="float"/>
        </table:table-row>
        <table:table-row>
          <table:table-cell office:value-type="float" office:value="0.45">
            <text:p>0.45</text:p>
          </table:table-cell>
          <table:table-cell table:formula="of:=ROUND([.A107];1)" calcext:value-type="float"/>
          <table:table-cell table:formula="of:=(SIGN([.A107])*IF(AND(ISEVEN((ABS([.A107]))*10^1);MOD((ABS([.A107]))*10^1;1)&lt;=0.5);ROUNDDOWN(ABS([.A107]);1);ROUND(ABS([.A107]);1)))" calcext:value-type="float"/>
          <table:table-cell table:formula="of:=[.B107]-[.C107]" calcext:value-type="float"/>
        </table:table-row>
        <table:table-row>
          <table:table-cell office:value-type="float" office:value="0.46">
            <text:p>0.46</text:p>
          </table:table-cell>
          <table:table-cell table:formula="of:=ROUND([.A108];1)" calcext:value-type="float"/>
          <table:table-cell table:formula="of:=(SIGN([.A108])*IF(AND(ISEVEN((ABS([.A108]))*10^1);MOD((ABS([.A108]))*10^1;1)&lt;=0.5);ROUNDDOWN(ABS([.A108]);1);ROUND(ABS([.A108]);1)))" calcext:value-type="float"/>
          <table:table-cell table:formula="of:=[.B108]-[.C108]" calcext:value-type="float"/>
        </table:table-row>
        <table:table-row>
          <table:table-cell office:value-type="float" office:value="0.47">
            <text:p>0.47</text:p>
          </table:table-cell>
          <table:table-cell table:formula="of:=ROUND([.A109];1)" calcext:value-type="float"/>
          <table:table-cell table:formula="of:=(SIGN([.A109])*IF(AND(ISEVEN((ABS([.A109]))*10^1);MOD((ABS([.A109]))*10^1;1)&lt;=0.5);ROUNDDOWN(ABS([.A109]);1);ROUND(ABS([.A109]);1)))" calcext:value-type="float"/>
          <table:table-cell table:formula="of:=[.B109]-[.C109]" calcext:value-type="float"/>
        </table:table-row>
        <table:table-row>
          <table:table-cell office:value-type="float" office:value="0.48">
            <text:p>0.48</text:p>
          </table:table-cell>
          <table:table-cell table:formula="of:=ROUND([.A110];1)" calcext:value-type="float"/>
          <table:table-cell table:formula="of:=(SIGN([.A110])*IF(AND(ISEVEN((ABS([.A110]))*10^1);MOD((ABS([.A110]))*10^1;1)&lt;=0.5);ROUNDDOWN(ABS([.A110]);1);ROUND(ABS([.A110]);1)))" calcext:value-type="float"/>
          <table:table-cell table:formula="of:=[.B110]-[.C110]" calcext:value-type="float"/>
        </table:table-row>
        <table:table-row>
          <table:table-cell office:value-type="float" office:value="0.49">
            <text:p>0.49</text:p>
          </table:table-cell>
          <table:table-cell table:formula="of:=ROUND([.A111];1)" calcext:value-type="float"/>
          <table:table-cell table:formula="of:=(SIGN([.A111])*IF(AND(ISEVEN((ABS([.A111]))*10^1);MOD((ABS([.A111]))*10^1;1)&lt;=0.5);ROUNDDOWN(ABS([.A111]);1);ROUND(ABS([.A111]);1)))" calcext:value-type="float"/>
          <table:table-cell table:formula="of:=[.B111]-[.C111]" calcext:value-type="float"/>
        </table:table-row>
        <table:table-row>
          <table:table-cell office:value-type="float" office:value="0.5">
            <text:p>0.5</text:p>
          </table:table-cell>
          <table:table-cell table:formula="of:=ROUND([.A112];1)" calcext:value-type="float"/>
          <table:table-cell table:formula="of:=(SIGN([.A112])*IF(AND(ISEVEN((ABS([.A112]))*10^1);MOD((ABS([.A112]))*10^1;1)&lt;=0.5);ROUNDDOWN(ABS([.A112]);1);ROUND(ABS([.A112]);1)))" calcext:value-type="float"/>
          <table:table-cell table:formula="of:=[.B112]-[.C112]" calcext:value-type="float"/>
        </table:table-row>
        <table:table-row>
          <table:table-cell office:value-type="float" office:value="0.51">
            <text:p>0.51</text:p>
          </table:table-cell>
          <table:table-cell table:formula="of:=ROUND([.A113];1)" calcext:value-type="float"/>
          <table:table-cell table:formula="of:=(SIGN([.A113])*IF(AND(ISEVEN((ABS([.A113]))*10^1);MOD((ABS([.A113]))*10^1;1)&lt;=0.5);ROUNDDOWN(ABS([.A113]);1);ROUND(ABS([.A113]);1)))" calcext:value-type="float"/>
          <table:table-cell table:formula="of:=[.B113]-[.C113]" calcext:value-type="float"/>
        </table:table-row>
        <table:table-row>
          <table:table-cell office:value-type="float" office:value="0.52">
            <text:p>0.52</text:p>
          </table:table-cell>
          <table:table-cell table:formula="of:=ROUND([.A114];1)" calcext:value-type="float"/>
          <table:table-cell table:formula="of:=(SIGN([.A114])*IF(AND(ISEVEN((ABS([.A114]))*10^1);MOD((ABS([.A114]))*10^1;1)&lt;=0.5);ROUNDDOWN(ABS([.A114]);1);ROUND(ABS([.A114]);1)))" calcext:value-type="float"/>
          <table:table-cell table:formula="of:=[.B114]-[.C114]" calcext:value-type="float"/>
        </table:table-row>
        <table:table-row>
          <table:table-cell office:value-type="float" office:value="0.53">
            <text:p>0.53</text:p>
          </table:table-cell>
          <table:table-cell table:formula="of:=ROUND([.A115];1)" calcext:value-type="float"/>
          <table:table-cell table:formula="of:=(SIGN([.A115])*IF(AND(ISEVEN((ABS([.A115]))*10^1);MOD((ABS([.A115]))*10^1;1)&lt;=0.5);ROUNDDOWN(ABS([.A115]);1);ROUND(ABS([.A115]);1)))" calcext:value-type="float"/>
          <table:table-cell table:formula="of:=[.B115]-[.C115]" calcext:value-type="float"/>
        </table:table-row>
        <table:table-row>
          <table:table-cell office:value-type="float" office:value="0.54">
            <text:p>0.54</text:p>
          </table:table-cell>
          <table:table-cell table:formula="of:=ROUND([.A116];1)" calcext:value-type="float"/>
          <table:table-cell table:formula="of:=(SIGN([.A116])*IF(AND(ISEVEN((ABS([.A116]))*10^1);MOD((ABS([.A116]))*10^1;1)&lt;=0.5);ROUNDDOWN(ABS([.A116]);1);ROUND(ABS([.A116]);1)))" calcext:value-type="float"/>
          <table:table-cell table:formula="of:=[.B116]-[.C116]" calcext:value-type="float"/>
        </table:table-row>
        <table:table-row>
          <table:table-cell office:value-type="float" office:value="0.55">
            <text:p>0.55</text:p>
          </table:table-cell>
          <table:table-cell table:formula="of:=ROUND([.A117];1)" calcext:value-type="float"/>
          <table:table-cell table:formula="of:=(SIGN([.A117])*IF(AND(ISEVEN((ABS([.A117]))*10^1);MOD((ABS([.A117]))*10^1;1)&lt;=0.5);ROUNDDOWN(ABS([.A117]);1);ROUND(ABS([.A117]);1)))" calcext:value-type="float"/>
          <table:table-cell table:formula="of:=[.B117]-[.C117]" calcext:value-type="float"/>
        </table:table-row>
        <table:table-row>
          <table:table-cell office:value-type="float" office:value="0.56">
            <text:p>0.56</text:p>
          </table:table-cell>
          <table:table-cell table:formula="of:=ROUND([.A118];1)" calcext:value-type="float"/>
          <table:table-cell table:formula="of:=(SIGN([.A118])*IF(AND(ISEVEN((ABS([.A118]))*10^1);MOD((ABS([.A118]))*10^1;1)&lt;=0.5);ROUNDDOWN(ABS([.A118]);1);ROUND(ABS([.A118]);1)))" calcext:value-type="float"/>
          <table:table-cell table:formula="of:=[.B118]-[.C118]" calcext:value-type="float"/>
        </table:table-row>
        <table:table-row>
          <table:table-cell office:value-type="float" office:value="0.57">
            <text:p>0.57</text:p>
          </table:table-cell>
          <table:table-cell table:formula="of:=ROUND([.A119];1)" calcext:value-type="float"/>
          <table:table-cell table:formula="of:=(SIGN([.A119])*IF(AND(ISEVEN((ABS([.A119]))*10^1);MOD((ABS([.A119]))*10^1;1)&lt;=0.5);ROUNDDOWN(ABS([.A119]);1);ROUND(ABS([.A119]);1)))" calcext:value-type="float"/>
          <table:table-cell table:formula="of:=[.B119]-[.C119]" calcext:value-type="float"/>
        </table:table-row>
        <table:table-row>
          <table:table-cell office:value-type="float" office:value="0.58">
            <text:p>0.58</text:p>
          </table:table-cell>
          <table:table-cell table:formula="of:=ROUND([.A120];1)" calcext:value-type="float"/>
          <table:table-cell table:formula="of:=(SIGN([.A120])*IF(AND(ISEVEN((ABS([.A120]))*10^1);MOD((ABS([.A120]))*10^1;1)&lt;=0.5);ROUNDDOWN(ABS([.A120]);1);ROUND(ABS([.A120]);1)))" calcext:value-type="float"/>
          <table:table-cell table:formula="of:=[.B120]-[.C120]" calcext:value-type="float"/>
        </table:table-row>
        <table:table-row>
          <table:table-cell office:value-type="float" office:value="0.59">
            <text:p>0.59</text:p>
          </table:table-cell>
          <table:table-cell table:formula="of:=ROUND([.A121];1)" calcext:value-type="float"/>
          <table:table-cell table:formula="of:=(SIGN([.A121])*IF(AND(ISEVEN((ABS([.A121]))*10^1);MOD((ABS([.A121]))*10^1;1)&lt;=0.5);ROUNDDOWN(ABS([.A121]);1);ROUND(ABS([.A121]);1)))" calcext:value-type="float"/>
          <table:table-cell table:formula="of:=[.B121]-[.C121]" calcext:value-type="float"/>
        </table:table-row>
        <table:table-row>
          <table:table-cell office:value-type="float" office:value="0.6">
            <text:p>0.6</text:p>
          </table:table-cell>
          <table:table-cell table:formula="of:=ROUND([.A122];1)" calcext:value-type="float"/>
          <table:table-cell table:formula="of:=(SIGN([.A122])*IF(AND(ISEVEN((ABS([.A122]))*10^1);MOD((ABS([.A122]))*10^1;1)&lt;=0.5);ROUNDDOWN(ABS([.A122]);1);ROUND(ABS([.A122]);1)))" calcext:value-type="float"/>
          <table:table-cell table:formula="of:=[.B122]-[.C122]" calcext:value-type="float"/>
        </table:table-row>
      </table:table>
      <table:table table:name="Data table"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Fast Flamingo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Ugly Bear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Pink Skunk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Fast Turd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Brown Bear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Brown Skunk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Ugly Turd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Brown Turd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Brown Skunk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Yellow Skunk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Brown Skunk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Pink Bear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Brown Skunk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Brown Flamingo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Yellow Flamingo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Pink Turd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Fast Turd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Brown Turd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Ugly Skunk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Pink Turd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Ugly Bear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Fast Turd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Ugly Flamingo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Brown Flamingo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Yellow Turd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Brown Skunk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Yellow Bear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Ugly Bear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Fast Flamingo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Yellow Skunk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Fast Bear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Brown Turd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Fast Flamingo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Fast Flamingo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Yellow Flamingo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Brown Flamingo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Ugly Flamingo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Ugly Flamingo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Fast Turd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Brown Turd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Pink Bear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Ugly Flamingo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Yellow Flamingo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Fast Flamingo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Yellow Skunk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Brown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Ugly Bear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Ugly Bear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Yellow Flamingo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Yellow Skunk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Yellow Turd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Yellow Flamingo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Fast Turd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Yellow Turd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Ugly Skunk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Pink Skunk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Yellow Turd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Fast Turd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Brown Skunk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Pink Flamingo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Fast Bear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Pink Skunk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Pink Turd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Ugly Bear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Pink Flamingo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Ugly Skunk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Yellow Flamingo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Yellow Turd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Pink Flamingos</text:p>
          </table:table-cell>
          <table:table-cell office:value-type="float" office:value="14">
            <text:p>14</text:p>
          </table:table-cell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Average:</text:p>
          </table:table-cell>
          <table:table-cell table:formula="of:=IF(SUBTOTAL(2;[.D2:.D101])&gt;0;SUBTOTAL(1;[.D2:.D101]);)" calcext:value-type="float"/>
        </table:table-row>
        <table:table-row>
          <table:table-cell/>
          <table:table-cell/>
          <table:table-cell office:value-type="string">
            <text:p>Sum:</text:p>
          </table:table-cell>
          <table:table-cell table:formula="of:=SUBTOTAL(9;[.D2:.D101])" calcext:value-type="float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2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number:number-style style:name="auto26">
      <number:number number:decimal-places="0" number:min-decimal-places="0" number:min-integer-digits="1"/>
    </number:number-style>
    <number:number-style style:name="auto28">
      <number:number number:decimal-places="1" number:min-decimal-places="1" number:min-integer-digits="1"/>
    </number:number-style>
    <number:number-style style:name="auto30">
      <number:number number:decimal-places="2" number:min-decimal-places="2" number:min-integer-digits="1"/>
    </number:number-style>
    <number:number-style style:name="auto32">
      <number:number number:decimal-places="3" number:min-decimal-places="3" number:min-integer-digits="1"/>
    </number:number-style>
    <number:number-style style:name="auto34">
      <number:number number:decimal-places="4" number:min-decimal-places="4" number:min-integer-digits="1"/>
    </number:number-style>
    <number:number-style style:name="auto36">
      <number:number number:decimal-places="5" number:min-decimal-places="5" number:min-integer-digits="1"/>
    </number:number-style>
    <number:percentage-style style:name="auto38">
      <number:number number:decimal-places="0" number:min-decimal-places="0" number:min-integer-digits="1"/>
      <number:text> %</number:text>
    </number:percentage-style>
    <number:percentage-style style:name="auto40">
      <number:number number:decimal-places="1" number:min-decimal-places="1" number:min-integer-digits="1"/>
      <number:text> %</number:text>
    </number:percentage-style>
    <number:percentage-style style:name="auto42">
      <number:number number:decimal-places="2" number:min-decimal-places="2" number:min-integer-digits="1"/>
      <number:text> %</number:text>
    </number:percentage-style>
    <number:date-style style:name="auto44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46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https://github.com/johndoe31415/odsexport v0.0.5rc0</meta:generator>
    <meta:creation-date>2026-05-22T11:30:03</meta:creation-date>
    <dc:date>2026-05-22T11:30:03</dc:date>
  </office:meta>
</office:document-meta>
</file>