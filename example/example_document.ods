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_0" style:display-name="cond0_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_0" style:display-name="cond1_0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_0" style:display-name="cond2_0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cond3_0" style:display-name="cond3_0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_0" style:display-name="cond4_0" style:family="table-cell" style:data-style-name="auto10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1" style:display-name="cond4_1" style:family="table-cell" style:data-style-name="auto11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2" style:display-name="cond4_2" style:family="table-cell" style:data-style-name="auto12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3" style:display-name="cond4_3" style:family="table-cell" style:data-style-name="auto13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dr" style:display-name="dr" style:family="table-row"/>
    <style:style style:name="dc" style:display-name="dc" style:family="table-column"/>
    <style:style style:name="auto14" style:display-name="auto14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5" style:display-name="auto15" style:family="table-cell">
      <style:text-properties fo:font-weight="bold"/>
    </style:style>
    <style:style style:name="auto16" style:display-name="auto16" style:family="table-cell">
      <style:text-properties fo:font-style="italic"/>
    </style:style>
    <style:style style:name="auto17" style:display-name="auto17" style:family="table-cell">
      <style:paragraph-properties fo:text-align="start"/>
      <style:text-properties/>
    </style:style>
    <style:style style:name="auto18" style:display-name="auto18" style:family="table-cell">
      <style:paragraph-properties fo:text-align="center"/>
      <style:text-properties/>
    </style:style>
    <style:style style:name="auto19" style:display-name="auto19" style:family="table-cell">
      <style:paragraph-properties fo:text-align="end"/>
      <style:text-properties/>
    </style:style>
    <style:style style:name="auto20" style:display-name="auto20" style:family="table-cell">
      <style:text-properties fo:color="#0000ff"/>
    </style:style>
    <style:style style:name="auto21" style:display-name="auto21" style:family="table-cell">
      <style:table-cell-properties fo:background-color="#aaaaff"/>
      <style:text-properties/>
    </style:style>
    <style:style style:name="auto22" style:display-name="auto22" style:family="table-cell">
      <style:table-cell-properties fo:border-top="0.7500pt solid #ff0000" fo:border-left="0.7500pt solid #ff0000"/>
      <style:text-properties/>
    </style:style>
    <style:style style:name="auto23" style:display-name="auto23" style:family="table-cell">
      <style:table-cell-properties fo:border-top="0.7500pt solid #ff0000"/>
      <style:text-properties/>
    </style:style>
    <style:style style:name="auto24" style:display-name="auto24" style:family="table-cell">
      <style:table-cell-properties fo:border-top="0.7500pt solid #ff0000" fo:border-right="0.7500pt solid #ff0000"/>
      <style:text-properties/>
    </style:style>
    <style:style style:name="auto25" style:display-name="auto25" style:family="table-cell">
      <style:table-cell-properties fo:border-left="0.7500pt solid #ff0000"/>
      <style:text-properties/>
    </style:style>
    <style:style style:name="auto26" style:display-name="auto26" style:family="table-cell">
      <style:table-cell-properties fo:border-right="0.7500pt solid #ff0000"/>
      <style:text-properties/>
    </style:style>
    <style:style style:name="auto27" style:display-name="auto27" style:family="table-cell">
      <style:table-cell-properties fo:border-bottom="0.7500pt solid #ff0000" fo:border-left="0.7500pt solid #ff0000"/>
      <style:text-properties/>
    </style:style>
    <style:style style:name="auto28" style:display-name="auto28" style:family="table-cell">
      <style:table-cell-properties fo:border-bottom="0.7500pt solid #ff0000"/>
      <style:text-properties/>
    </style:style>
    <style:style style:name="auto29" style:display-name="auto29" style:family="table-cell">
      <style:table-cell-properties fo:wrap-option="wrap" fo:border-bottom="0.7500pt solid #ff0000" fo:border-right="0.7500pt solid #ff0000"/>
      <style:text-properties/>
    </style:style>
    <style:style style:name="auto30" style:display-name="auto30" style:family="table-row">
      <style:table-row-properties style:row-height="1cm"/>
    </style:style>
    <style:style style:name="auto31" style:display-name="auto31" style:family="table-cell">
      <style:table-cell-properties style:vertical-align="middle"/>
      <style:text-properties/>
    </style:style>
    <style:style style:name="auto32" style:display-name="auto32" style:family="table-row">
      <style:table-row-properties style:row-height="2cm"/>
    </style:style>
    <style:style style:name="auto33" style:display-name="auto33" style:family="table-column">
      <style:table-column-properties style:column-width="4cm"/>
    </style:style>
    <style:style style:name="auto34" style:display-name="auto34" style:family="table-column">
      <style:table-column-properties style:column-width="5cm"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10">
      <style:text-properties/>
    </style:style>
    <style:style style:name="auto38" style:display-name="auto38" style:family="table-cell" style:data-style-name="auto39">
      <style:text-properties/>
    </style:style>
    <style:style style:name="auto40" style:display-name="auto40" style:family="table-cell" style:data-style-name="auto11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12">
      <style:text-properties/>
    </style:style>
    <style:style style:name="auto48" style:display-name="auto48" style:family="table-cell" style:data-style-name="auto13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4" office:value-type="string">
            <text:p>Rotated Arial</text:p>
          </table:table-cell>
          <table:table-cell table:style-name="auto15" office:value-type="string">
            <text:p>Bold only</text:p>
          </table:table-cell>
          <table:table-cell table:style-name="auto16" office:value-type="string">
            <text:p>Italics only</text:p>
          </table:table-cell>
          <table:table-cell table:style-name="auto17" office:value-type="string">
            <text:p>Left adjust</text:p>
          </table:table-cell>
          <table:table-cell table:style-name="auto18" office:value-type="string">
            <text:p>Centered</text:p>
          </table:table-cell>
          <table:table-cell table:style-name="auto19" office:value-type="string">
            <text:p>Right adjust</text:p>
          </table:table-cell>
          <table:table-cell table:style-name="auto20" office:value-type="string">
            <text:p>Blue text</text:p>
          </table:table-cell>
          <table:table-cell table:style-name="auto21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2" office:value-type="string">
            <text:p>Top left corner of red box</text:p>
          </table:table-cell>
          <table:table-cell table:style-name="auto23"/>
          <table:table-cell table:style-name="auto23"/>
          <table:table-cell table:style-name="auto23"/>
          <table:table-cell table:style-name="auto23"/>
          <table:table-cell table:style-name="auto24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5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26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7"/>
          <table:table-cell table:style-name="auto28"/>
          <table:table-cell table:style-name="auto28"/>
          <table:table-cell table:style-name="auto28"/>
          <table:table-cell table:style-name="auto28"/>
          <table:table-cell table:style-name="auto29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0">
          <table:table-cell table:style-name="auto31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2">
          <table:table-cell table:style-name="auto31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number-columns-spanned="3" table:number-rows-spanned="3" office:value-type="string">
            <text:p>This is a 3x3 grid (A18:C20).</text:p>
          </table:table-cell>
          <table:covered-table-cell/>
          <table:covered-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covered-table-cell/>
          <table:covered-table-cell/>
          <table:covered-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covered-table-cell/>
          <table:covered-table-cell/>
          <table:covered-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33"/>
        <table:table-column table:style-name="auto34"/>
        <table:table-column/>
        <table:table-row>
          <table:table-cell table:style-name="auto15" office:value-type="string">
            <text:p>Imported value:</text:p>
          </table:table-cell>
          <table:table-cell office:value-type="error" table:formula="of:=['Formatting'.B15]"/>
          <table:table-cell office:value-type="string">
            <text:p/>
          </table:table-cell>
        </table:table-row>
        <table:table-row>
          <table:table-cell table:style-name="auto15" office:value-type="string">
            <text:p>Computed value 1:</text:p>
          </table:table-cell>
          <table:table-cell office:value-type="error" table:formula="of:=[.B1]*2/3+123+Pi()"/>
          <table:table-cell office:value-type="error" table:formula="of:=([.B1]*2/3) + 123 + Pi()"/>
        </table:table-row>
        <table:table-row>
          <table:table-cell table:style-name="auto15" office:value-type="string">
            <text:p>Computed value 2:</text:p>
          </table:table-cell>
          <table:table-cell office:value-type="error" table:formula="of:=[.C2]/300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0 digits:</text:p>
          </table:table-cell>
          <table:table-cell table:style-name="auto35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1 digits:</text:p>
          </table:table-cell>
          <table:table-cell table:style-name="auto37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2 digits:</text:p>
          </table:table-cell>
          <table:table-cell table:style-name="auto38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3 digits:</text:p>
          </table:table-cell>
          <table:table-cell table:style-name="auto40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4 digits:</text:p>
          </table:table-cell>
          <table:table-cell table:style-name="auto41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5 digits:</text:p>
          </table:table-cell>
          <table:table-cell table:style-name="auto43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0 digits:</text:p>
          </table:table-cell>
          <table:table-cell table:style-name="auto45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1 digits:</text:p>
          </table:table-cell>
          <table:table-cell table:style-name="auto47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2 digits:</text:p>
          </table:table-cell>
          <table:table-cell table:style-name="auto48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Datetime as ISO:</text:p>
          </table:table-cell>
          <table:table-cell table:style-name="auto49" office:value-type="date" office:date-value="2026-07-17T15:15:39"/>
          <table:table-cell office:value-type="string">
            <text:p/>
          </table:table-cell>
        </table:table-row>
        <table:table-row>
          <table:table-cell table:style-name="auto15" office:value-type="string">
            <text:p>Datetime as German:</text:p>
          </table:table-cell>
          <table:table-cell table:style-name="auto51" office:value-type="date" office:date-value="2026-07-17T15:15:39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Radius of cylinder: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</table:table-row>
        <table:table-row>
          <table:table-cell table:style-name="auto15" office:value-type="string">
            <text:p>Height of cylinder:</text:p>
          </table:table-cell>
          <table:table-cell office:value-type="float" office:value="120">
            <text:p>120</text:p>
          </table:table-cell>
          <table:table-cell office:value-type="string">
            <text:p>mm</text:p>
          </table:table-cell>
        </table:table-row>
        <table:table-row>
          <table:table-cell table:style-name="auto15" office:value-type="string">
            <text:p>Volume of cylinder:</text:p>
          </table:table-cell>
          <table:table-cell office:value-type="error" table:formula="of:=[.B16]^2*3.1415*[.B17]"/>
          <table:table-cell office:value-type="string">
            <text:p>mm³</text:p>
          </table:table-cell>
        </table:table-row>
        <table:table-row>
          <table:table-cell table:style-name="auto15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Hour value: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Hours valid?</text:p>
          </table:table-cell>
          <table:table-cell table:style-name="auto19" office:value-type="error" table:formula="of:=IF(AND([.B20]&gt;=0;[.B20]&lt;=24);&quot;Valid&quot;;&quot;Invalid&quot;)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Conditional Formatting">
        <table:table-column/>
        <table:table-column table:style-name="auto53"/>
        <table:table-column table:style-name="auto33"/>
        <table:table-row>
          <table:table-cell table:style-name="cond0_0" office:value-type="float" office:value="0">
            <text:p>0</text:p>
          </table:table-cell>
          <table:table-cell table:style-name="cond1_0" office:value-type="string">
            <text:p>Hexvalue 0x00</text:p>
          </table:table-cell>
          <table:table-cell table:style-name="cond2_0" office:value-type="string">
            <text:p>Octvalue 0o000000</text:p>
          </table:table-cell>
        </table:table-row>
        <table:table-row>
          <table:table-cell table:style-name="cond0_0" office:value-type="float" office:value="1">
            <text:p>1</text:p>
          </table:table-cell>
          <table:table-cell table:style-name="cond1_0" office:value-type="string">
            <text:p>Hexvalue 0x01</text:p>
          </table:table-cell>
          <table:table-cell table:style-name="cond2_0" office:value-type="string">
            <text:p>Octvalue 0o000001</text:p>
          </table:table-cell>
        </table:table-row>
        <table:table-row>
          <table:table-cell table:style-name="cond0_0" office:value-type="float" office:value="2">
            <text:p>2</text:p>
          </table:table-cell>
          <table:table-cell table:style-name="cond1_0" office:value-type="string">
            <text:p>Hexvalue 0x02</text:p>
          </table:table-cell>
          <table:table-cell table:style-name="cond2_0" office:value-type="string">
            <text:p>Octvalue 0o000002</text:p>
          </table:table-cell>
        </table:table-row>
        <table:table-row>
          <table:table-cell table:style-name="cond0_0" office:value-type="float" office:value="3">
            <text:p>3</text:p>
          </table:table-cell>
          <table:table-cell table:style-name="cond1_0" office:value-type="string">
            <text:p>Hexvalue 0x03</text:p>
          </table:table-cell>
          <table:table-cell table:style-name="cond2_0" office:value-type="string">
            <text:p>Octvalue 0o000003</text:p>
          </table:table-cell>
        </table:table-row>
        <table:table-row>
          <table:table-cell table:style-name="cond0_0" office:value-type="float" office:value="4">
            <text:p>4</text:p>
          </table:table-cell>
          <table:table-cell table:style-name="cond1_0" office:value-type="string">
            <text:p>Hexvalue 0x04</text:p>
          </table:table-cell>
          <table:table-cell table:style-name="cond2_0" office:value-type="string">
            <text:p>Octvalue 0o000004</text:p>
          </table:table-cell>
        </table:table-row>
        <table:table-row>
          <table:table-cell table:style-name="cond0_0" office:value-type="float" office:value="5">
            <text:p>5</text:p>
          </table:table-cell>
          <table:table-cell table:style-name="cond1_0" office:value-type="string">
            <text:p>Hexvalue 0x05</text:p>
          </table:table-cell>
          <table:table-cell table:style-name="cond2_0" office:value-type="string">
            <text:p>Octvalue 0o000005</text:p>
          </table:table-cell>
        </table:table-row>
        <table:table-row>
          <table:table-cell table:style-name="cond0_0" office:value-type="float" office:value="6">
            <text:p>6</text:p>
          </table:table-cell>
          <table:table-cell table:style-name="cond1_0" office:value-type="string">
            <text:p>Hexvalue 0x06</text:p>
          </table:table-cell>
          <table:table-cell table:style-name="cond2_0" office:value-type="string">
            <text:p>Octvalue 0o000006</text:p>
          </table:table-cell>
        </table:table-row>
        <table:table-row>
          <table:table-cell table:style-name="cond0_0" office:value-type="float" office:value="7">
            <text:p>7</text:p>
          </table:table-cell>
          <table:table-cell table:style-name="cond1_0" office:value-type="string">
            <text:p>Hexvalue 0x07</text:p>
          </table:table-cell>
          <table:table-cell table:style-name="cond2_0" office:value-type="string">
            <text:p>Octvalue 0o000007</text:p>
          </table:table-cell>
        </table:table-row>
        <table:table-row>
          <table:table-cell table:style-name="cond0_0" office:value-type="float" office:value="8">
            <text:p>8</text:p>
          </table:table-cell>
          <table:table-cell table:style-name="cond1_0" office:value-type="string">
            <text:p>Hexvalue 0x08</text:p>
          </table:table-cell>
          <table:table-cell table:style-name="cond2_0" office:value-type="string">
            <text:p>Octvalue 0o000010</text:p>
          </table:table-cell>
        </table:table-row>
        <table:table-row>
          <table:table-cell table:style-name="cond0_0" office:value-type="float" office:value="9">
            <text:p>9</text:p>
          </table:table-cell>
          <table:table-cell table:style-name="cond1_0" office:value-type="string">
            <text:p>Hexvalue 0x09</text:p>
          </table:table-cell>
          <table:table-cell table:style-name="cond2_0" office:value-type="string">
            <text:p>Octvalue 0o000011</text:p>
          </table:table-cell>
        </table:table-row>
        <table:table-row>
          <table:table-cell table:style-name="cond0_0" office:value-type="float" office:value="10">
            <text:p>10</text:p>
          </table:table-cell>
          <table:table-cell table:style-name="cond1_0" office:value-type="string">
            <text:p>Hexvalue 0x0a</text:p>
          </table:table-cell>
          <table:table-cell table:style-name="cond2_0" office:value-type="string">
            <text:p>Octvalue 0o000012</text:p>
          </table:table-cell>
        </table:table-row>
        <table:table-row>
          <table:table-cell table:style-name="cond0_0" office:value-type="float" office:value="11">
            <text:p>11</text:p>
          </table:table-cell>
          <table:table-cell table:style-name="cond1_0" office:value-type="string">
            <text:p>Hexvalue 0x0b</text:p>
          </table:table-cell>
          <table:table-cell table:style-name="cond2_0" office:value-type="string">
            <text:p>Octvalue 0o000013</text:p>
          </table:table-cell>
        </table:table-row>
        <table:table-row>
          <table:table-cell table:style-name="cond0_0" office:value-type="float" office:value="12">
            <text:p>12</text:p>
          </table:table-cell>
          <table:table-cell table:style-name="cond1_0" office:value-type="string">
            <text:p>Hexvalue 0x0c</text:p>
          </table:table-cell>
          <table:table-cell table:style-name="cond2_0" office:value-type="string">
            <text:p>Octvalue 0o000014</text:p>
          </table:table-cell>
        </table:table-row>
        <table:table-row>
          <table:table-cell table:style-name="cond0_0" office:value-type="float" office:value="13">
            <text:p>13</text:p>
          </table:table-cell>
          <table:table-cell table:style-name="cond1_0" office:value-type="string">
            <text:p>Hexvalue 0x0d</text:p>
          </table:table-cell>
          <table:table-cell table:style-name="cond2_0" office:value-type="string">
            <text:p>Octvalue 0o000015</text:p>
          </table:table-cell>
        </table:table-row>
        <table:table-row>
          <table:table-cell table:style-name="cond0_0" office:value-type="float" office:value="14">
            <text:p>14</text:p>
          </table:table-cell>
          <table:table-cell table:style-name="cond1_0" office:value-type="string">
            <text:p>Hexvalue 0x0e</text:p>
          </table:table-cell>
          <table:table-cell table:style-name="cond2_0" office:value-type="string">
            <text:p>Octvalue 0o000016</text:p>
          </table:table-cell>
        </table:table-row>
        <table:table-row>
          <table:table-cell table:style-name="cond0_0" office:value-type="float" office:value="15">
            <text:p>15</text:p>
          </table:table-cell>
          <table:table-cell table:style-name="cond1_0" office:value-type="string">
            <text:p>Hexvalue 0x0f</text:p>
          </table:table-cell>
          <table:table-cell table:style-name="cond2_0" office:value-type="string">
            <text:p>Octvalue 0o000017</text:p>
          </table:table-cell>
        </table:table-row>
        <table:table-row>
          <table:table-cell table:style-name="cond0_0" office:value-type="float" office:value="16">
            <text:p>16</text:p>
          </table:table-cell>
          <table:table-cell table:style-name="cond1_0" office:value-type="string">
            <text:p>Hexvalue 0x10</text:p>
          </table:table-cell>
          <table:table-cell table:style-name="cond2_0" office:value-type="string">
            <text:p>Octvalue 0o000020</text:p>
          </table:table-cell>
        </table:table-row>
        <table:table-row>
          <table:table-cell table:style-name="cond0_0" office:value-type="float" office:value="17">
            <text:p>17</text:p>
          </table:table-cell>
          <table:table-cell table:style-name="cond1_0" office:value-type="string">
            <text:p>Hexvalue 0x11</text:p>
          </table:table-cell>
          <table:table-cell table:style-name="cond2_0" office:value-type="string">
            <text:p>Octvalue 0o000021</text:p>
          </table:table-cell>
        </table:table-row>
        <table:table-row>
          <table:table-cell table:style-name="cond0_0" office:value-type="float" office:value="18">
            <text:p>18</text:p>
          </table:table-cell>
          <table:table-cell table:style-name="cond1_0" office:value-type="string">
            <text:p>Hexvalue 0x12</text:p>
          </table:table-cell>
          <table:table-cell table:style-name="cond2_0" office:value-type="string">
            <text:p>Octvalue 0o000022</text:p>
          </table:table-cell>
        </table:table-row>
        <table:table-row>
          <table:table-cell table:style-name="cond0_0" office:value-type="float" office:value="19">
            <text:p>19</text:p>
          </table:table-cell>
          <table:table-cell table:style-name="cond1_0" office:value-type="string">
            <text:p>Hexvalue 0x13</text:p>
          </table:table-cell>
          <table:table-cell table:style-name="cond2_0" office:value-type="string">
            <text:p>Octvalue 0o000023</text:p>
          </table:table-cell>
        </table:table-row>
        <table:table-row>
          <table:table-cell table:style-name="cond0_0" office:value-type="float" office:value="20">
            <text:p>20</text:p>
          </table:table-cell>
          <table:table-cell table:style-name="cond1_0" office:value-type="string">
            <text:p>Hexvalue 0x14</text:p>
          </table:table-cell>
          <table:table-cell table:style-name="cond2_0" office:value-type="string">
            <text:p>Octvalue 0o000024</text:p>
          </table:table-cell>
        </table:table-row>
        <table:table-row>
          <table:table-cell table:style-name="cond0_0" office:value-type="float" office:value="21">
            <text:p>21</text:p>
          </table:table-cell>
          <table:table-cell table:style-name="cond1_0" office:value-type="string">
            <text:p>Hexvalue 0x15</text:p>
          </table:table-cell>
          <table:table-cell table:style-name="cond2_0" office:value-type="string">
            <text:p>Octvalue 0o000025</text:p>
          </table:table-cell>
        </table:table-row>
        <table:table-row>
          <table:table-cell table:style-name="cond0_0" office:value-type="float" office:value="22">
            <text:p>22</text:p>
          </table:table-cell>
          <table:table-cell table:style-name="cond1_0" office:value-type="string">
            <text:p>Hexvalue 0x16</text:p>
          </table:table-cell>
          <table:table-cell table:style-name="cond2_0" office:value-type="string">
            <text:p>Octvalue 0o000026</text:p>
          </table:table-cell>
        </table:table-row>
        <table:table-row>
          <table:table-cell table:style-name="cond0_0" office:value-type="float" office:value="23">
            <text:p>23</text:p>
          </table:table-cell>
          <table:table-cell table:style-name="cond1_0" office:value-type="string">
            <text:p>Hexvalue 0x17</text:p>
          </table:table-cell>
          <table:table-cell table:style-name="cond2_0" office:value-type="string">
            <text:p>Octvalue 0o000027</text:p>
          </table:table-cell>
        </table:table-row>
        <table:table-row>
          <table:table-cell table:style-name="cond0_0" office:value-type="float" office:value="24">
            <text:p>24</text:p>
          </table:table-cell>
          <table:table-cell table:style-name="cond1_0" office:value-type="string">
            <text:p>Hexvalue 0x18</text:p>
          </table:table-cell>
          <table:table-cell table:style-name="cond2_0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_0" office:value-type="float" office:value="58.90296893655275">
            <text:p>58.90296893655275</text:p>
          </table:table-cell>
          <table:table-cell table:style-name="cond4_1" office:value-type="float" office:value="-0.5440211108893698">
            <text:p>-0.5440211108893698</text:p>
          </table:table-cell>
          <table:table-cell table:style-name="cond4_2" office:value-type="float" office:value="1.0410757253368614">
            <text:p>1.0410757253368614</text:p>
          </table:table-cell>
          <table:table-cell table:style-name="cond4_3" office:value-type="float" office:value="0.12058450180107416">
            <text:p>0.12058450180107416</text:p>
          </table:table-cell>
          <table:table-cell/>
        </table:table-row>
        <table:table-row>
          <table:table-cell table:style-name="cond4_0" office:value-type="float" office:value="63.65081987779772">
            <text:p>63.65081987779772</text:p>
          </table:table-cell>
          <table:table-cell table:style-name="cond4_1" office:value-type="float" office:value="0.9129452507276277">
            <text:p>0.9129452507276277</text:p>
          </table:table-cell>
          <table:table-cell table:style-name="cond4_2" office:value-type="float" office:value="1.7205845018010741">
            <text:p>1.7205845018010741</text:p>
          </table:table-cell>
          <table:table-cell table:style-name="cond4_3" office:value-type="float" office:value="0.25698659871878904">
            <text:p>0.25698659871878904</text:p>
          </table:table-cell>
          <table:table-cell/>
        </table:table-row>
        <table:table-row>
          <table:table-cell table:style-name="cond4_0" office:value-type="float" office:value="9.878400564190706">
            <text:p>9.878400564190706</text:p>
          </table:table-cell>
          <table:table-cell table:style-name="cond4_1" office:value-type="float" office:value="-0.9880316240928618">
            <text:p>-0.9880316240928618</text:p>
          </table:table-cell>
          <table:table-cell table:style-name="cond4_2" office:value-type="float" office:value="0.6569865987187891">
            <text:p>0.6569865987187891</text:p>
          </table:table-cell>
          <table:table-cell table:style-name="cond4_3" office:value-type="float" office:value="0.18935824662338174">
            <text:p>0.18935824662338174</text:p>
          </table:table-cell>
          <table:table-cell/>
        </table:table-row>
        <table:table-row>
          <table:table-cell table:style-name="cond4_0" office:value-type="float" office:value="-52.97617467155497">
            <text:p>-52.97617467155497</text:p>
          </table:table-cell>
          <table:table-cell table:style-name="cond4_1" office:value-type="float" office:value="0.7451131604793488">
            <text:p>0.7451131604793488</text:p>
          </table:table-cell>
          <table:table-cell table:style-name="cond4_2" office:value-type="float" office:value="0.9893582466233818">
            <text:p>0.9893582466233818</text:p>
          </table:table-cell>
          <table:table-cell table:style-name="cond4_3" office:value-type="float" office:value="0.012118485241756571">
            <text:p>0.012118485241756571</text:p>
          </table:table-cell>
          <table:table-cell/>
        </table:table-row>
        <table:table-row>
          <table:table-cell table:style-name="cond4_0" office:value-type="float" office:value="-67.1246992264197">
            <text:p>-67.1246992264197</text:p>
          </table:table-cell>
          <table:table-cell table:style-name="cond4_1" office:value-type="float" office:value="-0.26237485370392877">
            <text:p>-0.26237485370392877</text:p>
          </table:table-cell>
          <table:table-cell table:style-name="cond4_2" office:value-type="float" office:value="0.4121184852417566">
            <text:p>0.4121184852417566</text:p>
          </table:table-cell>
          <table:table-cell table:style-name="cond4_3" office:value-type="float" office:value="0.25597888911063027">
            <text:p>0.25597888911063027</text:p>
          </table:table-cell>
          <table:table-cell/>
        </table:table-row>
        <table:table-row>
          <table:table-cell table:style-name="cond4_0" office:value-type="float" office:value="-19.55908487392481">
            <text:p>-19.55908487392481</text:p>
          </table:table-cell>
          <table:table-cell table:style-name="cond4_1" office:value-type="float" office:value="-0.3048106211022167">
            <text:p>-0.3048106211022167</text:p>
          </table:table-cell>
          <table:table-cell table:style-name="cond4_2" office:value-type="float" office:value="1.4559788891106302">
            <text:p>1.4559788891106302</text:p>
          </table:table-cell>
          <table:table-cell table:style-name="cond4_3" office:value-type="float" office:value="0.2000097934492966">
            <text:p>0.2000097934492966</text:p>
          </table:table-cell>
          <table:table-cell/>
        </table:table-row>
        <table:table-row>
          <table:table-cell table:style-name="cond4_0" office:value-type="float" office:value="45.989061910315236">
            <text:p>45.989061910315236</text:p>
          </table:table-cell>
          <table:table-cell table:style-name="cond4_1" office:value-type="float" office:value="0.7738906815578891">
            <text:p>0.7738906815578891</text:p>
          </table:table-cell>
          <table:table-cell table:style-name="cond4_2" office:value-type="float" office:value="1.0000097934492964">
            <text:p>1.0000097934492964</text:p>
          </table:table-cell>
          <table:table-cell table:style-name="cond4_3" office:value-type="float" office:value="0.2634270819995651">
            <text:p>0.2634270819995651</text:p>
          </table:table-cell>
          <table:table-cell/>
        </table:table-row>
        <table:table-row>
          <table:table-cell table:style-name="cond4_0" office:value-type="float" office:value="69.25507726363672">
            <text:p>69.25507726363672</text:p>
          </table:table-cell>
          <table:table-cell table:style-name="cond4_1" office:value-type="float" office:value="-0.9938886539233752">
            <text:p>-0.9938886539233752</text:p>
          </table:table-cell>
          <table:table-cell table:style-name="cond4_2" office:value-type="float" office:value="1.4634270819995652">
            <text:p>1.4634270819995652</text:p>
          </table:table-cell>
          <table:table-cell table:style-name="cond4_3" office:value-type="float" office:value="0.020167036826640894">
            <text:p>0.020167036826640894</text:p>
          </table:table-cell>
          <table:table-cell/>
        </table:table-row>
        <table:table-row>
          <table:table-cell table:style-name="cond4_0" office:value-type="float" office:value="28.848293966922963">
            <text:p>28.848293966922963</text:p>
          </table:table-cell>
          <table:table-cell table:style-name="cond4_1" office:value-type="float" office:value="0.8939966636005579">
            <text:p>0.8939966636005579</text:p>
          </table:table-cell>
          <table:table-cell table:style-name="cond4_2" office:value-type="float" office:value="0.4201670368266409">
            <text:p>0.4201670368266409</text:p>
          </table:table-cell>
          <table:table-cell table:style-name="cond4_3" office:value-type="float" office:value="0.1906073556948703">
            <text:p>0.1906073556948703</text:p>
          </table:table-cell>
          <table:table-cell/>
        </table:table-row>
        <table:table-row>
          <table:table-cell table:style-name="cond4_0" office:value-type="float" office:value="-38.081477762255886">
            <text:p>-38.081477762255886</text:p>
          </table:table-cell>
          <table:table-cell table:style-name="cond4_1" office:value-type="float" office:value="-0.5063656411097588">
            <text:p>-0.5063656411097588</text:p>
          </table:table-cell>
          <table:table-cell table:style-name="cond4_2" office:value-type="float" office:value="0.9906073556948704">
            <text:p>0.9906073556948704</text:p>
          </table:table-cell>
          <table:table-cell table:style-name="cond4_3" office:value-type="float" office:value="0.2502878401571168">
            <text:p>0.2502878401571168</text:p>
          </table:table-cell>
          <table:table-cell/>
        </table:table-row>
        <table:table-row>
          <table:table-cell table:style-name="cond4_0" office:value-type="float" office:value="-69.99931445854925">
            <text:p>-69.99931445854925</text:p>
          </table:table-cell>
          <table:table-cell table:style-name="cond4_1" office:value-type="float" office:value="-0.044242678085070965">
            <text:p>-0.044242678085070965</text:p>
          </table:table-cell>
          <table:table-cell table:style-name="cond4_2" office:value-type="float" office:value="0.6502878401571168">
            <text:p>0.6502878401571168</text:p>
          </table:table-cell>
          <table:table-cell table:style-name="cond4_3" office:value-type="float" office:value="0.11209668333493472">
            <text:p>0.11209668333493472</text:p>
          </table:table-cell>
          <table:table-cell/>
        </table:table-row>
        <table:table-row>
          <table:table-cell table:style-name="cond4_0" office:value-type="float" office:value="-37.56010426003044">
            <text:p>-37.56010426003044</text:p>
          </table:table-cell>
          <table:table-cell table:style-name="cond4_1" office:value-type="float" office:value="0.5806111842123143">
            <text:p>0.5806111842123143</text:p>
          </table:table-cell>
          <table:table-cell table:style-name="cond4_2" office:value-type="float" office:value="1.7120966833349347">
            <text:p>1.7120966833349347</text:p>
          </table:table-cell>
          <table:table-cell table:style-name="cond4_3" office:value-type="float" office:value="0.23860250812044326">
            <text:p>0.23860250812044326</text:p>
          </table:table-cell>
          <table:table-cell/>
        </table:table-row>
        <table:table-row>
          <table:table-cell table:style-name="cond4_0" office:value-type="float" office:value="29.411692577864866">
            <text:p>29.411692577864866</text:p>
          </table:table-cell>
          <table:table-cell table:style-name="cond4_1" office:value-type="float" office:value="-0.9301059501867618">
            <text:p>-0.9301059501867618</text:p>
          </table:table-cell>
          <table:table-cell table:style-name="cond4_2" office:value-type="float" office:value="1.038602508120443">
            <text:p>1.038602508120443</text:p>
          </table:table-cell>
          <table:table-cell table:style-name="cond4_3" office:value-type="float" office:value="0.04901275322832399">
            <text:p>0.04901275322832399</text:p>
          </table:table-cell>
          <table:table-cell/>
        </table:table-row>
        <table:table-row>
          <table:table-cell table:style-name="cond4_0" office:value-type="float" office:value="69.34251489864093">
            <text:p>69.34251489864093</text:p>
          </table:table-cell>
          <table:table-cell table:style-name="cond4_1" office:value-type="float" office:value="0.9802396594403116">
            <text:p>0.9802396594403116</text:p>
          </table:table-cell>
          <table:table-cell table:style-name="cond4_2" office:value-type="float" office:value="1.249012753228324">
            <text:p>1.249012753228324</text:p>
          </table:table-cell>
          <table:table-cell table:style-name="cond4_3" office:value-type="float" office:value="0.14987720966295234">
            <text:p>0.14987720966295234</text:p>
          </table:table-cell>
          <table:table-cell/>
        </table:table-row>
        <table:table-row>
          <table:table-cell table:style-name="cond4_0" office:value-type="float" office:value="45.52014881099818">
            <text:p>45.52014881099818</text:p>
          </table:table-cell>
          <table:table-cell table:style-name="cond4_1" office:value-type="float" office:value="-0.7148764296291646">
            <text:p>-0.7148764296291646</text:p>
          </table:table-cell>
          <table:table-cell table:style-name="cond4_2" office:value-type="float" office:value="0.14987720966295234">
            <text:p>0.14987720966295234</text:p>
          </table:table-cell>
          <table:table-cell table:style-name="cond4_3" office:value-type="float" office:value="0.11294525072762762">
            <text:p>0.11294525072762762</text:p>
          </table:table-cell>
          <table:table-cell/>
        </table:table-row>
        <table:table-row>
          <table:table-cell table:style-name="cond4_0" office:value-type="float" office:value="-20.15323216655457">
            <text:p>-20.15323216655457</text:p>
          </table:table-cell>
          <table:table-cell table:style-name="cond4_1" office:value-type="float" office:value="0.21942525837900473">
            <text:p>0.21942525837900473</text:p>
          </table:table-cell>
          <table:table-cell table:style-name="cond4_2" office:value-type="float" office:value="0.9129452507276277">
            <text:p>0.9129452507276277</text:p>
          </table:table-cell>
          <table:table-cell table:style-name="cond4_3" office:value-type="float" office:value="0.03665563853605602">
            <text:p>0.03665563853605602</text:p>
          </table:table-cell>
          <table:table-cell/>
        </table:table-row>
        <table:table-row>
          <table:table-cell table:style-name="cond4_0" office:value-type="float" office:value="-67.29782443156898">
            <text:p>-67.29782443156898</text:p>
          </table:table-cell>
          <table:table-cell table:style-name="cond4_1" office:value-type="float" office:value="0.3466494554970303">
            <text:p>0.3466494554970303</text:p>
          </table:table-cell>
          <table:table-cell table:style-name="cond4_2" office:value-type="float" office:value="0.8366556385360561">
            <text:p>0.8366556385360561</text:p>
          </table:table-cell>
          <table:table-cell table:style-name="cond4_3" office:value-type="float" office:value="0.3911486907095961">
            <text:p>0.3911486907095961</text:p>
          </table:table-cell>
          <table:table-cell/>
        </table:table-row>
        <table:table-row>
          <table:table-cell table:style-name="cond4_0" office:value-type="float" office:value="-52.56910727401733">
            <text:p>-52.56910727401733</text:p>
          </table:table-cell>
          <table:table-cell table:style-name="cond4_1" office:value-type="float" office:value="-0.8011526357338304">
            <text:p>-0.8011526357338304</text:p>
          </table:table-cell>
          <table:table-cell table:style-name="cond4_2" office:value-type="float" office:value="1.991148690709596">
            <text:p>1.991148690709596</text:p>
          </table:table-cell>
          <table:table-cell table:style-name="cond4_3" office:value-type="float" office:value="0.35377959582482943">
            <text:p>0.35377959582482943</text:p>
          </table:table-cell>
          <table:table-cell/>
        </table:table-row>
        <table:table-row>
          <table:table-cell table:style-name="cond4_0" office:value-type="float" office:value="10.491404676406663">
            <text:p>10.491404676406663</text:p>
          </table:table-cell>
          <table:table-cell table:style-name="cond4_1" office:value-type="float" office:value="0.9977992786806003">
            <text:p>0.9977992786806003</text:p>
          </table:table-cell>
          <table:table-cell table:style-name="cond4_2" office:value-type="float" office:value="1.1537795958248294">
            <text:p>1.1537795958248294</text:p>
          </table:table-cell>
          <table:table-cell table:style-name="cond4_3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([.B2]+2)*4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([.B3]+2)*4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([.B4]+2)*4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([.B5]+2)*4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([.B6]+2)*4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([.B7]+2)*4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([.B8]+2)*4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([.B9]+2)*4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([.B10]+2)*4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([.B11]+2)*4"/>
        </table:table-row>
      </table:table>
      <table:table table:name="Symmetric round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Excel ROUND</text:p>
          </table:table-cell>
          <table:table-cell office:value-type="string">
            <text:p>Python float round()</text:p>
          </table:table-cell>
          <table:table-cell office:value-type="string">
            <text:p>Python exact round()</text:p>
          </table:table-cell>
          <table:table-cell office:value-type="string">
            <text:p>odsexport round()</text:p>
          </table:table-cell>
          <table:table-cell office:value-type="string">
            <text:p>Difference</text:p>
          </table:table-cell>
          <table:table-cell office:value-type="string">
            <text:p>OK?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2])*IF(AND(ISEVEN(ABS([.A2])*10);MOD(ABS([.A2])*10;1)&lt;=0.5);ROUNDDOWN(ABS([.A2]);1);ROUND(ABS([.A2]);1))"/>
          <table:table-cell office:value-type="error" table:formula="of:=[.D2]-[.E2]"/>
          <table:table-cell office:value-type="error" table:formula="of:=IF([.F2]&lt;&gt;0;&quot;ERROR&quot;;&quot;&quot;)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3])*IF(AND(ISEVEN(ABS([.A3])*10);MOD(ABS([.A3])*10;1)&lt;=0.5);ROUNDDOWN(ABS([.A3]);1);ROUND(ABS([.A3]);1))"/>
          <table:table-cell office:value-type="error" table:formula="of:=[.D3]-[.E3]"/>
          <table:table-cell office:value-type="error" table:formula="of:=IF([.F3]&lt;&gt;0;&quot;ERROR&quot;;&quot;&quot;)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4])*IF(AND(ISEVEN(ABS([.A4])*10);MOD(ABS([.A4])*10;1)&lt;=0.5);ROUNDDOWN(ABS([.A4]);1);ROUND(ABS([.A4]);1))"/>
          <table:table-cell office:value-type="error" table:formula="of:=[.D4]-[.E4]"/>
          <table:table-cell office:value-type="error" table:formula="of:=IF([.F4]&lt;&gt;0;&quot;ERROR&quot;;&quot;&quot;)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5])*IF(AND(ISEVEN(ABS([.A5])*10);MOD(ABS([.A5])*10;1)&lt;=0.5);ROUNDDOWN(ABS([.A5]);1);ROUND(ABS([.A5]);1))"/>
          <table:table-cell office:value-type="error" table:formula="of:=[.D5]-[.E5]"/>
          <table:table-cell office:value-type="error" table:formula="of:=IF([.F5]&lt;&gt;0;&quot;ERROR&quot;;&quot;&quot;)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6])*IF(AND(ISEVEN(ABS([.A6])*10);MOD(ABS([.A6])*10;1)&lt;=0.5);ROUNDDOWN(ABS([.A6]);1);ROUND(ABS([.A6]);1))"/>
          <table:table-cell office:value-type="error" table:formula="of:=[.D6]-[.E6]"/>
          <table:table-cell office:value-type="error" table:formula="of:=IF([.F6]&lt;&gt;0;&quot;ERROR&quot;;&quot;&quot;)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7])*IF(AND(ISEVEN(ABS([.A7])*10);MOD(ABS([.A7])*10;1)&lt;=0.5);ROUNDDOWN(ABS([.A7]);1);ROUND(ABS([.A7]);1))"/>
          <table:table-cell office:value-type="error" table:formula="of:=[.D7]-[.E7]"/>
          <table:table-cell office:value-type="error" table:formula="of:=IF([.F7]&lt;&gt;0;&quot;ERROR&quot;;&quot;&quot;)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8])*IF(AND(ISEVEN(ABS([.A8])*10);MOD(ABS([.A8])*10;1)&lt;=0.5);ROUNDDOWN(ABS([.A8]);1);ROUND(ABS([.A8]);1))"/>
          <table:table-cell office:value-type="error" table:formula="of:=[.D8]-[.E8]"/>
          <table:table-cell office:value-type="error" table:formula="of:=IF([.F8]&lt;&gt;0;&quot;ERROR&quot;;&quot;&quot;)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9])*IF(AND(ISEVEN(ABS([.A9])*10);MOD(ABS([.A9])*10;1)&lt;=0.5);ROUNDDOWN(ABS([.A9]);1);ROUND(ABS([.A9]);1))"/>
          <table:table-cell office:value-type="error" table:formula="of:=[.D9]-[.E9]"/>
          <table:table-cell office:value-type="error" table:formula="of:=IF([.F9]&lt;&gt;0;&quot;ERROR&quot;;&quot;&quot;)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0])*IF(AND(ISEVEN(ABS([.A10])*10);MOD(ABS([.A10])*10;1)&lt;=0.5);ROUNDDOWN(ABS([.A10]);1);ROUND(ABS([.A10]);1))"/>
          <table:table-cell office:value-type="error" table:formula="of:=[.D10]-[.E10]"/>
          <table:table-cell office:value-type="error" table:formula="of:=IF([.F10]&lt;&gt;0;&quot;ERROR&quot;;&quot;&quot;)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1])*IF(AND(ISEVEN(ABS([.A11])*10);MOD(ABS([.A11])*10;1)&lt;=0.5);ROUNDDOWN(ABS([.A11]);1);ROUND(ABS([.A11]);1))"/>
          <table:table-cell office:value-type="error" table:formula="of:=[.D11]-[.E11]"/>
          <table:table-cell office:value-type="error" table:formula="of:=IF([.F11]&lt;&gt;0;&quot;ERROR&quot;;&quot;&quot;)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2])*IF(AND(ISEVEN(ABS([.A12])*10);MOD(ABS([.A12])*10;1)&lt;=0.5);ROUNDDOWN(ABS([.A12]);1);ROUND(ABS([.A12]);1))"/>
          <table:table-cell office:value-type="error" table:formula="of:=[.D12]-[.E12]"/>
          <table:table-cell office:value-type="error" table:formula="of:=IF([.F12]&lt;&gt;0;&quot;ERROR&quot;;&quot;&quot;)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3])*IF(AND(ISEVEN(ABS([.A13])*10);MOD(ABS([.A13])*10;1)&lt;=0.5);ROUNDDOWN(ABS([.A13]);1);ROUND(ABS([.A13]);1))"/>
          <table:table-cell office:value-type="error" table:formula="of:=[.D13]-[.E13]"/>
          <table:table-cell office:value-type="error" table:formula="of:=IF([.F13]&lt;&gt;0;&quot;ERROR&quot;;&quot;&quot;)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4])*IF(AND(ISEVEN(ABS([.A14])*10);MOD(ABS([.A14])*10;1)&lt;=0.5);ROUNDDOWN(ABS([.A14]);1);ROUND(ABS([.A14]);1))"/>
          <table:table-cell office:value-type="error" table:formula="of:=[.D14]-[.E14]"/>
          <table:table-cell office:value-type="error" table:formula="of:=IF([.F14]&lt;&gt;0;&quot;ERROR&quot;;&quot;&quot;)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5])*IF(AND(ISEVEN(ABS([.A15])*10);MOD(ABS([.A15])*10;1)&lt;=0.5);ROUNDDOWN(ABS([.A15]);1);ROUND(ABS([.A15]);1))"/>
          <table:table-cell office:value-type="error" table:formula="of:=[.D15]-[.E15]"/>
          <table:table-cell office:value-type="error" table:formula="of:=IF([.F15]&lt;&gt;0;&quot;ERROR&quot;;&quot;&quot;)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6])*IF(AND(ISEVEN(ABS([.A16])*10);MOD(ABS([.A16])*10;1)&lt;=0.5);ROUNDDOWN(ABS([.A16]);1);ROUND(ABS([.A16]);1))"/>
          <table:table-cell office:value-type="error" table:formula="of:=[.D16]-[.E16]"/>
          <table:table-cell office:value-type="error" table:formula="of:=IF([.F16]&lt;&gt;0;&quot;ERROR&quot;;&quot;&quot;)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error" table:formula="of:=SIGN([.A17])*IF(AND(ISEVEN(ABS([.A17])*10);MOD(ABS([.A17])*10;1)&lt;=0.5);ROUNDDOWN(ABS([.A17]);1);ROUND(ABS([.A17]);1))"/>
          <table:table-cell office:value-type="error" table:formula="of:=[.D17]-[.E17]"/>
          <table:table-cell office:value-type="error" table:formula="of:=IF([.F17]&lt;&gt;0;&quot;ERROR&quot;;&quot;&quot;)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18])*IF(AND(ISEVEN(ABS([.A18])*10);MOD(ABS([.A18])*10;1)&lt;=0.5);ROUNDDOWN(ABS([.A18]);1);ROUND(ABS([.A18]);1))"/>
          <table:table-cell office:value-type="error" table:formula="of:=[.D18]-[.E18]"/>
          <table:table-cell office:value-type="error" table:formula="of:=IF([.F18]&lt;&gt;0;&quot;ERROR&quot;;&quot;&quot;)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19])*IF(AND(ISEVEN(ABS([.A19])*10);MOD(ABS([.A19])*10;1)&lt;=0.5);ROUNDDOWN(ABS([.A19]);1);ROUND(ABS([.A19]);1))"/>
          <table:table-cell office:value-type="error" table:formula="of:=[.D19]-[.E19]"/>
          <table:table-cell office:value-type="error" table:formula="of:=IF([.F19]&lt;&gt;0;&quot;ERROR&quot;;&quot;&quot;)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0])*IF(AND(ISEVEN(ABS([.A20])*10);MOD(ABS([.A20])*10;1)&lt;=0.5);ROUNDDOWN(ABS([.A20]);1);ROUND(ABS([.A20]);1))"/>
          <table:table-cell office:value-type="error" table:formula="of:=[.D20]-[.E20]"/>
          <table:table-cell office:value-type="error" table:formula="of:=IF([.F20]&lt;&gt;0;&quot;ERROR&quot;;&quot;&quot;)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1])*IF(AND(ISEVEN(ABS([.A21])*10);MOD(ABS([.A21])*10;1)&lt;=0.5);ROUNDDOWN(ABS([.A21]);1);ROUND(ABS([.A21]);1))"/>
          <table:table-cell office:value-type="error" table:formula="of:=[.D21]-[.E21]"/>
          <table:table-cell office:value-type="error" table:formula="of:=IF([.F21]&lt;&gt;0;&quot;ERROR&quot;;&quot;&quot;)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2])*IF(AND(ISEVEN(ABS([.A22])*10);MOD(ABS([.A22])*10;1)&lt;=0.5);ROUNDDOWN(ABS([.A22]);1);ROUND(ABS([.A22]);1))"/>
          <table:table-cell office:value-type="error" table:formula="of:=[.D22]-[.E22]"/>
          <table:table-cell office:value-type="error" table:formula="of:=IF([.F22]&lt;&gt;0;&quot;ERROR&quot;;&quot;&quot;)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3])*IF(AND(ISEVEN(ABS([.A23])*10);MOD(ABS([.A23])*10;1)&lt;=0.5);ROUNDDOWN(ABS([.A23]);1);ROUND(ABS([.A23]);1))"/>
          <table:table-cell office:value-type="error" table:formula="of:=[.D23]-[.E23]"/>
          <table:table-cell office:value-type="error" table:formula="of:=IF([.F23]&lt;&gt;0;&quot;ERROR&quot;;&quot;&quot;)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4])*IF(AND(ISEVEN(ABS([.A24])*10);MOD(ABS([.A24])*10;1)&lt;=0.5);ROUNDDOWN(ABS([.A24]);1);ROUND(ABS([.A24]);1))"/>
          <table:table-cell office:value-type="error" table:formula="of:=[.D24]-[.E24]"/>
          <table:table-cell office:value-type="error" table:formula="of:=IF([.F24]&lt;&gt;0;&quot;ERROR&quot;;&quot;&quot;)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5])*IF(AND(ISEVEN(ABS([.A25])*10);MOD(ABS([.A25])*10;1)&lt;=0.5);ROUNDDOWN(ABS([.A25]);1);ROUND(ABS([.A25]);1))"/>
          <table:table-cell office:value-type="error" table:formula="of:=[.D25]-[.E25]"/>
          <table:table-cell office:value-type="error" table:formula="of:=IF([.F25]&lt;&gt;0;&quot;ERROR&quot;;&quot;&quot;)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6])*IF(AND(ISEVEN(ABS([.A26])*10);MOD(ABS([.A26])*10;1)&lt;=0.5);ROUNDDOWN(ABS([.A26]);1);ROUND(ABS([.A26]);1))"/>
          <table:table-cell office:value-type="error" table:formula="of:=[.D26]-[.E26]"/>
          <table:table-cell office:value-type="error" table:formula="of:=IF([.F26]&lt;&gt;0;&quot;ERROR&quot;;&quot;&quot;)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error" table:formula="of:=SIGN([.A27])*IF(AND(ISEVEN(ABS([.A27])*10);MOD(ABS([.A27])*10;1)&lt;=0.5);ROUNDDOWN(ABS([.A27]);1);ROUND(ABS([.A27]);1))"/>
          <table:table-cell office:value-type="error" table:formula="of:=[.D27]-[.E27]"/>
          <table:table-cell office:value-type="error" table:formula="of:=IF([.F27]&lt;&gt;0;&quot;ERROR&quot;;&quot;&quot;)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28])*IF(AND(ISEVEN(ABS([.A28])*10);MOD(ABS([.A28])*10;1)&lt;=0.5);ROUNDDOWN(ABS([.A28]);1);ROUND(ABS([.A28]);1))"/>
          <table:table-cell office:value-type="error" table:formula="of:=[.D28]-[.E28]"/>
          <table:table-cell office:value-type="error" table:formula="of:=IF([.F28]&lt;&gt;0;&quot;ERROR&quot;;&quot;&quot;)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29])*IF(AND(ISEVEN(ABS([.A29])*10);MOD(ABS([.A29])*10;1)&lt;=0.5);ROUNDDOWN(ABS([.A29]);1);ROUND(ABS([.A29]);1))"/>
          <table:table-cell office:value-type="error" table:formula="of:=[.D29]-[.E29]"/>
          <table:table-cell office:value-type="error" table:formula="of:=IF([.F29]&lt;&gt;0;&quot;ERROR&quot;;&quot;&quot;)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0])*IF(AND(ISEVEN(ABS([.A30])*10);MOD(ABS([.A30])*10;1)&lt;=0.5);ROUNDDOWN(ABS([.A30]);1);ROUND(ABS([.A30]);1))"/>
          <table:table-cell office:value-type="error" table:formula="of:=[.D30]-[.E30]"/>
          <table:table-cell office:value-type="error" table:formula="of:=IF([.F30]&lt;&gt;0;&quot;ERROR&quot;;&quot;&quot;)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1])*IF(AND(ISEVEN(ABS([.A31])*10);MOD(ABS([.A31])*10;1)&lt;=0.5);ROUNDDOWN(ABS([.A31]);1);ROUND(ABS([.A31]);1))"/>
          <table:table-cell office:value-type="error" table:formula="of:=[.D31]-[.E31]"/>
          <table:table-cell office:value-type="error" table:formula="of:=IF([.F31]&lt;&gt;0;&quot;ERROR&quot;;&quot;&quot;)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2])*IF(AND(ISEVEN(ABS([.A32])*10);MOD(ABS([.A32])*10;1)&lt;=0.5);ROUNDDOWN(ABS([.A32]);1);ROUND(ABS([.A32]);1))"/>
          <table:table-cell office:value-type="error" table:formula="of:=[.D32]-[.E32]"/>
          <table:table-cell office:value-type="error" table:formula="of:=IF([.F32]&lt;&gt;0;&quot;ERROR&quot;;&quot;&quot;)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3])*IF(AND(ISEVEN(ABS([.A33])*10);MOD(ABS([.A33])*10;1)&lt;=0.5);ROUNDDOWN(ABS([.A33]);1);ROUND(ABS([.A33]);1))"/>
          <table:table-cell office:value-type="error" table:formula="of:=[.D33]-[.E33]"/>
          <table:table-cell office:value-type="error" table:formula="of:=IF([.F33]&lt;&gt;0;&quot;ERROR&quot;;&quot;&quot;)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4])*IF(AND(ISEVEN(ABS([.A34])*10);MOD(ABS([.A34])*10;1)&lt;=0.5);ROUNDDOWN(ABS([.A34]);1);ROUND(ABS([.A34]);1))"/>
          <table:table-cell office:value-type="error" table:formula="of:=[.D34]-[.E34]"/>
          <table:table-cell office:value-type="error" table:formula="of:=IF([.F34]&lt;&gt;0;&quot;ERROR&quot;;&quot;&quot;)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5])*IF(AND(ISEVEN(ABS([.A35])*10);MOD(ABS([.A35])*10;1)&lt;=0.5);ROUNDDOWN(ABS([.A35]);1);ROUND(ABS([.A35]);1))"/>
          <table:table-cell office:value-type="error" table:formula="of:=[.D35]-[.E35]"/>
          <table:table-cell office:value-type="error" table:formula="of:=IF([.F35]&lt;&gt;0;&quot;ERROR&quot;;&quot;&quot;)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6])*IF(AND(ISEVEN(ABS([.A36])*10);MOD(ABS([.A36])*10;1)&lt;=0.5);ROUNDDOWN(ABS([.A36]);1);ROUND(ABS([.A36]);1))"/>
          <table:table-cell office:value-type="error" table:formula="of:=[.D36]-[.E36]"/>
          <table:table-cell office:value-type="error" table:formula="of:=IF([.F36]&lt;&gt;0;&quot;ERROR&quot;;&quot;&quot;)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7])*IF(AND(ISEVEN(ABS([.A37])*10);MOD(ABS([.A37])*10;1)&lt;=0.5);ROUNDDOWN(ABS([.A37]);1);ROUND(ABS([.A37]);1))"/>
          <table:table-cell office:value-type="error" table:formula="of:=[.D37]-[.E37]"/>
          <table:table-cell office:value-type="error" table:formula="of:=IF([.F37]&lt;&gt;0;&quot;ERROR&quot;;&quot;&quot;)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8])*IF(AND(ISEVEN(ABS([.A38])*10);MOD(ABS([.A38])*10;1)&lt;=0.5);ROUNDDOWN(ABS([.A38]);1);ROUND(ABS([.A38]);1))"/>
          <table:table-cell office:value-type="error" table:formula="of:=[.D38]-[.E38]"/>
          <table:table-cell office:value-type="error" table:formula="of:=IF([.F38]&lt;&gt;0;&quot;ERROR&quot;;&quot;&quot;)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9])*IF(AND(ISEVEN(ABS([.A39])*10);MOD(ABS([.A39])*10;1)&lt;=0.5);ROUNDDOWN(ABS([.A39]);1);ROUND(ABS([.A39]);1))"/>
          <table:table-cell office:value-type="error" table:formula="of:=[.D39]-[.E39]"/>
          <table:table-cell office:value-type="error" table:formula="of:=IF([.F39]&lt;&gt;0;&quot;ERROR&quot;;&quot;&quot;)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0])*IF(AND(ISEVEN(ABS([.A40])*10);MOD(ABS([.A40])*10;1)&lt;=0.5);ROUNDDOWN(ABS([.A40]);1);ROUND(ABS([.A40]);1))"/>
          <table:table-cell office:value-type="error" table:formula="of:=[.D40]-[.E40]"/>
          <table:table-cell office:value-type="error" table:formula="of:=IF([.F40]&lt;&gt;0;&quot;ERROR&quot;;&quot;&quot;)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1])*IF(AND(ISEVEN(ABS([.A41])*10);MOD(ABS([.A41])*10;1)&lt;=0.5);ROUNDDOWN(ABS([.A41]);1);ROUND(ABS([.A41]);1))"/>
          <table:table-cell office:value-type="error" table:formula="of:=[.D41]-[.E41]"/>
          <table:table-cell office:value-type="error" table:formula="of:=IF([.F41]&lt;&gt;0;&quot;ERROR&quot;;&quot;&quot;)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2])*IF(AND(ISEVEN(ABS([.A42])*10);MOD(ABS([.A42])*10;1)&lt;=0.5);ROUNDDOWN(ABS([.A42]);1);ROUND(ABS([.A42]);1))"/>
          <table:table-cell office:value-type="error" table:formula="of:=[.D42]-[.E42]"/>
          <table:table-cell office:value-type="error" table:formula="of:=IF([.F42]&lt;&gt;0;&quot;ERROR&quot;;&quot;&quot;)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3])*IF(AND(ISEVEN(ABS([.A43])*10);MOD(ABS([.A43])*10;1)&lt;=0.5);ROUNDDOWN(ABS([.A43]);1);ROUND(ABS([.A43]);1))"/>
          <table:table-cell office:value-type="error" table:formula="of:=[.D43]-[.E43]"/>
          <table:table-cell office:value-type="error" table:formula="of:=IF([.F43]&lt;&gt;0;&quot;ERROR&quot;;&quot;&quot;)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4])*IF(AND(ISEVEN(ABS([.A44])*10);MOD(ABS([.A44])*10;1)&lt;=0.5);ROUNDDOWN(ABS([.A44]);1);ROUND(ABS([.A44]);1))"/>
          <table:table-cell office:value-type="error" table:formula="of:=[.D44]-[.E44]"/>
          <table:table-cell office:value-type="error" table:formula="of:=IF([.F44]&lt;&gt;0;&quot;ERROR&quot;;&quot;&quot;)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5])*IF(AND(ISEVEN(ABS([.A45])*10);MOD(ABS([.A45])*10;1)&lt;=0.5);ROUNDDOWN(ABS([.A45]);1);ROUND(ABS([.A45]);1))"/>
          <table:table-cell office:value-type="error" table:formula="of:=[.D45]-[.E45]"/>
          <table:table-cell office:value-type="error" table:formula="of:=IF([.F45]&lt;&gt;0;&quot;ERROR&quot;;&quot;&quot;)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6])*IF(AND(ISEVEN(ABS([.A46])*10);MOD(ABS([.A46])*10;1)&lt;=0.5);ROUNDDOWN(ABS([.A46]);1);ROUND(ABS([.A46]);1))"/>
          <table:table-cell office:value-type="error" table:formula="of:=[.D46]-[.E46]"/>
          <table:table-cell office:value-type="error" table:formula="of:=IF([.F46]&lt;&gt;0;&quot;ERROR&quot;;&quot;&quot;)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error" table:formula="of:=SIGN([.A47])*IF(AND(ISEVEN(ABS([.A47])*10);MOD(ABS([.A47])*10;1)&lt;=0.5);ROUNDDOWN(ABS([.A47]);1);ROUND(ABS([.A47]);1))"/>
          <table:table-cell office:value-type="error" table:formula="of:=[.D47]-[.E47]"/>
          <table:table-cell office:value-type="error" table:formula="of:=IF([.F47]&lt;&gt;0;&quot;ERROR&quot;;&quot;&quot;)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48])*IF(AND(ISEVEN(ABS([.A48])*10);MOD(ABS([.A48])*10;1)&lt;=0.5);ROUNDDOWN(ABS([.A48]);1);ROUND(ABS([.A48]);1))"/>
          <table:table-cell office:value-type="error" table:formula="of:=[.D48]-[.E48]"/>
          <table:table-cell office:value-type="error" table:formula="of:=IF([.F48]&lt;&gt;0;&quot;ERROR&quot;;&quot;&quot;)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49])*IF(AND(ISEVEN(ABS([.A49])*10);MOD(ABS([.A49])*10;1)&lt;=0.5);ROUNDDOWN(ABS([.A49]);1);ROUND(ABS([.A49]);1))"/>
          <table:table-cell office:value-type="error" table:formula="of:=[.D49]-[.E49]"/>
          <table:table-cell office:value-type="error" table:formula="of:=IF([.F49]&lt;&gt;0;&quot;ERROR&quot;;&quot;&quot;)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0])*IF(AND(ISEVEN(ABS([.A50])*10);MOD(ABS([.A50])*10;1)&lt;=0.5);ROUNDDOWN(ABS([.A50]);1);ROUND(ABS([.A50]);1))"/>
          <table:table-cell office:value-type="error" table:formula="of:=[.D50]-[.E50]"/>
          <table:table-cell office:value-type="error" table:formula="of:=IF([.F50]&lt;&gt;0;&quot;ERROR&quot;;&quot;&quot;)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1])*IF(AND(ISEVEN(ABS([.A51])*10);MOD(ABS([.A51])*10;1)&lt;=0.5);ROUNDDOWN(ABS([.A51]);1);ROUND(ABS([.A51]);1))"/>
          <table:table-cell office:value-type="error" table:formula="of:=[.D51]-[.E51]"/>
          <table:table-cell office:value-type="error" table:formula="of:=IF([.F51]&lt;&gt;0;&quot;ERROR&quot;;&quot;&quot;)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2])*IF(AND(ISEVEN(ABS([.A52])*10);MOD(ABS([.A52])*10;1)&lt;=0.5);ROUNDDOWN(ABS([.A52]);1);ROUND(ABS([.A52]);1))"/>
          <table:table-cell office:value-type="error" table:formula="of:=[.D52]-[.E52]"/>
          <table:table-cell office:value-type="error" table:formula="of:=IF([.F52]&lt;&gt;0;&quot;ERROR&quot;;&quot;&quot;)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3])*IF(AND(ISEVEN(ABS([.A53])*10);MOD(ABS([.A53])*10;1)&lt;=0.5);ROUNDDOWN(ABS([.A53]);1);ROUND(ABS([.A53]);1))"/>
          <table:table-cell office:value-type="error" table:formula="of:=[.D53]-[.E53]"/>
          <table:table-cell office:value-type="error" table:formula="of:=IF([.F53]&lt;&gt;0;&quot;ERROR&quot;;&quot;&quot;)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4])*IF(AND(ISEVEN(ABS([.A54])*10);MOD(ABS([.A54])*10;1)&lt;=0.5);ROUNDDOWN(ABS([.A54]);1);ROUND(ABS([.A54]);1))"/>
          <table:table-cell office:value-type="error" table:formula="of:=[.D54]-[.E54]"/>
          <table:table-cell office:value-type="error" table:formula="of:=IF([.F54]&lt;&gt;0;&quot;ERROR&quot;;&quot;&quot;)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5])*IF(AND(ISEVEN(ABS([.A55])*10);MOD(ABS([.A55])*10;1)&lt;=0.5);ROUNDDOWN(ABS([.A55]);1);ROUND(ABS([.A55]);1))"/>
          <table:table-cell office:value-type="error" table:formula="of:=[.D55]-[.E55]"/>
          <table:table-cell office:value-type="error" table:formula="of:=IF([.F55]&lt;&gt;0;&quot;ERROR&quot;;&quot;&quot;)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6])*IF(AND(ISEVEN(ABS([.A56])*10);MOD(ABS([.A56])*10;1)&lt;=0.5);ROUNDDOWN(ABS([.A56]);1);ROUND(ABS([.A56]);1))"/>
          <table:table-cell office:value-type="error" table:formula="of:=[.D56]-[.E56]"/>
          <table:table-cell office:value-type="error" table:formula="of:=IF([.F56]&lt;&gt;0;&quot;ERROR&quot;;&quot;&quot;)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float" office:value="-0.1">
            <text:p>-0.1</text:p>
          </table:table-cell>
          <table:table-cell office:value-type="float" office:value="0.0">
            <text:p>0.0</text:p>
          </table:table-cell>
          <table:table-cell office:value-type="error" table:formula="of:=SIGN([.A57])*IF(AND(ISEVEN(ABS([.A57])*10);MOD(ABS([.A57])*10;1)&lt;=0.5);ROUNDDOWN(ABS([.A57]);1);ROUND(ABS([.A57]);1))"/>
          <table:table-cell office:value-type="error" table:formula="of:=[.D57]-[.E57]"/>
          <table:table-cell office:value-type="error" table:formula="of:=IF([.F57]&lt;&gt;0;&quot;ERROR&quot;;&quot;&quot;)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58])*IF(AND(ISEVEN(ABS([.A58])*10);MOD(ABS([.A58])*10;1)&lt;=0.5);ROUNDDOWN(ABS([.A58]);1);ROUND(ABS([.A58]);1))"/>
          <table:table-cell office:value-type="error" table:formula="of:=[.D58]-[.E58]"/>
          <table:table-cell office:value-type="error" table:formula="of:=IF([.F58]&lt;&gt;0;&quot;ERROR&quot;;&quot;&quot;)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59])*IF(AND(ISEVEN(ABS([.A59])*10);MOD(ABS([.A59])*10;1)&lt;=0.5);ROUNDDOWN(ABS([.A59]);1);ROUND(ABS([.A59]);1))"/>
          <table:table-cell office:value-type="error" table:formula="of:=[.D59]-[.E59]"/>
          <table:table-cell office:value-type="error" table:formula="of:=IF([.F59]&lt;&gt;0;&quot;ERROR&quot;;&quot;&quot;)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60])*IF(AND(ISEVEN(ABS([.A60])*10);MOD(ABS([.A60])*10;1)&lt;=0.5);ROUNDDOWN(ABS([.A60]);1);ROUND(ABS([.A60]);1))"/>
          <table:table-cell office:value-type="error" table:formula="of:=[.D60]-[.E60]"/>
          <table:table-cell office:value-type="error" table:formula="of:=IF([.F60]&lt;&gt;0;&quot;ERROR&quot;;&quot;&quot;)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61])*IF(AND(ISEVEN(ABS([.A61])*10);MOD(ABS([.A61])*10;1)&lt;=0.5);ROUNDDOWN(ABS([.A61]);1);ROUND(ABS([.A61]);1))"/>
          <table:table-cell office:value-type="error" table:formula="of:=[.D61]-[.E61]"/>
          <table:table-cell office:value-type="error" table:formula="of:=IF([.F61]&lt;&gt;0;&quot;ERROR&quot;;&quot;&quot;)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2])*IF(AND(ISEVEN(ABS([.A62])*10);MOD(ABS([.A62])*10;1)&lt;=0.5);ROUNDDOWN(ABS([.A62]);1);ROUND(ABS([.A62]);1))"/>
          <table:table-cell office:value-type="error" table:formula="of:=[.D62]-[.E62]"/>
          <table:table-cell office:value-type="error" table:formula="of:=IF([.F62]&lt;&gt;0;&quot;ERROR&quot;;&quot;&quot;)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3])*IF(AND(ISEVEN(ABS([.A63])*10);MOD(ABS([.A63])*10;1)&lt;=0.5);ROUNDDOWN(ABS([.A63]);1);ROUND(ABS([.A63]);1))"/>
          <table:table-cell office:value-type="error" table:formula="of:=[.D63]-[.E63]"/>
          <table:table-cell office:value-type="error" table:formula="of:=IF([.F63]&lt;&gt;0;&quot;ERROR&quot;;&quot;&quot;)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4])*IF(AND(ISEVEN(ABS([.A64])*10);MOD(ABS([.A64])*10;1)&lt;=0.5);ROUNDDOWN(ABS([.A64]);1);ROUND(ABS([.A64]);1))"/>
          <table:table-cell office:value-type="error" table:formula="of:=[.D64]-[.E64]"/>
          <table:table-cell office:value-type="error" table:formula="of:=IF([.F64]&lt;&gt;0;&quot;ERROR&quot;;&quot;&quot;)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5])*IF(AND(ISEVEN(ABS([.A65])*10);MOD(ABS([.A65])*10;1)&lt;=0.5);ROUNDDOWN(ABS([.A65]);1);ROUND(ABS([.A65]);1))"/>
          <table:table-cell office:value-type="error" table:formula="of:=[.D65]-[.E65]"/>
          <table:table-cell office:value-type="error" table:formula="of:=IF([.F65]&lt;&gt;0;&quot;ERROR&quot;;&quot;&quot;)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6])*IF(AND(ISEVEN(ABS([.A66])*10);MOD(ABS([.A66])*10;1)&lt;=0.5);ROUNDDOWN(ABS([.A66]);1);ROUND(ABS([.A66]);1))"/>
          <table:table-cell office:value-type="error" table:formula="of:=[.D66]-[.E66]"/>
          <table:table-cell office:value-type="error" table:formula="of:=IF([.F66]&lt;&gt;0;&quot;ERROR&quot;;&quot;&quot;)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float" office:value="0.1">
            <text:p>0.1</text:p>
          </table:table-cell>
          <table:table-cell office:value-type="float" office:value="0.0">
            <text:p>0.0</text:p>
          </table:table-cell>
          <table:table-cell office:value-type="error" table:formula="of:=SIGN([.A67])*IF(AND(ISEVEN(ABS([.A67])*10);MOD(ABS([.A67])*10;1)&lt;=0.5);ROUNDDOWN(ABS([.A67]);1);ROUND(ABS([.A67]);1))"/>
          <table:table-cell office:value-type="error" table:formula="of:=[.D67]-[.E67]"/>
          <table:table-cell office:value-type="error" table:formula="of:=IF([.F67]&lt;&gt;0;&quot;ERROR&quot;;&quot;&quot;)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68])*IF(AND(ISEVEN(ABS([.A68])*10);MOD(ABS([.A68])*10;1)&lt;=0.5);ROUNDDOWN(ABS([.A68]);1);ROUND(ABS([.A68]);1))"/>
          <table:table-cell office:value-type="error" table:formula="of:=[.D68]-[.E68]"/>
          <table:table-cell office:value-type="error" table:formula="of:=IF([.F68]&lt;&gt;0;&quot;ERROR&quot;;&quot;&quot;)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69])*IF(AND(ISEVEN(ABS([.A69])*10);MOD(ABS([.A69])*10;1)&lt;=0.5);ROUNDDOWN(ABS([.A69]);1);ROUND(ABS([.A69]);1))"/>
          <table:table-cell office:value-type="error" table:formula="of:=[.D69]-[.E69]"/>
          <table:table-cell office:value-type="error" table:formula="of:=IF([.F69]&lt;&gt;0;&quot;ERROR&quot;;&quot;&quot;)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0])*IF(AND(ISEVEN(ABS([.A70])*10);MOD(ABS([.A70])*10;1)&lt;=0.5);ROUNDDOWN(ABS([.A70]);1);ROUND(ABS([.A70]);1))"/>
          <table:table-cell office:value-type="error" table:formula="of:=[.D70]-[.E70]"/>
          <table:table-cell office:value-type="error" table:formula="of:=IF([.F70]&lt;&gt;0;&quot;ERROR&quot;;&quot;&quot;)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1])*IF(AND(ISEVEN(ABS([.A71])*10);MOD(ABS([.A71])*10;1)&lt;=0.5);ROUNDDOWN(ABS([.A71]);1);ROUND(ABS([.A71]);1))"/>
          <table:table-cell office:value-type="error" table:formula="of:=[.D71]-[.E71]"/>
          <table:table-cell office:value-type="error" table:formula="of:=IF([.F71]&lt;&gt;0;&quot;ERROR&quot;;&quot;&quot;)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2])*IF(AND(ISEVEN(ABS([.A72])*10);MOD(ABS([.A72])*10;1)&lt;=0.5);ROUNDDOWN(ABS([.A72]);1);ROUND(ABS([.A72]);1))"/>
          <table:table-cell office:value-type="error" table:formula="of:=[.D72]-[.E72]"/>
          <table:table-cell office:value-type="error" table:formula="of:=IF([.F72]&lt;&gt;0;&quot;ERROR&quot;;&quot;&quot;)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3])*IF(AND(ISEVEN(ABS([.A73])*10);MOD(ABS([.A73])*10;1)&lt;=0.5);ROUNDDOWN(ABS([.A73]);1);ROUND(ABS([.A73]);1))"/>
          <table:table-cell office:value-type="error" table:formula="of:=[.D73]-[.E73]"/>
          <table:table-cell office:value-type="error" table:formula="of:=IF([.F73]&lt;&gt;0;&quot;ERROR&quot;;&quot;&quot;)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4])*IF(AND(ISEVEN(ABS([.A74])*10);MOD(ABS([.A74])*10;1)&lt;=0.5);ROUNDDOWN(ABS([.A74]);1);ROUND(ABS([.A74]);1))"/>
          <table:table-cell office:value-type="error" table:formula="of:=[.D74]-[.E74]"/>
          <table:table-cell office:value-type="error" table:formula="of:=IF([.F74]&lt;&gt;0;&quot;ERROR&quot;;&quot;&quot;)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5])*IF(AND(ISEVEN(ABS([.A75])*10);MOD(ABS([.A75])*10;1)&lt;=0.5);ROUNDDOWN(ABS([.A75]);1);ROUND(ABS([.A75]);1))"/>
          <table:table-cell office:value-type="error" table:formula="of:=[.D75]-[.E75]"/>
          <table:table-cell office:value-type="error" table:formula="of:=IF([.F75]&lt;&gt;0;&quot;ERROR&quot;;&quot;&quot;)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6])*IF(AND(ISEVEN(ABS([.A76])*10);MOD(ABS([.A76])*10;1)&lt;=0.5);ROUNDDOWN(ABS([.A76]);1);ROUND(ABS([.A76]);1))"/>
          <table:table-cell office:value-type="error" table:formula="of:=[.D76]-[.E76]"/>
          <table:table-cell office:value-type="error" table:formula="of:=IF([.F76]&lt;&gt;0;&quot;ERROR&quot;;&quot;&quot;)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error" table:formula="of:=SIGN([.A77])*IF(AND(ISEVEN(ABS([.A77])*10);MOD(ABS([.A77])*10;1)&lt;=0.5);ROUNDDOWN(ABS([.A77]);1);ROUND(ABS([.A77]);1))"/>
          <table:table-cell office:value-type="error" table:formula="of:=[.D77]-[.E77]"/>
          <table:table-cell office:value-type="error" table:formula="of:=IF([.F77]&lt;&gt;0;&quot;ERROR&quot;;&quot;&quot;)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78])*IF(AND(ISEVEN(ABS([.A78])*10);MOD(ABS([.A78])*10;1)&lt;=0.5);ROUNDDOWN(ABS([.A78]);1);ROUND(ABS([.A78]);1))"/>
          <table:table-cell office:value-type="error" table:formula="of:=[.D78]-[.E78]"/>
          <table:table-cell office:value-type="error" table:formula="of:=IF([.F78]&lt;&gt;0;&quot;ERROR&quot;;&quot;&quot;)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79])*IF(AND(ISEVEN(ABS([.A79])*10);MOD(ABS([.A79])*10;1)&lt;=0.5);ROUNDDOWN(ABS([.A79]);1);ROUND(ABS([.A79]);1))"/>
          <table:table-cell office:value-type="error" table:formula="of:=[.D79]-[.E79]"/>
          <table:table-cell office:value-type="error" table:formula="of:=IF([.F79]&lt;&gt;0;&quot;ERROR&quot;;&quot;&quot;)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0])*IF(AND(ISEVEN(ABS([.A80])*10);MOD(ABS([.A80])*10;1)&lt;=0.5);ROUNDDOWN(ABS([.A80]);1);ROUND(ABS([.A80]);1))"/>
          <table:table-cell office:value-type="error" table:formula="of:=[.D80]-[.E80]"/>
          <table:table-cell office:value-type="error" table:formula="of:=IF([.F80]&lt;&gt;0;&quot;ERROR&quot;;&quot;&quot;)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1])*IF(AND(ISEVEN(ABS([.A81])*10);MOD(ABS([.A81])*10;1)&lt;=0.5);ROUNDDOWN(ABS([.A81]);1);ROUND(ABS([.A81]);1))"/>
          <table:table-cell office:value-type="error" table:formula="of:=[.D81]-[.E81]"/>
          <table:table-cell office:value-type="error" table:formula="of:=IF([.F81]&lt;&gt;0;&quot;ERROR&quot;;&quot;&quot;)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2])*IF(AND(ISEVEN(ABS([.A82])*10);MOD(ABS([.A82])*10;1)&lt;=0.5);ROUNDDOWN(ABS([.A82]);1);ROUND(ABS([.A82]);1))"/>
          <table:table-cell office:value-type="error" table:formula="of:=[.D82]-[.E82]"/>
          <table:table-cell office:value-type="error" table:formula="of:=IF([.F82]&lt;&gt;0;&quot;ERROR&quot;;&quot;&quot;)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3])*IF(AND(ISEVEN(ABS([.A83])*10);MOD(ABS([.A83])*10;1)&lt;=0.5);ROUNDDOWN(ABS([.A83]);1);ROUND(ABS([.A83]);1))"/>
          <table:table-cell office:value-type="error" table:formula="of:=[.D83]-[.E83]"/>
          <table:table-cell office:value-type="error" table:formula="of:=IF([.F83]&lt;&gt;0;&quot;ERROR&quot;;&quot;&quot;)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4])*IF(AND(ISEVEN(ABS([.A84])*10);MOD(ABS([.A84])*10;1)&lt;=0.5);ROUNDDOWN(ABS([.A84]);1);ROUND(ABS([.A84]);1))"/>
          <table:table-cell office:value-type="error" table:formula="of:=[.D84]-[.E84]"/>
          <table:table-cell office:value-type="error" table:formula="of:=IF([.F84]&lt;&gt;0;&quot;ERROR&quot;;&quot;&quot;)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5])*IF(AND(ISEVEN(ABS([.A85])*10);MOD(ABS([.A85])*10;1)&lt;=0.5);ROUNDDOWN(ABS([.A85]);1);ROUND(ABS([.A85]);1))"/>
          <table:table-cell office:value-type="error" table:formula="of:=[.D85]-[.E85]"/>
          <table:table-cell office:value-type="error" table:formula="of:=IF([.F85]&lt;&gt;0;&quot;ERROR&quot;;&quot;&quot;)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6])*IF(AND(ISEVEN(ABS([.A86])*10);MOD(ABS([.A86])*10;1)&lt;=0.5);ROUNDDOWN(ABS([.A86]);1);ROUND(ABS([.A86]);1))"/>
          <table:table-cell office:value-type="error" table:formula="of:=[.D86]-[.E86]"/>
          <table:table-cell office:value-type="error" table:formula="of:=IF([.F86]&lt;&gt;0;&quot;ERROR&quot;;&quot;&quot;)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7])*IF(AND(ISEVEN(ABS([.A87])*10);MOD(ABS([.A87])*10;1)&lt;=0.5);ROUNDDOWN(ABS([.A87]);1);ROUND(ABS([.A87]);1))"/>
          <table:table-cell office:value-type="error" table:formula="of:=[.D87]-[.E87]"/>
          <table:table-cell office:value-type="error" table:formula="of:=IF([.F87]&lt;&gt;0;&quot;ERROR&quot;;&quot;&quot;)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88])*IF(AND(ISEVEN(ABS([.A88])*10);MOD(ABS([.A88])*10;1)&lt;=0.5);ROUNDDOWN(ABS([.A88]);1);ROUND(ABS([.A88]);1))"/>
          <table:table-cell office:value-type="error" table:formula="of:=[.D88]-[.E88]"/>
          <table:table-cell office:value-type="error" table:formula="of:=IF([.F88]&lt;&gt;0;&quot;ERROR&quot;;&quot;&quot;)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89])*IF(AND(ISEVEN(ABS([.A89])*10);MOD(ABS([.A89])*10;1)&lt;=0.5);ROUNDDOWN(ABS([.A89]);1);ROUND(ABS([.A89]);1))"/>
          <table:table-cell office:value-type="error" table:formula="of:=[.D89]-[.E89]"/>
          <table:table-cell office:value-type="error" table:formula="of:=IF([.F89]&lt;&gt;0;&quot;ERROR&quot;;&quot;&quot;)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0])*IF(AND(ISEVEN(ABS([.A90])*10);MOD(ABS([.A90])*10;1)&lt;=0.5);ROUNDDOWN(ABS([.A90]);1);ROUND(ABS([.A90]);1))"/>
          <table:table-cell office:value-type="error" table:formula="of:=[.D90]-[.E90]"/>
          <table:table-cell office:value-type="error" table:formula="of:=IF([.F90]&lt;&gt;0;&quot;ERROR&quot;;&quot;&quot;)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1])*IF(AND(ISEVEN(ABS([.A91])*10);MOD(ABS([.A91])*10;1)&lt;=0.5);ROUNDDOWN(ABS([.A91]);1);ROUND(ABS([.A91]);1))"/>
          <table:table-cell office:value-type="error" table:formula="of:=[.D91]-[.E91]"/>
          <table:table-cell office:value-type="error" table:formula="of:=IF([.F91]&lt;&gt;0;&quot;ERROR&quot;;&quot;&quot;)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2])*IF(AND(ISEVEN(ABS([.A92])*10);MOD(ABS([.A92])*10;1)&lt;=0.5);ROUNDDOWN(ABS([.A92]);1);ROUND(ABS([.A92]);1))"/>
          <table:table-cell office:value-type="error" table:formula="of:=[.D92]-[.E92]"/>
          <table:table-cell office:value-type="error" table:formula="of:=IF([.F92]&lt;&gt;0;&quot;ERROR&quot;;&quot;&quot;)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3])*IF(AND(ISEVEN(ABS([.A93])*10);MOD(ABS([.A93])*10;1)&lt;=0.5);ROUNDDOWN(ABS([.A93]);1);ROUND(ABS([.A93]);1))"/>
          <table:table-cell office:value-type="error" table:formula="of:=[.D93]-[.E93]"/>
          <table:table-cell office:value-type="error" table:formula="of:=IF([.F93]&lt;&gt;0;&quot;ERROR&quot;;&quot;&quot;)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4])*IF(AND(ISEVEN(ABS([.A94])*10);MOD(ABS([.A94])*10;1)&lt;=0.5);ROUNDDOWN(ABS([.A94]);1);ROUND(ABS([.A94]);1))"/>
          <table:table-cell office:value-type="error" table:formula="of:=[.D94]-[.E94]"/>
          <table:table-cell office:value-type="error" table:formula="of:=IF([.F94]&lt;&gt;0;&quot;ERROR&quot;;&quot;&quot;)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5])*IF(AND(ISEVEN(ABS([.A95])*10);MOD(ABS([.A95])*10;1)&lt;=0.5);ROUNDDOWN(ABS([.A95]);1);ROUND(ABS([.A95]);1))"/>
          <table:table-cell office:value-type="error" table:formula="of:=[.D95]-[.E95]"/>
          <table:table-cell office:value-type="error" table:formula="of:=IF([.F95]&lt;&gt;0;&quot;ERROR&quot;;&quot;&quot;)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6])*IF(AND(ISEVEN(ABS([.A96])*10);MOD(ABS([.A96])*10;1)&lt;=0.5);ROUNDDOWN(ABS([.A96]);1);ROUND(ABS([.A96]);1))"/>
          <table:table-cell office:value-type="error" table:formula="of:=[.D96]-[.E96]"/>
          <table:table-cell office:value-type="error" table:formula="of:=IF([.F96]&lt;&gt;0;&quot;ERROR&quot;;&quot;&quot;)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error" table:formula="of:=SIGN([.A97])*IF(AND(ISEVEN(ABS([.A97])*10);MOD(ABS([.A97])*10;1)&lt;=0.5);ROUNDDOWN(ABS([.A97]);1);ROUND(ABS([.A97]);1))"/>
          <table:table-cell office:value-type="error" table:formula="of:=[.D97]-[.E97]"/>
          <table:table-cell office:value-type="error" table:formula="of:=IF([.F97]&lt;&gt;0;&quot;ERROR&quot;;&quot;&quot;)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98])*IF(AND(ISEVEN(ABS([.A98])*10);MOD(ABS([.A98])*10;1)&lt;=0.5);ROUNDDOWN(ABS([.A98]);1);ROUND(ABS([.A98]);1))"/>
          <table:table-cell office:value-type="error" table:formula="of:=[.D98]-[.E98]"/>
          <table:table-cell office:value-type="error" table:formula="of:=IF([.F98]&lt;&gt;0;&quot;ERROR&quot;;&quot;&quot;)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99])*IF(AND(ISEVEN(ABS([.A99])*10);MOD(ABS([.A99])*10;1)&lt;=0.5);ROUNDDOWN(ABS([.A99]);1);ROUND(ABS([.A99]);1))"/>
          <table:table-cell office:value-type="error" table:formula="of:=[.D99]-[.E99]"/>
          <table:table-cell office:value-type="error" table:formula="of:=IF([.F99]&lt;&gt;0;&quot;ERROR&quot;;&quot;&quot;)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0])*IF(AND(ISEVEN(ABS([.A100])*10);MOD(ABS([.A100])*10;1)&lt;=0.5);ROUNDDOWN(ABS([.A100]);1);ROUND(ABS([.A100]);1))"/>
          <table:table-cell office:value-type="error" table:formula="of:=[.D100]-[.E100]"/>
          <table:table-cell office:value-type="error" table:formula="of:=IF([.F100]&lt;&gt;0;&quot;ERROR&quot;;&quot;&quot;)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1])*IF(AND(ISEVEN(ABS([.A101])*10);MOD(ABS([.A101])*10;1)&lt;=0.5);ROUNDDOWN(ABS([.A101]);1);ROUND(ABS([.A101]);1))"/>
          <table:table-cell office:value-type="error" table:formula="of:=[.D101]-[.E101]"/>
          <table:table-cell office:value-type="error" table:formula="of:=IF([.F101]&lt;&gt;0;&quot;ERROR&quot;;&quot;&quot;)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2])*IF(AND(ISEVEN(ABS([.A102])*10);MOD(ABS([.A102])*10;1)&lt;=0.5);ROUNDDOWN(ABS([.A102]);1);ROUND(ABS([.A102]);1))"/>
          <table:table-cell office:value-type="error" table:formula="of:=[.D102]-[.E102]"/>
          <table:table-cell office:value-type="error" table:formula="of:=IF([.F102]&lt;&gt;0;&quot;ERROR&quot;;&quot;&quot;)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3])*IF(AND(ISEVEN(ABS([.A103])*10);MOD(ABS([.A103])*10;1)&lt;=0.5);ROUNDDOWN(ABS([.A103]);1);ROUND(ABS([.A103]);1))"/>
          <table:table-cell office:value-type="error" table:formula="of:=[.D103]-[.E103]"/>
          <table:table-cell office:value-type="error" table:formula="of:=IF([.F103]&lt;&gt;0;&quot;ERROR&quot;;&quot;&quot;)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4])*IF(AND(ISEVEN(ABS([.A104])*10);MOD(ABS([.A104])*10;1)&lt;=0.5);ROUNDDOWN(ABS([.A104]);1);ROUND(ABS([.A104]);1))"/>
          <table:table-cell office:value-type="error" table:formula="of:=[.D104]-[.E104]"/>
          <table:table-cell office:value-type="error" table:formula="of:=IF([.F104]&lt;&gt;0;&quot;ERROR&quot;;&quot;&quot;)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5])*IF(AND(ISEVEN(ABS([.A105])*10);MOD(ABS([.A105])*10;1)&lt;=0.5);ROUNDDOWN(ABS([.A105]);1);ROUND(ABS([.A105]);1))"/>
          <table:table-cell office:value-type="error" table:formula="of:=[.D105]-[.E105]"/>
          <table:table-cell office:value-type="error" table:formula="of:=IF([.F105]&lt;&gt;0;&quot;ERROR&quot;;&quot;&quot;)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6])*IF(AND(ISEVEN(ABS([.A106])*10);MOD(ABS([.A106])*10;1)&lt;=0.5);ROUNDDOWN(ABS([.A106]);1);ROUND(ABS([.A106]);1))"/>
          <table:table-cell office:value-type="error" table:formula="of:=[.D106]-[.E106]"/>
          <table:table-cell office:value-type="error" table:formula="of:=IF([.F106]&lt;&gt;0;&quot;ERROR&quot;;&quot;&quot;)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error" table:formula="of:=SIGN([.A107])*IF(AND(ISEVEN(ABS([.A107])*10);MOD(ABS([.A107])*10;1)&lt;=0.5);ROUNDDOWN(ABS([.A107]);1);ROUND(ABS([.A107]);1))"/>
          <table:table-cell office:value-type="error" table:formula="of:=[.D107]-[.E107]"/>
          <table:table-cell office:value-type="error" table:formula="of:=IF([.F107]&lt;&gt;0;&quot;ERROR&quot;;&quot;&quot;)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08])*IF(AND(ISEVEN(ABS([.A108])*10);MOD(ABS([.A108])*10;1)&lt;=0.5);ROUNDDOWN(ABS([.A108]);1);ROUND(ABS([.A108]);1))"/>
          <table:table-cell office:value-type="error" table:formula="of:=[.D108]-[.E108]"/>
          <table:table-cell office:value-type="error" table:formula="of:=IF([.F108]&lt;&gt;0;&quot;ERROR&quot;;&quot;&quot;)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09])*IF(AND(ISEVEN(ABS([.A109])*10);MOD(ABS([.A109])*10;1)&lt;=0.5);ROUNDDOWN(ABS([.A109]);1);ROUND(ABS([.A109]);1))"/>
          <table:table-cell office:value-type="error" table:formula="of:=[.D109]-[.E109]"/>
          <table:table-cell office:value-type="error" table:formula="of:=IF([.F109]&lt;&gt;0;&quot;ERROR&quot;;&quot;&quot;)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0])*IF(AND(ISEVEN(ABS([.A110])*10);MOD(ABS([.A110])*10;1)&lt;=0.5);ROUNDDOWN(ABS([.A110]);1);ROUND(ABS([.A110]);1))"/>
          <table:table-cell office:value-type="error" table:formula="of:=[.D110]-[.E110]"/>
          <table:table-cell office:value-type="error" table:formula="of:=IF([.F110]&lt;&gt;0;&quot;ERROR&quot;;&quot;&quot;)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1])*IF(AND(ISEVEN(ABS([.A111])*10);MOD(ABS([.A111])*10;1)&lt;=0.5);ROUNDDOWN(ABS([.A111]);1);ROUND(ABS([.A111]);1))"/>
          <table:table-cell office:value-type="error" table:formula="of:=[.D111]-[.E111]"/>
          <table:table-cell office:value-type="error" table:formula="of:=IF([.F111]&lt;&gt;0;&quot;ERROR&quot;;&quot;&quot;)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2])*IF(AND(ISEVEN(ABS([.A112])*10);MOD(ABS([.A112])*10;1)&lt;=0.5);ROUNDDOWN(ABS([.A112]);1);ROUND(ABS([.A112]);1))"/>
          <table:table-cell office:value-type="error" table:formula="of:=[.D112]-[.E112]"/>
          <table:table-cell office:value-type="error" table:formula="of:=IF([.F112]&lt;&gt;0;&quot;ERROR&quot;;&quot;&quot;)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3])*IF(AND(ISEVEN(ABS([.A113])*10);MOD(ABS([.A113])*10;1)&lt;=0.5);ROUNDDOWN(ABS([.A113]);1);ROUND(ABS([.A113]);1))"/>
          <table:table-cell office:value-type="error" table:formula="of:=[.D113]-[.E113]"/>
          <table:table-cell office:value-type="error" table:formula="of:=IF([.F113]&lt;&gt;0;&quot;ERROR&quot;;&quot;&quot;)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4])*IF(AND(ISEVEN(ABS([.A114])*10);MOD(ABS([.A114])*10;1)&lt;=0.5);ROUNDDOWN(ABS([.A114]);1);ROUND(ABS([.A114]);1))"/>
          <table:table-cell office:value-type="error" table:formula="of:=[.D114]-[.E114]"/>
          <table:table-cell office:value-type="error" table:formula="of:=IF([.F114]&lt;&gt;0;&quot;ERROR&quot;;&quot;&quot;)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5])*IF(AND(ISEVEN(ABS([.A115])*10);MOD(ABS([.A115])*10;1)&lt;=0.5);ROUNDDOWN(ABS([.A115]);1);ROUND(ABS([.A115]);1))"/>
          <table:table-cell office:value-type="error" table:formula="of:=[.D115]-[.E115]"/>
          <table:table-cell office:value-type="error" table:formula="of:=IF([.F115]&lt;&gt;0;&quot;ERROR&quot;;&quot;&quot;)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6])*IF(AND(ISEVEN(ABS([.A116])*10);MOD(ABS([.A116])*10;1)&lt;=0.5);ROUNDDOWN(ABS([.A116]);1);ROUND(ABS([.A116]);1))"/>
          <table:table-cell office:value-type="error" table:formula="of:=[.D116]-[.E116]"/>
          <table:table-cell office:value-type="error" table:formula="of:=IF([.F116]&lt;&gt;0;&quot;ERROR&quot;;&quot;&quot;)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7])*IF(AND(ISEVEN(ABS([.A117])*10);MOD(ABS([.A117])*10;1)&lt;=0.5);ROUNDDOWN(ABS([.A117]);1);ROUND(ABS([.A117]);1))"/>
          <table:table-cell office:value-type="error" table:formula="of:=[.D117]-[.E117]"/>
          <table:table-cell office:value-type="error" table:formula="of:=IF([.F117]&lt;&gt;0;&quot;ERROR&quot;;&quot;&quot;)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8])*IF(AND(ISEVEN(ABS([.A118])*10);MOD(ABS([.A118])*10;1)&lt;=0.5);ROUNDDOWN(ABS([.A118]);1);ROUND(ABS([.A118]);1))"/>
          <table:table-cell office:value-type="error" table:formula="of:=[.D118]-[.E118]"/>
          <table:table-cell office:value-type="error" table:formula="of:=IF([.F118]&lt;&gt;0;&quot;ERROR&quot;;&quot;&quot;)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9])*IF(AND(ISEVEN(ABS([.A119])*10);MOD(ABS([.A119])*10;1)&lt;=0.5);ROUNDDOWN(ABS([.A119]);1);ROUND(ABS([.A119]);1))"/>
          <table:table-cell office:value-type="error" table:formula="of:=[.D119]-[.E119]"/>
          <table:table-cell office:value-type="error" table:formula="of:=IF([.F119]&lt;&gt;0;&quot;ERROR&quot;;&quot;&quot;)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0])*IF(AND(ISEVEN(ABS([.A120])*10);MOD(ABS([.A120])*10;1)&lt;=0.5);ROUNDDOWN(ABS([.A120]);1);ROUND(ABS([.A120]);1))"/>
          <table:table-cell office:value-type="error" table:formula="of:=[.D120]-[.E120]"/>
          <table:table-cell office:value-type="error" table:formula="of:=IF([.F120]&lt;&gt;0;&quot;ERROR&quot;;&quot;&quot;)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1])*IF(AND(ISEVEN(ABS([.A121])*10);MOD(ABS([.A121])*10;1)&lt;=0.5);ROUNDDOWN(ABS([.A121]);1);ROUND(ABS([.A121]);1))"/>
          <table:table-cell office:value-type="error" table:formula="of:=[.D121]-[.E121]"/>
          <table:table-cell office:value-type="error" table:formula="of:=IF([.F121]&lt;&gt;0;&quot;ERROR&quot;;&quot;&quot;)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2])*IF(AND(ISEVEN(ABS([.A122])*10);MOD(ABS([.A122])*10;1)&lt;=0.5);ROUNDDOWN(ABS([.A122]);1);ROUND(ABS([.A122]);1))"/>
          <table:table-cell office:value-type="error" table:formula="of:=[.D122]-[.E122]"/>
          <table:table-cell office:value-type="error" table:formula="of:=IF([.F122]&lt;&gt;0;&quot;ERROR&quot;;&quot;&quot;)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Ugly Turd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Brown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Ugly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Ugly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Fast Turd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Pink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Ugly Bear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33">
            <text:p>33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 unless no data:</text:p>
          </table:table-cell>
          <table:table-cell office:value-type="error" table:formula="of:=IF(SUBTOTAL(102;[.D2:.D101])&gt;0;SUBTOTAL(101;[.D2:.D101]);&quot;&quot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SUBTOTAL(101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109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:</text:p>
          </table:table-cell>
          <table:table-cell office:value-type="error" table:formula="of:=SUBTOTAL(105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:</text:p>
          </table:table-cell>
          <table:table-cell office:value-type="error" table:formula="of:=SUBTOTAL(104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10">
      <number:number number:decimal-places="1" number:min-decimal-places="1" number:min-integer-digits="1"/>
    </number:number-style>
    <number:number-style style:name="auto11">
      <number:number number:decimal-places="3" number:min-decimal-places="3" number:min-integer-digits="1"/>
    </number:number-style>
    <number:percentage-style style:name="auto12">
      <number:number number:decimal-places="1" number:min-decimal-places="1" number:min-integer-digits="1"/>
      <number:text> %</number:text>
    </number:percentage-style>
    <number:percentage-style style:name="auto13">
      <number:number number:decimal-places="2" number:min-decimal-places="2" number:min-integer-digits="1"/>
      <number:text> %</number:text>
    </number:percentage-style>
    <number:number-style style:name="auto36">
      <number:number number:decimal-places="0" number:min-decimal-places="0" number:min-integer-digits="1"/>
    </number:number-style>
    <number:number-style style:name="auto39">
      <number:number number:decimal-places="2" number:min-decimal-places="2" number:min-integer-digits="1"/>
    </number:number-style>
    <number:number-style style:name="auto42">
      <number:number number:decimal-places="4" number:min-decimal-places="4" number:min-integer-digits="1"/>
    </number:number-style>
    <number:number-style style:name="auto44">
      <number:number number:decimal-places="5" number:min-decimal-places="5" number:min-integer-digits="1"/>
    </number:number-style>
    <number:percentage-style style:name="auto46">
      <number:number number:decimal-places="0" number:min-decimal-places="0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1.1rc0</meta:generator>
    <meta:creation-date>2026-07-17T15:15:39</meta:creation-date>
    <dc:date>2026-07-17T15:15:39</dc:date>
  </office:meta>
</office:document-meta>
</file>