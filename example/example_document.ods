
<file path=META-INF/manifest.xml><?xml version="1.0" encoding="utf-8"?>
<manifest:manifest xmlns:manifest="urn:oasis:names:tc:opendocument:xmlns:manifest:1.0" manifest:version="1.4">
  <manifest:file-entry manifest:full-path="/" manifest:version="1.4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4">
  <office:font-face-decls>
    <style:font-face style:name="Arial" svg:font-family="'Arial'"/>
  </office:font-face-decls>
  <office:automatic-styles>
    <style:style style:name="cond0_0" style:display-name="cond0_0" style:family="table-cell">
      <style:map style:apply-style-name="glbl0" style:condition="cell-content()&lt;10" style:base-cell-address="'Conditional Formatting'.A1"/>
      <style:map style:apply-style-name="glbl1" style:condition="cell-content()&lt;20" style:base-cell-address="'Conditional Formatting'.A1"/>
      <style:map style:apply-style-name="glbl2" style:condition="cell-content()&lt;30" style:base-cell-address="'Conditional Formatting'.A1"/>
    </style:style>
    <style:style style:name="cond1_0" style:display-name="cond1_0" style:family="table-cell">
      <style:map style:apply-style-name="glbl0" style:condition="is-true-formula([.$A1]&lt;16)" style:base-cell-address="'Conditional Formatting'.B1"/>
      <style:map style:apply-style-name="glbl1" style:condition="is-true-formula([.$A1]&lt;32)" style:base-cell-address="'Conditional Formatting'.B1"/>
    </style:style>
    <style:style style:name="cond2_0" style:display-name="cond2_0" style:family="table-cell">
      <style:map style:apply-style-name="glbl0" style:condition="is-true-formula([.$A1]&lt;8)" style:base-cell-address="'Conditional Formatting'.C1"/>
      <style:map style:apply-style-name="glbl2" style:condition="is-true-formula([.$A1]&lt;16)" style:base-cell-address="'Conditional Formatting'.C1"/>
      <style:map style:apply-style-name="glbl1" style:condition="is-true-formula([.$A1]&lt;24)" style:base-cell-address="'Conditional Formatting'.C1"/>
      <style:map style:apply-style-name="glbl3" style:condition="is-true-formula([.$A1]&lt;32)" style:base-cell-address="'Conditional Formatting'.C1"/>
    </style:style>
    <style:style style:name="cond3_0" style:display-name="cond3_0" style:family="table-cell">
      <style:map style:apply-style-name="glbl4" style:condition="cell-content()=0" style:base-cell-address="'Image'.A1"/>
      <style:map style:apply-style-name="glbl5" style:condition="cell-content()=1" style:base-cell-address="'Image'.A1"/>
      <style:map style:apply-style-name="glbl6" style:condition="cell-content()=2" style:base-cell-address="'Image'.A1"/>
      <style:map style:apply-style-name="glbl7" style:condition="cell-content()=3" style:base-cell-address="'Image'.A1"/>
      <style:map style:apply-style-name="glbl8" style:condition="cell-content()=4" style:base-cell-address="'Image'.A1"/>
      <style:map style:apply-style-name="glbl9" style:condition="cell-content()=5" style:base-cell-address="'Image'.A1"/>
    </style:style>
    <style:style style:name="cond4_0" style:display-name="cond4_0" style:family="table-cell" style:data-style-name="auto10">
      <style:map style:apply-style-name="glbl0" style:condition="is-true-formula([.$A2]&lt;-10)" style:base-cell-address="'Conditional Multi-Format'.A2"/>
      <style:map style:apply-style-name="glbl2" style:condition="is-true-formula([.$A2]&gt;10)" style:base-cell-address="'Conditional Multi-Format'.A2"/>
    </style:style>
    <style:style style:name="cond4_1" style:display-name="cond4_1" style:family="table-cell" style:data-style-name="auto11">
      <style:map style:apply-style-name="glbl0" style:condition="is-true-formula([.$A2]&lt;-10)" style:base-cell-address="'Conditional Multi-Format'.A2"/>
      <style:map style:apply-style-name="glbl2" style:condition="is-true-formula([.$A2]&gt;10)" style:base-cell-address="'Conditional Multi-Format'.A2"/>
    </style:style>
    <style:style style:name="cond4_2" style:display-name="cond4_2" style:family="table-cell" style:data-style-name="auto12">
      <style:map style:apply-style-name="glbl0" style:condition="is-true-formula([.$A2]&lt;-10)" style:base-cell-address="'Conditional Multi-Format'.A2"/>
      <style:map style:apply-style-name="glbl2" style:condition="is-true-formula([.$A2]&gt;10)" style:base-cell-address="'Conditional Multi-Format'.A2"/>
    </style:style>
    <style:style style:name="cond4_3" style:display-name="cond4_3" style:family="table-cell" style:data-style-name="auto13">
      <style:map style:apply-style-name="glbl0" style:condition="is-true-formula([.$A2]&lt;-10)" style:base-cell-address="'Conditional Multi-Format'.A2"/>
      <style:map style:apply-style-name="glbl2" style:condition="is-true-formula([.$A2]&gt;10)" style:base-cell-address="'Conditional Multi-Format'.A2"/>
    </style:style>
    <style:style style:name="dr" style:display-name="dr" style:family="table-row"/>
    <style:style style:name="dc" style:display-name="dc" style:family="table-column"/>
    <style:style style:name="auto14" style:display-name="auto14" style:family="table-cell">
      <style:table-cell-properties style:rotation-angle="45"/>
      <style:paragraph-properties fo:text-align="start"/>
      <style:text-properties style:font-name="Arial" fo:font-size="9pt" fo:font-weight="bold" fo:font-style="italic"/>
    </style:style>
    <style:style style:name="auto15" style:display-name="auto15" style:family="table-cell">
      <style:text-properties fo:font-weight="bold"/>
    </style:style>
    <style:style style:name="auto16" style:display-name="auto16" style:family="table-cell">
      <style:text-properties fo:font-style="italic"/>
    </style:style>
    <style:style style:name="auto17" style:display-name="auto17" style:family="table-cell">
      <style:paragraph-properties fo:text-align="start"/>
      <style:text-properties/>
    </style:style>
    <style:style style:name="auto18" style:display-name="auto18" style:family="table-cell">
      <style:paragraph-properties fo:text-align="center"/>
      <style:text-properties/>
    </style:style>
    <style:style style:name="auto19" style:display-name="auto19" style:family="table-cell">
      <style:paragraph-properties fo:text-align="end"/>
      <style:text-properties/>
    </style:style>
    <style:style style:name="auto20" style:display-name="auto20" style:family="table-cell">
      <style:text-properties fo:color="#0000ff"/>
    </style:style>
    <style:style style:name="auto21" style:display-name="auto21" style:family="table-cell">
      <style:table-cell-properties fo:background-color="#aaaaff"/>
      <style:text-properties/>
    </style:style>
    <style:style style:name="auto22" style:display-name="auto22" style:family="table-cell">
      <style:table-cell-properties fo:border-top="0.7500pt solid #ff0000" fo:border-left="0.7500pt solid #ff0000"/>
      <style:text-properties/>
    </style:style>
    <style:style style:name="auto23" style:display-name="auto23" style:family="table-cell">
      <style:table-cell-properties fo:border-top="0.7500pt solid #ff0000"/>
      <style:text-properties/>
    </style:style>
    <style:style style:name="auto24" style:display-name="auto24" style:family="table-cell">
      <style:table-cell-properties fo:border-top="0.7500pt solid #ff0000" fo:border-right="0.7500pt solid #ff0000"/>
      <style:text-properties/>
    </style:style>
    <style:style style:name="auto25" style:display-name="auto25" style:family="table-cell">
      <style:table-cell-properties fo:border-left="0.7500pt solid #ff0000"/>
      <style:text-properties/>
    </style:style>
    <style:style style:name="auto26" style:display-name="auto26" style:family="table-cell">
      <style:table-cell-properties fo:border-right="0.7500pt solid #ff0000"/>
      <style:text-properties/>
    </style:style>
    <style:style style:name="auto27" style:display-name="auto27" style:family="table-cell">
      <style:table-cell-properties fo:border-bottom="0.7500pt solid #ff0000" fo:border-left="0.7500pt solid #ff0000"/>
      <style:text-properties/>
    </style:style>
    <style:style style:name="auto28" style:display-name="auto28" style:family="table-cell">
      <style:table-cell-properties fo:border-bottom="0.7500pt solid #ff0000"/>
      <style:text-properties/>
    </style:style>
    <style:style style:name="auto29" style:display-name="auto29" style:family="table-cell">
      <style:table-cell-properties fo:wrap-option="wrap" fo:border-bottom="0.7500pt solid #ff0000" fo:border-right="0.7500pt solid #ff0000"/>
      <style:text-properties/>
    </style:style>
    <style:style style:name="auto30" style:display-name="auto30" style:family="table-row">
      <style:table-row-properties style:row-height="1cm"/>
    </style:style>
    <style:style style:name="auto31" style:display-name="auto31" style:family="table-cell">
      <style:table-cell-properties style:vertical-align="middle"/>
      <style:text-properties/>
    </style:style>
    <style:style style:name="auto32" style:display-name="auto32" style:family="table-row">
      <style:table-row-properties style:row-height="2cm"/>
    </style:style>
    <style:style style:name="auto33" style:display-name="auto33" style:family="table-column">
      <style:table-column-properties style:column-width="4cm"/>
    </style:style>
    <style:style style:name="auto34" style:display-name="auto34" style:family="table-column">
      <style:table-column-properties style:column-width="5cm"/>
    </style:style>
    <style:style style:name="auto35" style:display-name="auto35" style:family="table-cell" style:data-style-name="auto36">
      <style:text-properties/>
    </style:style>
    <style:style style:name="auto37" style:display-name="auto37" style:family="table-cell" style:data-style-name="auto10">
      <style:text-properties/>
    </style:style>
    <style:style style:name="auto38" style:display-name="auto38" style:family="table-cell" style:data-style-name="auto39">
      <style:text-properties/>
    </style:style>
    <style:style style:name="auto40" style:display-name="auto40" style:family="table-cell" style:data-style-name="auto11">
      <style:text-properties/>
    </style:style>
    <style:style style:name="auto41" style:display-name="auto41" style:family="table-cell" style:data-style-name="auto42">
      <style:text-properties/>
    </style:style>
    <style:style style:name="auto43" style:display-name="auto43" style:family="table-cell" style:data-style-name="auto44">
      <style:text-properties/>
    </style:style>
    <style:style style:name="auto45" style:display-name="auto45" style:family="table-cell" style:data-style-name="auto46">
      <style:text-properties/>
    </style:style>
    <style:style style:name="auto47" style:display-name="auto47" style:family="table-cell" style:data-style-name="auto12">
      <style:text-properties/>
    </style:style>
    <style:style style:name="auto48" style:display-name="auto48" style:family="table-cell" style:data-style-name="auto13">
      <style:text-properties/>
    </style:style>
    <style:style style:name="auto49" style:display-name="auto49" style:family="table-cell" style:data-style-name="auto50">
      <style:text-properties/>
    </style:style>
    <style:style style:name="auto51" style:display-name="auto51" style:family="table-cell" style:data-style-name="auto52">
      <style:text-properties/>
    </style:style>
    <style:style style:name="auto53" style:display-name="auto53" style:family="table-column">
      <style:table-column-properties style:column-width="3cm"/>
    </style:style>
    <style:style style:name="auto54" style:display-name="auto54" style:family="table-column">
      <style:table-column-properties style:column-width="1cm"/>
    </style:style>
  </office:automatic-styles>
  <office:body>
    <office:spreadsheet>
      <table:table table:name="Formatting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 table:visibility="collapse" table:style-name="dc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table:style-name="auto14" office:value-type="string">
            <text:p>Rotated Arial</text:p>
          </table:table-cell>
          <table:table-cell table:style-name="auto15" office:value-type="string">
            <text:p>Bold only</text:p>
          </table:table-cell>
          <table:table-cell table:style-name="auto16" office:value-type="string">
            <text:p>Italics only</text:p>
          </table:table-cell>
          <table:table-cell table:style-name="auto17" office:value-type="string">
            <text:p>Left adjust</text:p>
          </table:table-cell>
          <table:table-cell table:style-name="auto18" office:value-type="string">
            <text:p>Centered</text:p>
          </table:table-cell>
          <table:table-cell table:style-name="auto19" office:value-type="string">
            <text:p>Right adjust</text:p>
          </table:table-cell>
          <table:table-cell table:style-name="auto20" office:value-type="string">
            <text:p>Blue text</text:p>
          </table:table-cell>
          <table:table-cell table:style-name="auto21" office:value-type="string">
            <text:p>Blue backgroun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lumn right of this is hidden</text:p>
          </table:table-cell>
          <table:table-cell office:value-type="string">
            <text:p>I'm hidden!</text:p>
          </table:table-cell>
          <table:table-cell office:value-type="string">
            <text:p>Column left of this is hidd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table:style-name="auto22" office:value-type="string">
            <text:p>Top left corner of red box</text:p>
          </table:table-cell>
          <table:table-cell table:style-name="auto23"/>
          <table:table-cell table:style-name="auto23"/>
          <table:table-cell table:style-name="auto23"/>
          <table:table-cell table:style-name="auto23"/>
          <table:table-cell table:style-name="auto24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table:style-name="auto25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26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table:style-name="auto27"/>
          <table:table-cell table:style-name="auto28"/>
          <table:table-cell table:style-name="auto28"/>
          <table:table-cell table:style-name="auto28"/>
          <table:table-cell table:style-name="auto28"/>
          <table:table-cell table:style-name="auto29" office:value-type="string">
            <text:p>Bottom right corner of red box with wrapped text as well because the content in here is so lo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is is K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is is AB5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elow here is a row that is hidden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visibility="collapse" table:style-name="dr">
          <table:table-cell office:value-type="string">
            <text:p>I'm hidden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bove this row is a row that is hidden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auto30">
          <table:table-cell table:style-name="auto31" office:value-type="string">
            <text:p>This row is exactly 1cm in height and text is vertically centered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auto32">
          <table:table-cell table:style-name="auto31" office:value-type="string">
            <text:p>This row is exactly 2cm in height and text is vertically centered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alue for next sheet:</text:p>
          </table:table-cell>
          <table:table-cell office:value-type="float" office:value="123.456">
            <text:p>123.4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table:number-columns-spanned="3" table:number-rows-spanned="3" office:value-type="string">
            <text:p>This is a 3x3 grid (A18:C20).</text:p>
          </table:table-cell>
          <table:covered-table-cell/>
          <table:covered-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covered-table-cell/>
          <table:covered-table-cell/>
          <table:covered-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covered-table-cell/>
          <table:covered-table-cell/>
          <table:covered-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Formulas">
        <table:table-column table:style-name="auto33"/>
        <table:table-column table:style-name="auto34"/>
        <table:table-column/>
        <table:table-row>
          <table:table-cell table:style-name="auto15" office:value-type="string">
            <text:p>Imported value:</text:p>
          </table:table-cell>
          <table:table-cell office:value-type="error" table:formula="of:=['Formatting'.B15]"/>
          <table:table-cell office:value-type="string">
            <text:p/>
          </table:table-cell>
        </table:table-row>
        <table:table-row>
          <table:table-cell table:style-name="auto15" office:value-type="string">
            <text:p>Computed value 1:</text:p>
          </table:table-cell>
          <table:table-cell office:value-type="error" table:formula="of:=[.B1]*2/3+123+Pi()"/>
          <table:table-cell office:value-type="error" table:formula="of:=([.B1]*2/3) + 123 + Pi()"/>
        </table:table-row>
        <table:table-row>
          <table:table-cell table:style-name="auto15" office:value-type="string">
            <text:p>Computed value 2:</text:p>
          </table:table-cell>
          <table:table-cell office:value-type="error" table:formula="of:=[.C2]/300"/>
          <table:table-cell office:value-type="string">
            <text:p/>
          </table:table-cell>
        </table:table-row>
        <table:table-row>
          <table:table-cell table:style-name="auto15" office:value-type="string">
            <text:p>Rounded with 0 digits:</text:p>
          </table:table-cell>
          <table:table-cell table:style-name="auto35" office:value-type="error" table:formula="of:=[.C2]"/>
          <table:table-cell office:value-type="string">
            <text:p/>
          </table:table-cell>
        </table:table-row>
        <table:table-row>
          <table:table-cell table:style-name="auto15" office:value-type="string">
            <text:p>Rounded with 1 digits:</text:p>
          </table:table-cell>
          <table:table-cell table:style-name="auto37" office:value-type="error" table:formula="of:=[.C2]"/>
          <table:table-cell office:value-type="string">
            <text:p/>
          </table:table-cell>
        </table:table-row>
        <table:table-row>
          <table:table-cell table:style-name="auto15" office:value-type="string">
            <text:p>Rounded with 2 digits:</text:p>
          </table:table-cell>
          <table:table-cell table:style-name="auto38" office:value-type="error" table:formula="of:=[.C2]"/>
          <table:table-cell office:value-type="string">
            <text:p/>
          </table:table-cell>
        </table:table-row>
        <table:table-row>
          <table:table-cell table:style-name="auto15" office:value-type="string">
            <text:p>Rounded with 3 digits:</text:p>
          </table:table-cell>
          <table:table-cell table:style-name="auto40" office:value-type="error" table:formula="of:=[.C2]"/>
          <table:table-cell office:value-type="string">
            <text:p/>
          </table:table-cell>
        </table:table-row>
        <table:table-row>
          <table:table-cell table:style-name="auto15" office:value-type="string">
            <text:p>Rounded with 4 digits:</text:p>
          </table:table-cell>
          <table:table-cell table:style-name="auto41" office:value-type="error" table:formula="of:=[.C2]"/>
          <table:table-cell office:value-type="string">
            <text:p/>
          </table:table-cell>
        </table:table-row>
        <table:table-row>
          <table:table-cell table:style-name="auto15" office:value-type="string">
            <text:p>Rounded with 5 digits:</text:p>
          </table:table-cell>
          <table:table-cell table:style-name="auto43" office:value-type="error" table:formula="of:=[.C2]"/>
          <table:table-cell office:value-type="string">
            <text:p/>
          </table:table-cell>
        </table:table-row>
        <table:table-row>
          <table:table-cell table:style-name="auto15" office:value-type="string">
            <text:p>Percent with 0 digits:</text:p>
          </table:table-cell>
          <table:table-cell table:style-name="auto45" office:value-type="error" table:formula="of:=[.B3]"/>
          <table:table-cell office:value-type="string">
            <text:p/>
          </table:table-cell>
        </table:table-row>
        <table:table-row>
          <table:table-cell table:style-name="auto15" office:value-type="string">
            <text:p>Percent with 1 digits:</text:p>
          </table:table-cell>
          <table:table-cell table:style-name="auto47" office:value-type="error" table:formula="of:=[.B3]"/>
          <table:table-cell office:value-type="string">
            <text:p/>
          </table:table-cell>
        </table:table-row>
        <table:table-row>
          <table:table-cell table:style-name="auto15" office:value-type="string">
            <text:p>Percent with 2 digits:</text:p>
          </table:table-cell>
          <table:table-cell table:style-name="auto48" office:value-type="error" table:formula="of:=[.B3]"/>
          <table:table-cell office:value-type="string">
            <text:p/>
          </table:table-cell>
        </table:table-row>
        <table:table-row>
          <table:table-cell table:style-name="auto15" office:value-type="string">
            <text:p>Datetime as ISO:</text:p>
          </table:table-cell>
          <table:table-cell table:style-name="auto49" office:value-type="date" office:date-value="2026-07-18T22:20:55"/>
          <table:table-cell office:value-type="string">
            <text:p/>
          </table:table-cell>
        </table:table-row>
        <table:table-row>
          <table:table-cell table:style-name="auto15" office:value-type="string">
            <text:p>Datetime as German:</text:p>
          </table:table-cell>
          <table:table-cell table:style-name="auto51" office:value-type="date" office:date-value="2026-07-18T22:20:55"/>
          <table:table-cell office:value-type="string">
            <text:p/>
          </table:table-cell>
        </table:table-row>
        <table:table-row>
          <table:table-cell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table:style-name="auto15" office:value-type="string">
            <text:p>Radius of cylinder:</text:p>
          </table:table-cell>
          <table:table-cell office:value-type="float" office:value="40">
            <text:p>40</text:p>
          </table:table-cell>
          <table:table-cell office:value-type="string">
            <text:p>mm</text:p>
          </table:table-cell>
        </table:table-row>
        <table:table-row>
          <table:table-cell table:style-name="auto15" office:value-type="string">
            <text:p>Height of cylinder:</text:p>
          </table:table-cell>
          <table:table-cell office:value-type="float" office:value="120">
            <text:p>120</text:p>
          </table:table-cell>
          <table:table-cell office:value-type="string">
            <text:p>mm</text:p>
          </table:table-cell>
        </table:table-row>
        <table:table-row>
          <table:table-cell table:style-name="auto15" office:value-type="string">
            <text:p>Volume of cylinder:</text:p>
          </table:table-cell>
          <table:table-cell office:value-type="error" table:formula="of:=[.B16]^2*3.1415*[.B17]"/>
          <table:table-cell office:value-type="string">
            <text:p>mm³</text:p>
          </table:table-cell>
        </table:table-row>
        <table:table-row>
          <table:table-cell table:style-name="auto15"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table:style-name="auto15" office:value-type="string">
            <text:p>Hour value:</text:p>
          </table:table-cell>
          <table:table-cell office:value-type="float" office:value="14">
            <text:p>14</text:p>
          </table:table-cell>
          <table:table-cell office:value-type="string">
            <text:p/>
          </table:table-cell>
        </table:table-row>
        <table:table-row>
          <table:table-cell table:style-name="auto15" office:value-type="string">
            <text:p>Hours valid?</text:p>
          </table:table-cell>
          <table:table-cell table:style-name="auto19" office:value-type="error" table:formula="of:=IF(AND([.B20]&gt;=0;[.B20]&lt;=24);&quot;Valid&quot;;&quot;Invalid&quot;)"/>
          <table:table-cell office:value-type="string">
            <text:p/>
          </table:table-cell>
        </table:table-row>
        <table:table-row>
          <table:table-cell/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Conditional Formatting">
        <table:table-column/>
        <table:table-column table:style-name="auto53"/>
        <table:table-column table:style-name="auto33"/>
        <table:table-row>
          <table:table-cell table:style-name="cond0_0" office:value-type="float" office:value="0">
            <text:p>0</text:p>
          </table:table-cell>
          <table:table-cell table:style-name="cond1_0" office:value-type="string">
            <text:p>Hexvalue 0x00</text:p>
          </table:table-cell>
          <table:table-cell table:style-name="cond2_0" office:value-type="string">
            <text:p>Octvalue 0o000000</text:p>
          </table:table-cell>
        </table:table-row>
        <table:table-row>
          <table:table-cell table:style-name="cond0_0" office:value-type="float" office:value="1">
            <text:p>1</text:p>
          </table:table-cell>
          <table:table-cell table:style-name="cond1_0" office:value-type="string">
            <text:p>Hexvalue 0x01</text:p>
          </table:table-cell>
          <table:table-cell table:style-name="cond2_0" office:value-type="string">
            <text:p>Octvalue 0o000001</text:p>
          </table:table-cell>
        </table:table-row>
        <table:table-row>
          <table:table-cell table:style-name="cond0_0" office:value-type="float" office:value="2">
            <text:p>2</text:p>
          </table:table-cell>
          <table:table-cell table:style-name="cond1_0" office:value-type="string">
            <text:p>Hexvalue 0x02</text:p>
          </table:table-cell>
          <table:table-cell table:style-name="cond2_0" office:value-type="string">
            <text:p>Octvalue 0o000002</text:p>
          </table:table-cell>
        </table:table-row>
        <table:table-row>
          <table:table-cell table:style-name="cond0_0" office:value-type="float" office:value="3">
            <text:p>3</text:p>
          </table:table-cell>
          <table:table-cell table:style-name="cond1_0" office:value-type="string">
            <text:p>Hexvalue 0x03</text:p>
          </table:table-cell>
          <table:table-cell table:style-name="cond2_0" office:value-type="string">
            <text:p>Octvalue 0o000003</text:p>
          </table:table-cell>
        </table:table-row>
        <table:table-row>
          <table:table-cell table:style-name="cond0_0" office:value-type="float" office:value="4">
            <text:p>4</text:p>
          </table:table-cell>
          <table:table-cell table:style-name="cond1_0" office:value-type="string">
            <text:p>Hexvalue 0x04</text:p>
          </table:table-cell>
          <table:table-cell table:style-name="cond2_0" office:value-type="string">
            <text:p>Octvalue 0o000004</text:p>
          </table:table-cell>
        </table:table-row>
        <table:table-row>
          <table:table-cell table:style-name="cond0_0" office:value-type="float" office:value="5">
            <text:p>5</text:p>
          </table:table-cell>
          <table:table-cell table:style-name="cond1_0" office:value-type="string">
            <text:p>Hexvalue 0x05</text:p>
          </table:table-cell>
          <table:table-cell table:style-name="cond2_0" office:value-type="string">
            <text:p>Octvalue 0o000005</text:p>
          </table:table-cell>
        </table:table-row>
        <table:table-row>
          <table:table-cell table:style-name="cond0_0" office:value-type="float" office:value="6">
            <text:p>6</text:p>
          </table:table-cell>
          <table:table-cell table:style-name="cond1_0" office:value-type="string">
            <text:p>Hexvalue 0x06</text:p>
          </table:table-cell>
          <table:table-cell table:style-name="cond2_0" office:value-type="string">
            <text:p>Octvalue 0o000006</text:p>
          </table:table-cell>
        </table:table-row>
        <table:table-row>
          <table:table-cell table:style-name="cond0_0" office:value-type="float" office:value="7">
            <text:p>7</text:p>
          </table:table-cell>
          <table:table-cell table:style-name="cond1_0" office:value-type="string">
            <text:p>Hexvalue 0x07</text:p>
          </table:table-cell>
          <table:table-cell table:style-name="cond2_0" office:value-type="string">
            <text:p>Octvalue 0o000007</text:p>
          </table:table-cell>
        </table:table-row>
        <table:table-row>
          <table:table-cell table:style-name="cond0_0" office:value-type="float" office:value="8">
            <text:p>8</text:p>
          </table:table-cell>
          <table:table-cell table:style-name="cond1_0" office:value-type="string">
            <text:p>Hexvalue 0x08</text:p>
          </table:table-cell>
          <table:table-cell table:style-name="cond2_0" office:value-type="string">
            <text:p>Octvalue 0o000010</text:p>
          </table:table-cell>
        </table:table-row>
        <table:table-row>
          <table:table-cell table:style-name="cond0_0" office:value-type="float" office:value="9">
            <text:p>9</text:p>
          </table:table-cell>
          <table:table-cell table:style-name="cond1_0" office:value-type="string">
            <text:p>Hexvalue 0x09</text:p>
          </table:table-cell>
          <table:table-cell table:style-name="cond2_0" office:value-type="string">
            <text:p>Octvalue 0o000011</text:p>
          </table:table-cell>
        </table:table-row>
        <table:table-row>
          <table:table-cell table:style-name="cond0_0" office:value-type="float" office:value="10">
            <text:p>10</text:p>
          </table:table-cell>
          <table:table-cell table:style-name="cond1_0" office:value-type="string">
            <text:p>Hexvalue 0x0a</text:p>
          </table:table-cell>
          <table:table-cell table:style-name="cond2_0" office:value-type="string">
            <text:p>Octvalue 0o000012</text:p>
          </table:table-cell>
        </table:table-row>
        <table:table-row>
          <table:table-cell table:style-name="cond0_0" office:value-type="float" office:value="11">
            <text:p>11</text:p>
          </table:table-cell>
          <table:table-cell table:style-name="cond1_0" office:value-type="string">
            <text:p>Hexvalue 0x0b</text:p>
          </table:table-cell>
          <table:table-cell table:style-name="cond2_0" office:value-type="string">
            <text:p>Octvalue 0o000013</text:p>
          </table:table-cell>
        </table:table-row>
        <table:table-row>
          <table:table-cell table:style-name="cond0_0" office:value-type="float" office:value="12">
            <text:p>12</text:p>
          </table:table-cell>
          <table:table-cell table:style-name="cond1_0" office:value-type="string">
            <text:p>Hexvalue 0x0c</text:p>
          </table:table-cell>
          <table:table-cell table:style-name="cond2_0" office:value-type="string">
            <text:p>Octvalue 0o000014</text:p>
          </table:table-cell>
        </table:table-row>
        <table:table-row>
          <table:table-cell table:style-name="cond0_0" office:value-type="float" office:value="13">
            <text:p>13</text:p>
          </table:table-cell>
          <table:table-cell table:style-name="cond1_0" office:value-type="string">
            <text:p>Hexvalue 0x0d</text:p>
          </table:table-cell>
          <table:table-cell table:style-name="cond2_0" office:value-type="string">
            <text:p>Octvalue 0o000015</text:p>
          </table:table-cell>
        </table:table-row>
        <table:table-row>
          <table:table-cell table:style-name="cond0_0" office:value-type="float" office:value="14">
            <text:p>14</text:p>
          </table:table-cell>
          <table:table-cell table:style-name="cond1_0" office:value-type="string">
            <text:p>Hexvalue 0x0e</text:p>
          </table:table-cell>
          <table:table-cell table:style-name="cond2_0" office:value-type="string">
            <text:p>Octvalue 0o000016</text:p>
          </table:table-cell>
        </table:table-row>
        <table:table-row>
          <table:table-cell table:style-name="cond0_0" office:value-type="float" office:value="15">
            <text:p>15</text:p>
          </table:table-cell>
          <table:table-cell table:style-name="cond1_0" office:value-type="string">
            <text:p>Hexvalue 0x0f</text:p>
          </table:table-cell>
          <table:table-cell table:style-name="cond2_0" office:value-type="string">
            <text:p>Octvalue 0o000017</text:p>
          </table:table-cell>
        </table:table-row>
        <table:table-row>
          <table:table-cell table:style-name="cond0_0" office:value-type="float" office:value="16">
            <text:p>16</text:p>
          </table:table-cell>
          <table:table-cell table:style-name="cond1_0" office:value-type="string">
            <text:p>Hexvalue 0x10</text:p>
          </table:table-cell>
          <table:table-cell table:style-name="cond2_0" office:value-type="string">
            <text:p>Octvalue 0o000020</text:p>
          </table:table-cell>
        </table:table-row>
        <table:table-row>
          <table:table-cell table:style-name="cond0_0" office:value-type="float" office:value="17">
            <text:p>17</text:p>
          </table:table-cell>
          <table:table-cell table:style-name="cond1_0" office:value-type="string">
            <text:p>Hexvalue 0x11</text:p>
          </table:table-cell>
          <table:table-cell table:style-name="cond2_0" office:value-type="string">
            <text:p>Octvalue 0o000021</text:p>
          </table:table-cell>
        </table:table-row>
        <table:table-row>
          <table:table-cell table:style-name="cond0_0" office:value-type="float" office:value="18">
            <text:p>18</text:p>
          </table:table-cell>
          <table:table-cell table:style-name="cond1_0" office:value-type="string">
            <text:p>Hexvalue 0x12</text:p>
          </table:table-cell>
          <table:table-cell table:style-name="cond2_0" office:value-type="string">
            <text:p>Octvalue 0o000022</text:p>
          </table:table-cell>
        </table:table-row>
        <table:table-row>
          <table:table-cell table:style-name="cond0_0" office:value-type="float" office:value="19">
            <text:p>19</text:p>
          </table:table-cell>
          <table:table-cell table:style-name="cond1_0" office:value-type="string">
            <text:p>Hexvalue 0x13</text:p>
          </table:table-cell>
          <table:table-cell table:style-name="cond2_0" office:value-type="string">
            <text:p>Octvalue 0o000023</text:p>
          </table:table-cell>
        </table:table-row>
        <table:table-row>
          <table:table-cell table:style-name="cond0_0" office:value-type="float" office:value="20">
            <text:p>20</text:p>
          </table:table-cell>
          <table:table-cell table:style-name="cond1_0" office:value-type="string">
            <text:p>Hexvalue 0x14</text:p>
          </table:table-cell>
          <table:table-cell table:style-name="cond2_0" office:value-type="string">
            <text:p>Octvalue 0o000024</text:p>
          </table:table-cell>
        </table:table-row>
        <table:table-row>
          <table:table-cell table:style-name="cond0_0" office:value-type="float" office:value="21">
            <text:p>21</text:p>
          </table:table-cell>
          <table:table-cell table:style-name="cond1_0" office:value-type="string">
            <text:p>Hexvalue 0x15</text:p>
          </table:table-cell>
          <table:table-cell table:style-name="cond2_0" office:value-type="string">
            <text:p>Octvalue 0o000025</text:p>
          </table:table-cell>
        </table:table-row>
        <table:table-row>
          <table:table-cell table:style-name="cond0_0" office:value-type="float" office:value="22">
            <text:p>22</text:p>
          </table:table-cell>
          <table:table-cell table:style-name="cond1_0" office:value-type="string">
            <text:p>Hexvalue 0x16</text:p>
          </table:table-cell>
          <table:table-cell table:style-name="cond2_0" office:value-type="string">
            <text:p>Octvalue 0o000026</text:p>
          </table:table-cell>
        </table:table-row>
        <table:table-row>
          <table:table-cell table:style-name="cond0_0" office:value-type="float" office:value="23">
            <text:p>23</text:p>
          </table:table-cell>
          <table:table-cell table:style-name="cond1_0" office:value-type="string">
            <text:p>Hexvalue 0x17</text:p>
          </table:table-cell>
          <table:table-cell table:style-name="cond2_0" office:value-type="string">
            <text:p>Octvalue 0o000027</text:p>
          </table:table-cell>
        </table:table-row>
        <table:table-row>
          <table:table-cell table:style-name="cond0_0" office:value-type="float" office:value="24">
            <text:p>24</text:p>
          </table:table-cell>
          <table:table-cell table:style-name="cond1_0" office:value-type="string">
            <text:p>Hexvalue 0x18</text:p>
          </table:table-cell>
          <table:table-cell table:style-name="cond2_0" office:value-type="string">
            <text:p>Octvalue 0o000030</text:p>
          </table:table-cell>
        </table:table-row>
      </table:table>
      <table:table table:name="Image"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4">
            <text:p>4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4">
            <text:p>4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4">
            <text:p>4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</table:table>
      <table:table table:name="Conditional Multi-Format">
        <table:table-column/>
        <table:table-column/>
        <table:table-column/>
        <table:table-column/>
        <table:table-column/>
        <table:table-row>
          <table:table-cell office:value-type="string">
            <text:p>1 Decimal</text:p>
          </table:table-cell>
          <table:table-cell office:value-type="string">
            <text:p>3 Decimals</text:p>
          </table:table-cell>
          <table:table-cell office:value-type="string">
            <text:p>% 1 Dec</text:p>
          </table:table-cell>
          <table:table-cell office:value-type="string">
            <text:p>% 2 Dec</text:p>
          </table:table-cell>
          <table:table-cell office:value-type="string">
            <text:p/>
          </table:table-cell>
        </table:table-row>
        <table:table-row>
          <table:table-cell table:style-name="cond4_0" office:value-type="float" office:value="58.90296893655275">
            <text:p>58.90296893655275</text:p>
          </table:table-cell>
          <table:table-cell table:style-name="cond4_1" office:value-type="float" office:value="-0.5440211108893698">
            <text:p>-0.5440211108893698</text:p>
          </table:table-cell>
          <table:table-cell table:style-name="cond4_2" office:value-type="float" office:value="1.0410757253368614">
            <text:p>1.0410757253368614</text:p>
          </table:table-cell>
          <table:table-cell table:style-name="cond4_3" office:value-type="float" office:value="0.12058450180107416">
            <text:p>0.12058450180107416</text:p>
          </table:table-cell>
          <table:table-cell/>
        </table:table-row>
        <table:table-row>
          <table:table-cell table:style-name="cond4_0" office:value-type="float" office:value="63.65081987779772">
            <text:p>63.65081987779772</text:p>
          </table:table-cell>
          <table:table-cell table:style-name="cond4_1" office:value-type="float" office:value="0.9129452507276277">
            <text:p>0.9129452507276277</text:p>
          </table:table-cell>
          <table:table-cell table:style-name="cond4_2" office:value-type="float" office:value="1.7205845018010741">
            <text:p>1.7205845018010741</text:p>
          </table:table-cell>
          <table:table-cell table:style-name="cond4_3" office:value-type="float" office:value="0.25698659871878904">
            <text:p>0.25698659871878904</text:p>
          </table:table-cell>
          <table:table-cell/>
        </table:table-row>
        <table:table-row>
          <table:table-cell table:style-name="cond4_0" office:value-type="float" office:value="9.878400564190706">
            <text:p>9.878400564190706</text:p>
          </table:table-cell>
          <table:table-cell table:style-name="cond4_1" office:value-type="float" office:value="-0.9880316240928618">
            <text:p>-0.9880316240928618</text:p>
          </table:table-cell>
          <table:table-cell table:style-name="cond4_2" office:value-type="float" office:value="0.6569865987187891">
            <text:p>0.6569865987187891</text:p>
          </table:table-cell>
          <table:table-cell table:style-name="cond4_3" office:value-type="float" office:value="0.18935824662338174">
            <text:p>0.18935824662338174</text:p>
          </table:table-cell>
          <table:table-cell/>
        </table:table-row>
        <table:table-row>
          <table:table-cell table:style-name="cond4_0" office:value-type="float" office:value="-52.97617467155497">
            <text:p>-52.97617467155497</text:p>
          </table:table-cell>
          <table:table-cell table:style-name="cond4_1" office:value-type="float" office:value="0.7451131604793488">
            <text:p>0.7451131604793488</text:p>
          </table:table-cell>
          <table:table-cell table:style-name="cond4_2" office:value-type="float" office:value="0.9893582466233818">
            <text:p>0.9893582466233818</text:p>
          </table:table-cell>
          <table:table-cell table:style-name="cond4_3" office:value-type="float" office:value="0.012118485241756571">
            <text:p>0.012118485241756571</text:p>
          </table:table-cell>
          <table:table-cell/>
        </table:table-row>
        <table:table-row>
          <table:table-cell table:style-name="cond4_0" office:value-type="float" office:value="-67.1246992264197">
            <text:p>-67.1246992264197</text:p>
          </table:table-cell>
          <table:table-cell table:style-name="cond4_1" office:value-type="float" office:value="-0.26237485370392877">
            <text:p>-0.26237485370392877</text:p>
          </table:table-cell>
          <table:table-cell table:style-name="cond4_2" office:value-type="float" office:value="0.4121184852417566">
            <text:p>0.4121184852417566</text:p>
          </table:table-cell>
          <table:table-cell table:style-name="cond4_3" office:value-type="float" office:value="0.25597888911063027">
            <text:p>0.25597888911063027</text:p>
          </table:table-cell>
          <table:table-cell/>
        </table:table-row>
        <table:table-row>
          <table:table-cell table:style-name="cond4_0" office:value-type="float" office:value="-19.55908487392481">
            <text:p>-19.55908487392481</text:p>
          </table:table-cell>
          <table:table-cell table:style-name="cond4_1" office:value-type="float" office:value="-0.3048106211022167">
            <text:p>-0.3048106211022167</text:p>
          </table:table-cell>
          <table:table-cell table:style-name="cond4_2" office:value-type="float" office:value="1.4559788891106302">
            <text:p>1.4559788891106302</text:p>
          </table:table-cell>
          <table:table-cell table:style-name="cond4_3" office:value-type="float" office:value="0.2000097934492966">
            <text:p>0.2000097934492966</text:p>
          </table:table-cell>
          <table:table-cell/>
        </table:table-row>
        <table:table-row>
          <table:table-cell table:style-name="cond4_0" office:value-type="float" office:value="45.989061910315236">
            <text:p>45.989061910315236</text:p>
          </table:table-cell>
          <table:table-cell table:style-name="cond4_1" office:value-type="float" office:value="0.7738906815578891">
            <text:p>0.7738906815578891</text:p>
          </table:table-cell>
          <table:table-cell table:style-name="cond4_2" office:value-type="float" office:value="1.0000097934492964">
            <text:p>1.0000097934492964</text:p>
          </table:table-cell>
          <table:table-cell table:style-name="cond4_3" office:value-type="float" office:value="0.2634270819995651">
            <text:p>0.2634270819995651</text:p>
          </table:table-cell>
          <table:table-cell/>
        </table:table-row>
        <table:table-row>
          <table:table-cell table:style-name="cond4_0" office:value-type="float" office:value="69.25507726363672">
            <text:p>69.25507726363672</text:p>
          </table:table-cell>
          <table:table-cell table:style-name="cond4_1" office:value-type="float" office:value="-0.9938886539233752">
            <text:p>-0.9938886539233752</text:p>
          </table:table-cell>
          <table:table-cell table:style-name="cond4_2" office:value-type="float" office:value="1.4634270819995652">
            <text:p>1.4634270819995652</text:p>
          </table:table-cell>
          <table:table-cell table:style-name="cond4_3" office:value-type="float" office:value="0.020167036826640894">
            <text:p>0.020167036826640894</text:p>
          </table:table-cell>
          <table:table-cell/>
        </table:table-row>
        <table:table-row>
          <table:table-cell table:style-name="cond4_0" office:value-type="float" office:value="28.848293966922963">
            <text:p>28.848293966922963</text:p>
          </table:table-cell>
          <table:table-cell table:style-name="cond4_1" office:value-type="float" office:value="0.8939966636005579">
            <text:p>0.8939966636005579</text:p>
          </table:table-cell>
          <table:table-cell table:style-name="cond4_2" office:value-type="float" office:value="0.4201670368266409">
            <text:p>0.4201670368266409</text:p>
          </table:table-cell>
          <table:table-cell table:style-name="cond4_3" office:value-type="float" office:value="0.1906073556948703">
            <text:p>0.1906073556948703</text:p>
          </table:table-cell>
          <table:table-cell/>
        </table:table-row>
        <table:table-row>
          <table:table-cell table:style-name="cond4_0" office:value-type="float" office:value="-38.081477762255886">
            <text:p>-38.081477762255886</text:p>
          </table:table-cell>
          <table:table-cell table:style-name="cond4_1" office:value-type="float" office:value="-0.5063656411097588">
            <text:p>-0.5063656411097588</text:p>
          </table:table-cell>
          <table:table-cell table:style-name="cond4_2" office:value-type="float" office:value="0.9906073556948704">
            <text:p>0.9906073556948704</text:p>
          </table:table-cell>
          <table:table-cell table:style-name="cond4_3" office:value-type="float" office:value="0.2502878401571168">
            <text:p>0.2502878401571168</text:p>
          </table:table-cell>
          <table:table-cell/>
        </table:table-row>
        <table:table-row>
          <table:table-cell table:style-name="cond4_0" office:value-type="float" office:value="-69.99931445854925">
            <text:p>-69.99931445854925</text:p>
          </table:table-cell>
          <table:table-cell table:style-name="cond4_1" office:value-type="float" office:value="-0.044242678085070965">
            <text:p>-0.044242678085070965</text:p>
          </table:table-cell>
          <table:table-cell table:style-name="cond4_2" office:value-type="float" office:value="0.6502878401571168">
            <text:p>0.6502878401571168</text:p>
          </table:table-cell>
          <table:table-cell table:style-name="cond4_3" office:value-type="float" office:value="0.11209668333493472">
            <text:p>0.11209668333493472</text:p>
          </table:table-cell>
          <table:table-cell/>
        </table:table-row>
        <table:table-row>
          <table:table-cell table:style-name="cond4_0" office:value-type="float" office:value="-37.56010426003044">
            <text:p>-37.56010426003044</text:p>
          </table:table-cell>
          <table:table-cell table:style-name="cond4_1" office:value-type="float" office:value="0.5806111842123143">
            <text:p>0.5806111842123143</text:p>
          </table:table-cell>
          <table:table-cell table:style-name="cond4_2" office:value-type="float" office:value="1.7120966833349347">
            <text:p>1.7120966833349347</text:p>
          </table:table-cell>
          <table:table-cell table:style-name="cond4_3" office:value-type="float" office:value="0.23860250812044326">
            <text:p>0.23860250812044326</text:p>
          </table:table-cell>
          <table:table-cell/>
        </table:table-row>
        <table:table-row>
          <table:table-cell table:style-name="cond4_0" office:value-type="float" office:value="29.411692577864866">
            <text:p>29.411692577864866</text:p>
          </table:table-cell>
          <table:table-cell table:style-name="cond4_1" office:value-type="float" office:value="-0.9301059501867618">
            <text:p>-0.9301059501867618</text:p>
          </table:table-cell>
          <table:table-cell table:style-name="cond4_2" office:value-type="float" office:value="1.038602508120443">
            <text:p>1.038602508120443</text:p>
          </table:table-cell>
          <table:table-cell table:style-name="cond4_3" office:value-type="float" office:value="0.04901275322832399">
            <text:p>0.04901275322832399</text:p>
          </table:table-cell>
          <table:table-cell/>
        </table:table-row>
        <table:table-row>
          <table:table-cell table:style-name="cond4_0" office:value-type="float" office:value="69.34251489864093">
            <text:p>69.34251489864093</text:p>
          </table:table-cell>
          <table:table-cell table:style-name="cond4_1" office:value-type="float" office:value="0.9802396594403116">
            <text:p>0.9802396594403116</text:p>
          </table:table-cell>
          <table:table-cell table:style-name="cond4_2" office:value-type="float" office:value="1.249012753228324">
            <text:p>1.249012753228324</text:p>
          </table:table-cell>
          <table:table-cell table:style-name="cond4_3" office:value-type="float" office:value="0.14987720966295234">
            <text:p>0.14987720966295234</text:p>
          </table:table-cell>
          <table:table-cell/>
        </table:table-row>
        <table:table-row>
          <table:table-cell table:style-name="cond4_0" office:value-type="float" office:value="45.52014881099818">
            <text:p>45.52014881099818</text:p>
          </table:table-cell>
          <table:table-cell table:style-name="cond4_1" office:value-type="float" office:value="-0.7148764296291646">
            <text:p>-0.7148764296291646</text:p>
          </table:table-cell>
          <table:table-cell table:style-name="cond4_2" office:value-type="float" office:value="0.14987720966295234">
            <text:p>0.14987720966295234</text:p>
          </table:table-cell>
          <table:table-cell table:style-name="cond4_3" office:value-type="float" office:value="0.11294525072762762">
            <text:p>0.11294525072762762</text:p>
          </table:table-cell>
          <table:table-cell/>
        </table:table-row>
        <table:table-row>
          <table:table-cell table:style-name="cond4_0" office:value-type="float" office:value="-20.15323216655457">
            <text:p>-20.15323216655457</text:p>
          </table:table-cell>
          <table:table-cell table:style-name="cond4_1" office:value-type="float" office:value="0.21942525837900473">
            <text:p>0.21942525837900473</text:p>
          </table:table-cell>
          <table:table-cell table:style-name="cond4_2" office:value-type="float" office:value="0.9129452507276277">
            <text:p>0.9129452507276277</text:p>
          </table:table-cell>
          <table:table-cell table:style-name="cond4_3" office:value-type="float" office:value="0.03665563853605602">
            <text:p>0.03665563853605602</text:p>
          </table:table-cell>
          <table:table-cell/>
        </table:table-row>
        <table:table-row>
          <table:table-cell table:style-name="cond4_0" office:value-type="float" office:value="-67.29782443156898">
            <text:p>-67.29782443156898</text:p>
          </table:table-cell>
          <table:table-cell table:style-name="cond4_1" office:value-type="float" office:value="0.3466494554970303">
            <text:p>0.3466494554970303</text:p>
          </table:table-cell>
          <table:table-cell table:style-name="cond4_2" office:value-type="float" office:value="0.8366556385360561">
            <text:p>0.8366556385360561</text:p>
          </table:table-cell>
          <table:table-cell table:style-name="cond4_3" office:value-type="float" office:value="0.3911486907095961">
            <text:p>0.3911486907095961</text:p>
          </table:table-cell>
          <table:table-cell/>
        </table:table-row>
        <table:table-row>
          <table:table-cell table:style-name="cond4_0" office:value-type="float" office:value="-52.56910727401733">
            <text:p>-52.56910727401733</text:p>
          </table:table-cell>
          <table:table-cell table:style-name="cond4_1" office:value-type="float" office:value="-0.8011526357338304">
            <text:p>-0.8011526357338304</text:p>
          </table:table-cell>
          <table:table-cell table:style-name="cond4_2" office:value-type="float" office:value="1.991148690709596">
            <text:p>1.991148690709596</text:p>
          </table:table-cell>
          <table:table-cell table:style-name="cond4_3" office:value-type="float" office:value="0.35377959582482943">
            <text:p>0.35377959582482943</text:p>
          </table:table-cell>
          <table:table-cell/>
        </table:table-row>
        <table:table-row>
          <table:table-cell table:style-name="cond4_0" office:value-type="float" office:value="10.491404676406663">
            <text:p>10.491404676406663</text:p>
          </table:table-cell>
          <table:table-cell table:style-name="cond4_1" office:value-type="float" office:value="0.9977992786806003">
            <text:p>0.9977992786806003</text:p>
          </table:table-cell>
          <table:table-cell table:style-name="cond4_2" office:value-type="float" office:value="1.1537795958248294">
            <text:p>1.1537795958248294</text:p>
          </table:table-cell>
          <table:table-cell table:style-name="cond4_3" office:value-type="float" office:value="0.2944216379933762">
            <text:p>0.2944216379933762</text:p>
          </table:table-cell>
          <table:table-cell/>
        </table:table-row>
      </table:table>
      <table:table table:name="Simple row-writer">
        <table:table-column/>
        <table:table-column/>
        <table:table-column/>
        <table:table-column/>
        <table:table-row>
          <table:table-cell office:value-type="string">
            <text:p>Value</text:p>
          </table:table-cell>
          <table:table-cell office:value-type="string">
            <text:p>Pi*Value</text:p>
          </table:table-cell>
          <table:table-cell office:value-type="string">
            <text:p>Hex</text:p>
          </table:table-cell>
          <table:table-cell office:value-type="string">
            <text:p>Formula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string">
            <text:p>0x00</text:p>
          </table:table-cell>
          <table:table-cell office:value-type="error" table:formula="of:=([.B2]+2)*4"/>
        </table:table-row>
        <table:table-row>
          <table:table-cell office:value-type="float" office:value="1">
            <text:p>1</text:p>
          </table:table-cell>
          <table:table-cell office:value-type="float" office:value="3.1415">
            <text:p>3.1415</text:p>
          </table:table-cell>
          <table:table-cell office:value-type="string">
            <text:p>0x01</text:p>
          </table:table-cell>
          <table:table-cell office:value-type="error" table:formula="of:=([.B3]+2)*4"/>
        </table:table-row>
        <table:table-row>
          <table:table-cell office:value-type="float" office:value="2">
            <text:p>2</text:p>
          </table:table-cell>
          <table:table-cell office:value-type="float" office:value="6.283">
            <text:p>6.283</text:p>
          </table:table-cell>
          <table:table-cell office:value-type="string">
            <text:p>0x02</text:p>
          </table:table-cell>
          <table:table-cell office:value-type="error" table:formula="of:=([.B4]+2)*4"/>
        </table:table-row>
        <table:table-row>
          <table:table-cell office:value-type="float" office:value="3">
            <text:p>3</text:p>
          </table:table-cell>
          <table:table-cell office:value-type="float" office:value="9.4245">
            <text:p>9.4245</text:p>
          </table:table-cell>
          <table:table-cell office:value-type="string">
            <text:p>0x03</text:p>
          </table:table-cell>
          <table:table-cell office:value-type="error" table:formula="of:=([.B5]+2)*4"/>
        </table:table-row>
        <table:table-row>
          <table:table-cell office:value-type="float" office:value="4">
            <text:p>4</text:p>
          </table:table-cell>
          <table:table-cell office:value-type="float" office:value="12.566">
            <text:p>12.566</text:p>
          </table:table-cell>
          <table:table-cell office:value-type="string">
            <text:p>0x04</text:p>
          </table:table-cell>
          <table:table-cell office:value-type="error" table:formula="of:=([.B6]+2)*4"/>
        </table:table-row>
        <table:table-row>
          <table:table-cell office:value-type="float" office:value="5">
            <text:p>5</text:p>
          </table:table-cell>
          <table:table-cell office:value-type="float" office:value="15.707500000000001">
            <text:p>15.707500000000001</text:p>
          </table:table-cell>
          <table:table-cell office:value-type="string">
            <text:p>0x05</text:p>
          </table:table-cell>
          <table:table-cell office:value-type="error" table:formula="of:=([.B7]+2)*4"/>
        </table:table-row>
        <table:table-row>
          <table:table-cell office:value-type="float" office:value="6">
            <text:p>6</text:p>
          </table:table-cell>
          <table:table-cell office:value-type="float" office:value="18.849">
            <text:p>18.849</text:p>
          </table:table-cell>
          <table:table-cell office:value-type="string">
            <text:p>0x06</text:p>
          </table:table-cell>
          <table:table-cell office:value-type="error" table:formula="of:=([.B8]+2)*4"/>
        </table:table-row>
        <table:table-row>
          <table:table-cell office:value-type="float" office:value="7">
            <text:p>7</text:p>
          </table:table-cell>
          <table:table-cell office:value-type="float" office:value="21.9905">
            <text:p>21.9905</text:p>
          </table:table-cell>
          <table:table-cell office:value-type="string">
            <text:p>0x07</text:p>
          </table:table-cell>
          <table:table-cell office:value-type="error" table:formula="of:=([.B9]+2)*4"/>
        </table:table-row>
        <table:table-row>
          <table:table-cell office:value-type="float" office:value="8">
            <text:p>8</text:p>
          </table:table-cell>
          <table:table-cell office:value-type="float" office:value="25.132">
            <text:p>25.132</text:p>
          </table:table-cell>
          <table:table-cell office:value-type="string">
            <text:p>0x08</text:p>
          </table:table-cell>
          <table:table-cell office:value-type="error" table:formula="of:=([.B10]+2)*4"/>
        </table:table-row>
        <table:table-row>
          <table:table-cell office:value-type="float" office:value="9">
            <text:p>9</text:p>
          </table:table-cell>
          <table:table-cell office:value-type="float" office:value="28.273500000000002">
            <text:p>28.273500000000002</text:p>
          </table:table-cell>
          <table:table-cell office:value-type="string">
            <text:p>0x09</text:p>
          </table:table-cell>
          <table:table-cell office:value-type="error" table:formula="of:=([.B11]+2)*4"/>
        </table:table-row>
      </table:table>
      <table:table table:name="Symmetric rounding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Value</text:p>
          </table:table-cell>
          <table:table-cell office:value-type="string">
            <text:p>Excel ROUND</text:p>
          </table:table-cell>
          <table:table-cell office:value-type="string">
            <text:p>Python float round()</text:p>
          </table:table-cell>
          <table:table-cell office:value-type="string">
            <text:p>Python exact round()</text:p>
          </table:table-cell>
          <table:table-cell office:value-type="string">
            <text:p>odsexport round()</text:p>
          </table:table-cell>
          <table:table-cell office:value-type="string">
            <text:p>Difference</text:p>
          </table:table-cell>
          <table:table-cell office:value-type="string">
            <text:p>OK?</text:p>
          </table:table-cell>
        </table:table-row>
        <table:table-row>
          <table:table-cell office:value-type="float" office:value="-0.6">
            <text:p>-0.6</text:p>
          </table:table-cell>
          <table:table-cell office:value-type="error" table:formula="of:=ROUND([.A2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SIGN([.A2])*IF(AND(ISEVEN(ABS([.A2])*10);MOD(ABS([.A2])*10;1)&lt;=0.5);ROUNDDOWN(ABS([.A2]);1);ROUND(ABS([.A2]);1))"/>
          <table:table-cell office:value-type="error" table:formula="of:=[.D2]-[.E2]"/>
          <table:table-cell office:value-type="error" table:formula="of:=IF([.F2]&lt;&gt;0;&quot;ERROR&quot;;&quot;&quot;)"/>
        </table:table-row>
        <table:table-row>
          <table:table-cell office:value-type="float" office:value="-0.59">
            <text:p>-0.59</text:p>
          </table:table-cell>
          <table:table-cell office:value-type="error" table:formula="of:=ROUND([.A3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SIGN([.A3])*IF(AND(ISEVEN(ABS([.A3])*10);MOD(ABS([.A3])*10;1)&lt;=0.5);ROUNDDOWN(ABS([.A3]);1);ROUND(ABS([.A3]);1))"/>
          <table:table-cell office:value-type="error" table:formula="of:=[.D3]-[.E3]"/>
          <table:table-cell office:value-type="error" table:formula="of:=IF([.F3]&lt;&gt;0;&quot;ERROR&quot;;&quot;&quot;)"/>
        </table:table-row>
        <table:table-row>
          <table:table-cell office:value-type="float" office:value="-0.58">
            <text:p>-0.58</text:p>
          </table:table-cell>
          <table:table-cell office:value-type="error" table:formula="of:=ROUND([.A4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SIGN([.A4])*IF(AND(ISEVEN(ABS([.A4])*10);MOD(ABS([.A4])*10;1)&lt;=0.5);ROUNDDOWN(ABS([.A4]);1);ROUND(ABS([.A4]);1))"/>
          <table:table-cell office:value-type="error" table:formula="of:=[.D4]-[.E4]"/>
          <table:table-cell office:value-type="error" table:formula="of:=IF([.F4]&lt;&gt;0;&quot;ERROR&quot;;&quot;&quot;)"/>
        </table:table-row>
        <table:table-row>
          <table:table-cell office:value-type="float" office:value="-0.57">
            <text:p>-0.57</text:p>
          </table:table-cell>
          <table:table-cell office:value-type="error" table:formula="of:=ROUND([.A5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SIGN([.A5])*IF(AND(ISEVEN(ABS([.A5])*10);MOD(ABS([.A5])*10;1)&lt;=0.5);ROUNDDOWN(ABS([.A5]);1);ROUND(ABS([.A5]);1))"/>
          <table:table-cell office:value-type="error" table:formula="of:=[.D5]-[.E5]"/>
          <table:table-cell office:value-type="error" table:formula="of:=IF([.F5]&lt;&gt;0;&quot;ERROR&quot;;&quot;&quot;)"/>
        </table:table-row>
        <table:table-row>
          <table:table-cell office:value-type="float" office:value="-0.56">
            <text:p>-0.56</text:p>
          </table:table-cell>
          <table:table-cell office:value-type="error" table:formula="of:=ROUND([.A6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SIGN([.A6])*IF(AND(ISEVEN(ABS([.A6])*10);MOD(ABS([.A6])*10;1)&lt;=0.5);ROUNDDOWN(ABS([.A6]);1);ROUND(ABS([.A6]);1))"/>
          <table:table-cell office:value-type="error" table:formula="of:=[.D6]-[.E6]"/>
          <table:table-cell office:value-type="error" table:formula="of:=IF([.F6]&lt;&gt;0;&quot;ERROR&quot;;&quot;&quot;)"/>
        </table:table-row>
        <table:table-row>
          <table:table-cell office:value-type="float" office:value="-0.55">
            <text:p>-0.55</text:p>
          </table:table-cell>
          <table:table-cell office:value-type="error" table:formula="of:=ROUND([.A7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SIGN([.A7])*IF(AND(ISEVEN(ABS([.A7])*10);MOD(ABS([.A7])*10;1)&lt;=0.5);ROUNDDOWN(ABS([.A7]);1);ROUND(ABS([.A7]);1))"/>
          <table:table-cell office:value-type="error" table:formula="of:=[.D7]-[.E7]"/>
          <table:table-cell office:value-type="error" table:formula="of:=IF([.F7]&lt;&gt;0;&quot;ERROR&quot;;&quot;&quot;)"/>
        </table:table-row>
        <table:table-row>
          <table:table-cell office:value-type="float" office:value="-0.54">
            <text:p>-0.54</text:p>
          </table:table-cell>
          <table:table-cell office:value-type="error" table:formula="of:=ROUND([.A8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SIGN([.A8])*IF(AND(ISEVEN(ABS([.A8])*10);MOD(ABS([.A8])*10;1)&lt;=0.5);ROUNDDOWN(ABS([.A8]);1);ROUND(ABS([.A8]);1))"/>
          <table:table-cell office:value-type="error" table:formula="of:=[.D8]-[.E8]"/>
          <table:table-cell office:value-type="error" table:formula="of:=IF([.F8]&lt;&gt;0;&quot;ERROR&quot;;&quot;&quot;)"/>
        </table:table-row>
        <table:table-row>
          <table:table-cell office:value-type="float" office:value="-0.53">
            <text:p>-0.53</text:p>
          </table:table-cell>
          <table:table-cell office:value-type="error" table:formula="of:=ROUND([.A9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SIGN([.A9])*IF(AND(ISEVEN(ABS([.A9])*10);MOD(ABS([.A9])*10;1)&lt;=0.5);ROUNDDOWN(ABS([.A9]);1);ROUND(ABS([.A9]);1))"/>
          <table:table-cell office:value-type="error" table:formula="of:=[.D9]-[.E9]"/>
          <table:table-cell office:value-type="error" table:formula="of:=IF([.F9]&lt;&gt;0;&quot;ERROR&quot;;&quot;&quot;)"/>
        </table:table-row>
        <table:table-row>
          <table:table-cell office:value-type="float" office:value="-0.52">
            <text:p>-0.52</text:p>
          </table:table-cell>
          <table:table-cell office:value-type="error" table:formula="of:=ROUND([.A10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SIGN([.A10])*IF(AND(ISEVEN(ABS([.A10])*10);MOD(ABS([.A10])*10;1)&lt;=0.5);ROUNDDOWN(ABS([.A10]);1);ROUND(ABS([.A10]);1))"/>
          <table:table-cell office:value-type="error" table:formula="of:=[.D10]-[.E10]"/>
          <table:table-cell office:value-type="error" table:formula="of:=IF([.F10]&lt;&gt;0;&quot;ERROR&quot;;&quot;&quot;)"/>
        </table:table-row>
        <table:table-row>
          <table:table-cell office:value-type="float" office:value="-0.51">
            <text:p>-0.51</text:p>
          </table:table-cell>
          <table:table-cell office:value-type="error" table:formula="of:=ROUND([.A11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SIGN([.A11])*IF(AND(ISEVEN(ABS([.A11])*10);MOD(ABS([.A11])*10;1)&lt;=0.5);ROUNDDOWN(ABS([.A11]);1);ROUND(ABS([.A11]);1))"/>
          <table:table-cell office:value-type="error" table:formula="of:=[.D11]-[.E11]"/>
          <table:table-cell office:value-type="error" table:formula="of:=IF([.F11]&lt;&gt;0;&quot;ERROR&quot;;&quot;&quot;)"/>
        </table:table-row>
        <table:table-row>
          <table:table-cell office:value-type="float" office:value="-0.5">
            <text:p>-0.5</text:p>
          </table:table-cell>
          <table:table-cell office:value-type="error" table:formula="of:=ROUND([.A12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SIGN([.A12])*IF(AND(ISEVEN(ABS([.A12])*10);MOD(ABS([.A12])*10;1)&lt;=0.5);ROUNDDOWN(ABS([.A12]);1);ROUND(ABS([.A12]);1))"/>
          <table:table-cell office:value-type="error" table:formula="of:=[.D12]-[.E12]"/>
          <table:table-cell office:value-type="error" table:formula="of:=IF([.F12]&lt;&gt;0;&quot;ERROR&quot;;&quot;&quot;)"/>
        </table:table-row>
        <table:table-row>
          <table:table-cell office:value-type="float" office:value="-0.49">
            <text:p>-0.49</text:p>
          </table:table-cell>
          <table:table-cell office:value-type="error" table:formula="of:=ROUND([.A13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SIGN([.A13])*IF(AND(ISEVEN(ABS([.A13])*10);MOD(ABS([.A13])*10;1)&lt;=0.5);ROUNDDOWN(ABS([.A13]);1);ROUND(ABS([.A13]);1))"/>
          <table:table-cell office:value-type="error" table:formula="of:=[.D13]-[.E13]"/>
          <table:table-cell office:value-type="error" table:formula="of:=IF([.F13]&lt;&gt;0;&quot;ERROR&quot;;&quot;&quot;)"/>
        </table:table-row>
        <table:table-row>
          <table:table-cell office:value-type="float" office:value="-0.48">
            <text:p>-0.48</text:p>
          </table:table-cell>
          <table:table-cell office:value-type="error" table:formula="of:=ROUND([.A14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SIGN([.A14])*IF(AND(ISEVEN(ABS([.A14])*10);MOD(ABS([.A14])*10;1)&lt;=0.5);ROUNDDOWN(ABS([.A14]);1);ROUND(ABS([.A14]);1))"/>
          <table:table-cell office:value-type="error" table:formula="of:=[.D14]-[.E14]"/>
          <table:table-cell office:value-type="error" table:formula="of:=IF([.F14]&lt;&gt;0;&quot;ERROR&quot;;&quot;&quot;)"/>
        </table:table-row>
        <table:table-row>
          <table:table-cell office:value-type="float" office:value="-0.47">
            <text:p>-0.47</text:p>
          </table:table-cell>
          <table:table-cell office:value-type="error" table:formula="of:=ROUND([.A15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SIGN([.A15])*IF(AND(ISEVEN(ABS([.A15])*10);MOD(ABS([.A15])*10;1)&lt;=0.5);ROUNDDOWN(ABS([.A15]);1);ROUND(ABS([.A15]);1))"/>
          <table:table-cell office:value-type="error" table:formula="of:=[.D15]-[.E15]"/>
          <table:table-cell office:value-type="error" table:formula="of:=IF([.F15]&lt;&gt;0;&quot;ERROR&quot;;&quot;&quot;)"/>
        </table:table-row>
        <table:table-row>
          <table:table-cell office:value-type="float" office:value="-0.46">
            <text:p>-0.46</text:p>
          </table:table-cell>
          <table:table-cell office:value-type="error" table:formula="of:=ROUND([.A16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SIGN([.A16])*IF(AND(ISEVEN(ABS([.A16])*10);MOD(ABS([.A16])*10;1)&lt;=0.5);ROUNDDOWN(ABS([.A16]);1);ROUND(ABS([.A16]);1))"/>
          <table:table-cell office:value-type="error" table:formula="of:=[.D16]-[.E16]"/>
          <table:table-cell office:value-type="error" table:formula="of:=IF([.F16]&lt;&gt;0;&quot;ERROR&quot;;&quot;&quot;)"/>
        </table:table-row>
        <table:table-row>
          <table:table-cell office:value-type="float" office:value="-0.45">
            <text:p>-0.45</text:p>
          </table:table-cell>
          <table:table-cell office:value-type="error" table:formula="of:=ROUND([.A17];1)"/>
          <table:table-cell office:value-type="float" office:value="-0.5">
            <text:p>-0.5</text:p>
          </table:table-cell>
          <table:table-cell office:value-type="float" office:value="-0.4">
            <text:p>-0.4</text:p>
          </table:table-cell>
          <table:table-cell office:value-type="error" table:formula="of:=SIGN([.A17])*IF(AND(ISEVEN(ABS([.A17])*10);MOD(ABS([.A17])*10;1)&lt;=0.5);ROUNDDOWN(ABS([.A17]);1);ROUND(ABS([.A17]);1))"/>
          <table:table-cell office:value-type="error" table:formula="of:=[.D17]-[.E17]"/>
          <table:table-cell office:value-type="error" table:formula="of:=IF([.F17]&lt;&gt;0;&quot;ERROR&quot;;&quot;&quot;)"/>
        </table:table-row>
        <table:table-row>
          <table:table-cell office:value-type="float" office:value="-0.44">
            <text:p>-0.44</text:p>
          </table:table-cell>
          <table:table-cell office:value-type="error" table:formula="of:=ROUND([.A18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SIGN([.A18])*IF(AND(ISEVEN(ABS([.A18])*10);MOD(ABS([.A18])*10;1)&lt;=0.5);ROUNDDOWN(ABS([.A18]);1);ROUND(ABS([.A18]);1))"/>
          <table:table-cell office:value-type="error" table:formula="of:=[.D18]-[.E18]"/>
          <table:table-cell office:value-type="error" table:formula="of:=IF([.F18]&lt;&gt;0;&quot;ERROR&quot;;&quot;&quot;)"/>
        </table:table-row>
        <table:table-row>
          <table:table-cell office:value-type="float" office:value="-0.43">
            <text:p>-0.43</text:p>
          </table:table-cell>
          <table:table-cell office:value-type="error" table:formula="of:=ROUND([.A19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SIGN([.A19])*IF(AND(ISEVEN(ABS([.A19])*10);MOD(ABS([.A19])*10;1)&lt;=0.5);ROUNDDOWN(ABS([.A19]);1);ROUND(ABS([.A19]);1))"/>
          <table:table-cell office:value-type="error" table:formula="of:=[.D19]-[.E19]"/>
          <table:table-cell office:value-type="error" table:formula="of:=IF([.F19]&lt;&gt;0;&quot;ERROR&quot;;&quot;&quot;)"/>
        </table:table-row>
        <table:table-row>
          <table:table-cell office:value-type="float" office:value="-0.42">
            <text:p>-0.42</text:p>
          </table:table-cell>
          <table:table-cell office:value-type="error" table:formula="of:=ROUND([.A20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SIGN([.A20])*IF(AND(ISEVEN(ABS([.A20])*10);MOD(ABS([.A20])*10;1)&lt;=0.5);ROUNDDOWN(ABS([.A20]);1);ROUND(ABS([.A20]);1))"/>
          <table:table-cell office:value-type="error" table:formula="of:=[.D20]-[.E20]"/>
          <table:table-cell office:value-type="error" table:formula="of:=IF([.F20]&lt;&gt;0;&quot;ERROR&quot;;&quot;&quot;)"/>
        </table:table-row>
        <table:table-row>
          <table:table-cell office:value-type="float" office:value="-0.41">
            <text:p>-0.41</text:p>
          </table:table-cell>
          <table:table-cell office:value-type="error" table:formula="of:=ROUND([.A21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SIGN([.A21])*IF(AND(ISEVEN(ABS([.A21])*10);MOD(ABS([.A21])*10;1)&lt;=0.5);ROUNDDOWN(ABS([.A21]);1);ROUND(ABS([.A21]);1))"/>
          <table:table-cell office:value-type="error" table:formula="of:=[.D21]-[.E21]"/>
          <table:table-cell office:value-type="error" table:formula="of:=IF([.F21]&lt;&gt;0;&quot;ERROR&quot;;&quot;&quot;)"/>
        </table:table-row>
        <table:table-row>
          <table:table-cell office:value-type="float" office:value="-0.4">
            <text:p>-0.4</text:p>
          </table:table-cell>
          <table:table-cell office:value-type="error" table:formula="of:=ROUND([.A22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SIGN([.A22])*IF(AND(ISEVEN(ABS([.A22])*10);MOD(ABS([.A22])*10;1)&lt;=0.5);ROUNDDOWN(ABS([.A22]);1);ROUND(ABS([.A22]);1))"/>
          <table:table-cell office:value-type="error" table:formula="of:=[.D22]-[.E22]"/>
          <table:table-cell office:value-type="error" table:formula="of:=IF([.F22]&lt;&gt;0;&quot;ERROR&quot;;&quot;&quot;)"/>
        </table:table-row>
        <table:table-row>
          <table:table-cell office:value-type="float" office:value="-0.39">
            <text:p>-0.39</text:p>
          </table:table-cell>
          <table:table-cell office:value-type="error" table:formula="of:=ROUND([.A23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SIGN([.A23])*IF(AND(ISEVEN(ABS([.A23])*10);MOD(ABS([.A23])*10;1)&lt;=0.5);ROUNDDOWN(ABS([.A23]);1);ROUND(ABS([.A23]);1))"/>
          <table:table-cell office:value-type="error" table:formula="of:=[.D23]-[.E23]"/>
          <table:table-cell office:value-type="error" table:formula="of:=IF([.F23]&lt;&gt;0;&quot;ERROR&quot;;&quot;&quot;)"/>
        </table:table-row>
        <table:table-row>
          <table:table-cell office:value-type="float" office:value="-0.38">
            <text:p>-0.38</text:p>
          </table:table-cell>
          <table:table-cell office:value-type="error" table:formula="of:=ROUND([.A24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SIGN([.A24])*IF(AND(ISEVEN(ABS([.A24])*10);MOD(ABS([.A24])*10;1)&lt;=0.5);ROUNDDOWN(ABS([.A24]);1);ROUND(ABS([.A24]);1))"/>
          <table:table-cell office:value-type="error" table:formula="of:=[.D24]-[.E24]"/>
          <table:table-cell office:value-type="error" table:formula="of:=IF([.F24]&lt;&gt;0;&quot;ERROR&quot;;&quot;&quot;)"/>
        </table:table-row>
        <table:table-row>
          <table:table-cell office:value-type="float" office:value="-0.37">
            <text:p>-0.37</text:p>
          </table:table-cell>
          <table:table-cell office:value-type="error" table:formula="of:=ROUND([.A25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SIGN([.A25])*IF(AND(ISEVEN(ABS([.A25])*10);MOD(ABS([.A25])*10;1)&lt;=0.5);ROUNDDOWN(ABS([.A25]);1);ROUND(ABS([.A25]);1))"/>
          <table:table-cell office:value-type="error" table:formula="of:=[.D25]-[.E25]"/>
          <table:table-cell office:value-type="error" table:formula="of:=IF([.F25]&lt;&gt;0;&quot;ERROR&quot;;&quot;&quot;)"/>
        </table:table-row>
        <table:table-row>
          <table:table-cell office:value-type="float" office:value="-0.36">
            <text:p>-0.36</text:p>
          </table:table-cell>
          <table:table-cell office:value-type="error" table:formula="of:=ROUND([.A26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SIGN([.A26])*IF(AND(ISEVEN(ABS([.A26])*10);MOD(ABS([.A26])*10;1)&lt;=0.5);ROUNDDOWN(ABS([.A26]);1);ROUND(ABS([.A26]);1))"/>
          <table:table-cell office:value-type="error" table:formula="of:=[.D26]-[.E26]"/>
          <table:table-cell office:value-type="error" table:formula="of:=IF([.F26]&lt;&gt;0;&quot;ERROR&quot;;&quot;&quot;)"/>
        </table:table-row>
        <table:table-row>
          <table:table-cell office:value-type="float" office:value="-0.35">
            <text:p>-0.35</text:p>
          </table:table-cell>
          <table:table-cell office:value-type="error" table:formula="of:=ROUND([.A27];1)"/>
          <table:table-cell office:value-type="float" office:value="-0.3">
            <text:p>-0.3</text:p>
          </table:table-cell>
          <table:table-cell office:value-type="float" office:value="-0.4">
            <text:p>-0.4</text:p>
          </table:table-cell>
          <table:table-cell office:value-type="error" table:formula="of:=SIGN([.A27])*IF(AND(ISEVEN(ABS([.A27])*10);MOD(ABS([.A27])*10;1)&lt;=0.5);ROUNDDOWN(ABS([.A27]);1);ROUND(ABS([.A27]);1))"/>
          <table:table-cell office:value-type="error" table:formula="of:=[.D27]-[.E27]"/>
          <table:table-cell office:value-type="error" table:formula="of:=IF([.F27]&lt;&gt;0;&quot;ERROR&quot;;&quot;&quot;)"/>
        </table:table-row>
        <table:table-row>
          <table:table-cell office:value-type="float" office:value="-0.34">
            <text:p>-0.34</text:p>
          </table:table-cell>
          <table:table-cell office:value-type="error" table:formula="of:=ROUND([.A28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SIGN([.A28])*IF(AND(ISEVEN(ABS([.A28])*10);MOD(ABS([.A28])*10;1)&lt;=0.5);ROUNDDOWN(ABS([.A28]);1);ROUND(ABS([.A28]);1))"/>
          <table:table-cell office:value-type="error" table:formula="of:=[.D28]-[.E28]"/>
          <table:table-cell office:value-type="error" table:formula="of:=IF([.F28]&lt;&gt;0;&quot;ERROR&quot;;&quot;&quot;)"/>
        </table:table-row>
        <table:table-row>
          <table:table-cell office:value-type="float" office:value="-0.33">
            <text:p>-0.33</text:p>
          </table:table-cell>
          <table:table-cell office:value-type="error" table:formula="of:=ROUND([.A29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SIGN([.A29])*IF(AND(ISEVEN(ABS([.A29])*10);MOD(ABS([.A29])*10;1)&lt;=0.5);ROUNDDOWN(ABS([.A29]);1);ROUND(ABS([.A29]);1))"/>
          <table:table-cell office:value-type="error" table:formula="of:=[.D29]-[.E29]"/>
          <table:table-cell office:value-type="error" table:formula="of:=IF([.F29]&lt;&gt;0;&quot;ERROR&quot;;&quot;&quot;)"/>
        </table:table-row>
        <table:table-row>
          <table:table-cell office:value-type="float" office:value="-0.32">
            <text:p>-0.32</text:p>
          </table:table-cell>
          <table:table-cell office:value-type="error" table:formula="of:=ROUND([.A30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SIGN([.A30])*IF(AND(ISEVEN(ABS([.A30])*10);MOD(ABS([.A30])*10;1)&lt;=0.5);ROUNDDOWN(ABS([.A30]);1);ROUND(ABS([.A30]);1))"/>
          <table:table-cell office:value-type="error" table:formula="of:=[.D30]-[.E30]"/>
          <table:table-cell office:value-type="error" table:formula="of:=IF([.F30]&lt;&gt;0;&quot;ERROR&quot;;&quot;&quot;)"/>
        </table:table-row>
        <table:table-row>
          <table:table-cell office:value-type="float" office:value="-0.31">
            <text:p>-0.31</text:p>
          </table:table-cell>
          <table:table-cell office:value-type="error" table:formula="of:=ROUND([.A31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SIGN([.A31])*IF(AND(ISEVEN(ABS([.A31])*10);MOD(ABS([.A31])*10;1)&lt;=0.5);ROUNDDOWN(ABS([.A31]);1);ROUND(ABS([.A31]);1))"/>
          <table:table-cell office:value-type="error" table:formula="of:=[.D31]-[.E31]"/>
          <table:table-cell office:value-type="error" table:formula="of:=IF([.F31]&lt;&gt;0;&quot;ERROR&quot;;&quot;&quot;)"/>
        </table:table-row>
        <table:table-row>
          <table:table-cell office:value-type="float" office:value="-0.3">
            <text:p>-0.3</text:p>
          </table:table-cell>
          <table:table-cell office:value-type="error" table:formula="of:=ROUND([.A32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SIGN([.A32])*IF(AND(ISEVEN(ABS([.A32])*10);MOD(ABS([.A32])*10;1)&lt;=0.5);ROUNDDOWN(ABS([.A32]);1);ROUND(ABS([.A32]);1))"/>
          <table:table-cell office:value-type="error" table:formula="of:=[.D32]-[.E32]"/>
          <table:table-cell office:value-type="error" table:formula="of:=IF([.F32]&lt;&gt;0;&quot;ERROR&quot;;&quot;&quot;)"/>
        </table:table-row>
        <table:table-row>
          <table:table-cell office:value-type="float" office:value="-0.29">
            <text:p>-0.29</text:p>
          </table:table-cell>
          <table:table-cell office:value-type="error" table:formula="of:=ROUND([.A33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SIGN([.A33])*IF(AND(ISEVEN(ABS([.A33])*10);MOD(ABS([.A33])*10;1)&lt;=0.5);ROUNDDOWN(ABS([.A33]);1);ROUND(ABS([.A33]);1))"/>
          <table:table-cell office:value-type="error" table:formula="of:=[.D33]-[.E33]"/>
          <table:table-cell office:value-type="error" table:formula="of:=IF([.F33]&lt;&gt;0;&quot;ERROR&quot;;&quot;&quot;)"/>
        </table:table-row>
        <table:table-row>
          <table:table-cell office:value-type="float" office:value="-0.28">
            <text:p>-0.28</text:p>
          </table:table-cell>
          <table:table-cell office:value-type="error" table:formula="of:=ROUND([.A34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SIGN([.A34])*IF(AND(ISEVEN(ABS([.A34])*10);MOD(ABS([.A34])*10;1)&lt;=0.5);ROUNDDOWN(ABS([.A34]);1);ROUND(ABS([.A34]);1))"/>
          <table:table-cell office:value-type="error" table:formula="of:=[.D34]-[.E34]"/>
          <table:table-cell office:value-type="error" table:formula="of:=IF([.F34]&lt;&gt;0;&quot;ERROR&quot;;&quot;&quot;)"/>
        </table:table-row>
        <table:table-row>
          <table:table-cell office:value-type="float" office:value="-0.27">
            <text:p>-0.27</text:p>
          </table:table-cell>
          <table:table-cell office:value-type="error" table:formula="of:=ROUND([.A35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SIGN([.A35])*IF(AND(ISEVEN(ABS([.A35])*10);MOD(ABS([.A35])*10;1)&lt;=0.5);ROUNDDOWN(ABS([.A35]);1);ROUND(ABS([.A35]);1))"/>
          <table:table-cell office:value-type="error" table:formula="of:=[.D35]-[.E35]"/>
          <table:table-cell office:value-type="error" table:formula="of:=IF([.F35]&lt;&gt;0;&quot;ERROR&quot;;&quot;&quot;)"/>
        </table:table-row>
        <table:table-row>
          <table:table-cell office:value-type="float" office:value="-0.26">
            <text:p>-0.26</text:p>
          </table:table-cell>
          <table:table-cell office:value-type="error" table:formula="of:=ROUND([.A36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SIGN([.A36])*IF(AND(ISEVEN(ABS([.A36])*10);MOD(ABS([.A36])*10;1)&lt;=0.5);ROUNDDOWN(ABS([.A36]);1);ROUND(ABS([.A36]);1))"/>
          <table:table-cell office:value-type="error" table:formula="of:=[.D36]-[.E36]"/>
          <table:table-cell office:value-type="error" table:formula="of:=IF([.F36]&lt;&gt;0;&quot;ERROR&quot;;&quot;&quot;)"/>
        </table:table-row>
        <table:table-row>
          <table:table-cell office:value-type="float" office:value="-0.25">
            <text:p>-0.25</text:p>
          </table:table-cell>
          <table:table-cell office:value-type="error" table:formula="of:=ROUND([.A37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37])*IF(AND(ISEVEN(ABS([.A37])*10);MOD(ABS([.A37])*10;1)&lt;=0.5);ROUNDDOWN(ABS([.A37]);1);ROUND(ABS([.A37]);1))"/>
          <table:table-cell office:value-type="error" table:formula="of:=[.D37]-[.E37]"/>
          <table:table-cell office:value-type="error" table:formula="of:=IF([.F37]&lt;&gt;0;&quot;ERROR&quot;;&quot;&quot;)"/>
        </table:table-row>
        <table:table-row>
          <table:table-cell office:value-type="float" office:value="-0.24">
            <text:p>-0.24</text:p>
          </table:table-cell>
          <table:table-cell office:value-type="error" table:formula="of:=ROUND([.A38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38])*IF(AND(ISEVEN(ABS([.A38])*10);MOD(ABS([.A38])*10;1)&lt;=0.5);ROUNDDOWN(ABS([.A38]);1);ROUND(ABS([.A38]);1))"/>
          <table:table-cell office:value-type="error" table:formula="of:=[.D38]-[.E38]"/>
          <table:table-cell office:value-type="error" table:formula="of:=IF([.F38]&lt;&gt;0;&quot;ERROR&quot;;&quot;&quot;)"/>
        </table:table-row>
        <table:table-row>
          <table:table-cell office:value-type="float" office:value="-0.23">
            <text:p>-0.23</text:p>
          </table:table-cell>
          <table:table-cell office:value-type="error" table:formula="of:=ROUND([.A39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39])*IF(AND(ISEVEN(ABS([.A39])*10);MOD(ABS([.A39])*10;1)&lt;=0.5);ROUNDDOWN(ABS([.A39]);1);ROUND(ABS([.A39]);1))"/>
          <table:table-cell office:value-type="error" table:formula="of:=[.D39]-[.E39]"/>
          <table:table-cell office:value-type="error" table:formula="of:=IF([.F39]&lt;&gt;0;&quot;ERROR&quot;;&quot;&quot;)"/>
        </table:table-row>
        <table:table-row>
          <table:table-cell office:value-type="float" office:value="-0.22">
            <text:p>-0.22</text:p>
          </table:table-cell>
          <table:table-cell office:value-type="error" table:formula="of:=ROUND([.A40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40])*IF(AND(ISEVEN(ABS([.A40])*10);MOD(ABS([.A40])*10;1)&lt;=0.5);ROUNDDOWN(ABS([.A40]);1);ROUND(ABS([.A40]);1))"/>
          <table:table-cell office:value-type="error" table:formula="of:=[.D40]-[.E40]"/>
          <table:table-cell office:value-type="error" table:formula="of:=IF([.F40]&lt;&gt;0;&quot;ERROR&quot;;&quot;&quot;)"/>
        </table:table-row>
        <table:table-row>
          <table:table-cell office:value-type="float" office:value="-0.21">
            <text:p>-0.21</text:p>
          </table:table-cell>
          <table:table-cell office:value-type="error" table:formula="of:=ROUND([.A41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41])*IF(AND(ISEVEN(ABS([.A41])*10);MOD(ABS([.A41])*10;1)&lt;=0.5);ROUNDDOWN(ABS([.A41]);1);ROUND(ABS([.A41]);1))"/>
          <table:table-cell office:value-type="error" table:formula="of:=[.D41]-[.E41]"/>
          <table:table-cell office:value-type="error" table:formula="of:=IF([.F41]&lt;&gt;0;&quot;ERROR&quot;;&quot;&quot;)"/>
        </table:table-row>
        <table:table-row>
          <table:table-cell office:value-type="float" office:value="-0.2">
            <text:p>-0.2</text:p>
          </table:table-cell>
          <table:table-cell office:value-type="error" table:formula="of:=ROUND([.A42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42])*IF(AND(ISEVEN(ABS([.A42])*10);MOD(ABS([.A42])*10;1)&lt;=0.5);ROUNDDOWN(ABS([.A42]);1);ROUND(ABS([.A42]);1))"/>
          <table:table-cell office:value-type="error" table:formula="of:=[.D42]-[.E42]"/>
          <table:table-cell office:value-type="error" table:formula="of:=IF([.F42]&lt;&gt;0;&quot;ERROR&quot;;&quot;&quot;)"/>
        </table:table-row>
        <table:table-row>
          <table:table-cell office:value-type="float" office:value="-0.19">
            <text:p>-0.19</text:p>
          </table:table-cell>
          <table:table-cell office:value-type="error" table:formula="of:=ROUND([.A43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43])*IF(AND(ISEVEN(ABS([.A43])*10);MOD(ABS([.A43])*10;1)&lt;=0.5);ROUNDDOWN(ABS([.A43]);1);ROUND(ABS([.A43]);1))"/>
          <table:table-cell office:value-type="error" table:formula="of:=[.D43]-[.E43]"/>
          <table:table-cell office:value-type="error" table:formula="of:=IF([.F43]&lt;&gt;0;&quot;ERROR&quot;;&quot;&quot;)"/>
        </table:table-row>
        <table:table-row>
          <table:table-cell office:value-type="float" office:value="-0.18">
            <text:p>-0.18</text:p>
          </table:table-cell>
          <table:table-cell office:value-type="error" table:formula="of:=ROUND([.A44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44])*IF(AND(ISEVEN(ABS([.A44])*10);MOD(ABS([.A44])*10;1)&lt;=0.5);ROUNDDOWN(ABS([.A44]);1);ROUND(ABS([.A44]);1))"/>
          <table:table-cell office:value-type="error" table:formula="of:=[.D44]-[.E44]"/>
          <table:table-cell office:value-type="error" table:formula="of:=IF([.F44]&lt;&gt;0;&quot;ERROR&quot;;&quot;&quot;)"/>
        </table:table-row>
        <table:table-row>
          <table:table-cell office:value-type="float" office:value="-0.17">
            <text:p>-0.17</text:p>
          </table:table-cell>
          <table:table-cell office:value-type="error" table:formula="of:=ROUND([.A45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45])*IF(AND(ISEVEN(ABS([.A45])*10);MOD(ABS([.A45])*10;1)&lt;=0.5);ROUNDDOWN(ABS([.A45]);1);ROUND(ABS([.A45]);1))"/>
          <table:table-cell office:value-type="error" table:formula="of:=[.D45]-[.E45]"/>
          <table:table-cell office:value-type="error" table:formula="of:=IF([.F45]&lt;&gt;0;&quot;ERROR&quot;;&quot;&quot;)"/>
        </table:table-row>
        <table:table-row>
          <table:table-cell office:value-type="float" office:value="-0.16">
            <text:p>-0.16</text:p>
          </table:table-cell>
          <table:table-cell office:value-type="error" table:formula="of:=ROUND([.A46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46])*IF(AND(ISEVEN(ABS([.A46])*10);MOD(ABS([.A46])*10;1)&lt;=0.5);ROUNDDOWN(ABS([.A46]);1);ROUND(ABS([.A46]);1))"/>
          <table:table-cell office:value-type="error" table:formula="of:=[.D46]-[.E46]"/>
          <table:table-cell office:value-type="error" table:formula="of:=IF([.F46]&lt;&gt;0;&quot;ERROR&quot;;&quot;&quot;)"/>
        </table:table-row>
        <table:table-row>
          <table:table-cell office:value-type="float" office:value="-0.15">
            <text:p>-0.15</text:p>
          </table:table-cell>
          <table:table-cell office:value-type="error" table:formula="of:=ROUND([.A47];1)"/>
          <table:table-cell office:value-type="float" office:value="-0.1">
            <text:p>-0.1</text:p>
          </table:table-cell>
          <table:table-cell office:value-type="float" office:value="-0.2">
            <text:p>-0.2</text:p>
          </table:table-cell>
          <table:table-cell office:value-type="error" table:formula="of:=SIGN([.A47])*IF(AND(ISEVEN(ABS([.A47])*10);MOD(ABS([.A47])*10;1)&lt;=0.5);ROUNDDOWN(ABS([.A47]);1);ROUND(ABS([.A47]);1))"/>
          <table:table-cell office:value-type="error" table:formula="of:=[.D47]-[.E47]"/>
          <table:table-cell office:value-type="error" table:formula="of:=IF([.F47]&lt;&gt;0;&quot;ERROR&quot;;&quot;&quot;)"/>
        </table:table-row>
        <table:table-row>
          <table:table-cell office:value-type="float" office:value="-0.14">
            <text:p>-0.14</text:p>
          </table:table-cell>
          <table:table-cell office:value-type="error" table:formula="of:=ROUND([.A48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SIGN([.A48])*IF(AND(ISEVEN(ABS([.A48])*10);MOD(ABS([.A48])*10;1)&lt;=0.5);ROUNDDOWN(ABS([.A48]);1);ROUND(ABS([.A48]);1))"/>
          <table:table-cell office:value-type="error" table:formula="of:=[.D48]-[.E48]"/>
          <table:table-cell office:value-type="error" table:formula="of:=IF([.F48]&lt;&gt;0;&quot;ERROR&quot;;&quot;&quot;)"/>
        </table:table-row>
        <table:table-row>
          <table:table-cell office:value-type="float" office:value="-0.13">
            <text:p>-0.13</text:p>
          </table:table-cell>
          <table:table-cell office:value-type="error" table:formula="of:=ROUND([.A49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SIGN([.A49])*IF(AND(ISEVEN(ABS([.A49])*10);MOD(ABS([.A49])*10;1)&lt;=0.5);ROUNDDOWN(ABS([.A49]);1);ROUND(ABS([.A49]);1))"/>
          <table:table-cell office:value-type="error" table:formula="of:=[.D49]-[.E49]"/>
          <table:table-cell office:value-type="error" table:formula="of:=IF([.F49]&lt;&gt;0;&quot;ERROR&quot;;&quot;&quot;)"/>
        </table:table-row>
        <table:table-row>
          <table:table-cell office:value-type="float" office:value="-0.12">
            <text:p>-0.12</text:p>
          </table:table-cell>
          <table:table-cell office:value-type="error" table:formula="of:=ROUND([.A50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SIGN([.A50])*IF(AND(ISEVEN(ABS([.A50])*10);MOD(ABS([.A50])*10;1)&lt;=0.5);ROUNDDOWN(ABS([.A50]);1);ROUND(ABS([.A50]);1))"/>
          <table:table-cell office:value-type="error" table:formula="of:=[.D50]-[.E50]"/>
          <table:table-cell office:value-type="error" table:formula="of:=IF([.F50]&lt;&gt;0;&quot;ERROR&quot;;&quot;&quot;)"/>
        </table:table-row>
        <table:table-row>
          <table:table-cell office:value-type="float" office:value="-0.11">
            <text:p>-0.11</text:p>
          </table:table-cell>
          <table:table-cell office:value-type="error" table:formula="of:=ROUND([.A51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SIGN([.A51])*IF(AND(ISEVEN(ABS([.A51])*10);MOD(ABS([.A51])*10;1)&lt;=0.5);ROUNDDOWN(ABS([.A51]);1);ROUND(ABS([.A51]);1))"/>
          <table:table-cell office:value-type="error" table:formula="of:=[.D51]-[.E51]"/>
          <table:table-cell office:value-type="error" table:formula="of:=IF([.F51]&lt;&gt;0;&quot;ERROR&quot;;&quot;&quot;)"/>
        </table:table-row>
        <table:table-row>
          <table:table-cell office:value-type="float" office:value="-0.1">
            <text:p>-0.1</text:p>
          </table:table-cell>
          <table:table-cell office:value-type="error" table:formula="of:=ROUND([.A52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SIGN([.A52])*IF(AND(ISEVEN(ABS([.A52])*10);MOD(ABS([.A52])*10;1)&lt;=0.5);ROUNDDOWN(ABS([.A52]);1);ROUND(ABS([.A52]);1))"/>
          <table:table-cell office:value-type="error" table:formula="of:=[.D52]-[.E52]"/>
          <table:table-cell office:value-type="error" table:formula="of:=IF([.F52]&lt;&gt;0;&quot;ERROR&quot;;&quot;&quot;)"/>
        </table:table-row>
        <table:table-row>
          <table:table-cell office:value-type="float" office:value="-0.09">
            <text:p>-0.09</text:p>
          </table:table-cell>
          <table:table-cell office:value-type="error" table:formula="of:=ROUND([.A53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SIGN([.A53])*IF(AND(ISEVEN(ABS([.A53])*10);MOD(ABS([.A53])*10;1)&lt;=0.5);ROUNDDOWN(ABS([.A53]);1);ROUND(ABS([.A53]);1))"/>
          <table:table-cell office:value-type="error" table:formula="of:=[.D53]-[.E53]"/>
          <table:table-cell office:value-type="error" table:formula="of:=IF([.F53]&lt;&gt;0;&quot;ERROR&quot;;&quot;&quot;)"/>
        </table:table-row>
        <table:table-row>
          <table:table-cell office:value-type="float" office:value="-0.08">
            <text:p>-0.08</text:p>
          </table:table-cell>
          <table:table-cell office:value-type="error" table:formula="of:=ROUND([.A54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SIGN([.A54])*IF(AND(ISEVEN(ABS([.A54])*10);MOD(ABS([.A54])*10;1)&lt;=0.5);ROUNDDOWN(ABS([.A54]);1);ROUND(ABS([.A54]);1))"/>
          <table:table-cell office:value-type="error" table:formula="of:=[.D54]-[.E54]"/>
          <table:table-cell office:value-type="error" table:formula="of:=IF([.F54]&lt;&gt;0;&quot;ERROR&quot;;&quot;&quot;)"/>
        </table:table-row>
        <table:table-row>
          <table:table-cell office:value-type="float" office:value="-0.07">
            <text:p>-0.07</text:p>
          </table:table-cell>
          <table:table-cell office:value-type="error" table:formula="of:=ROUND([.A55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SIGN([.A55])*IF(AND(ISEVEN(ABS([.A55])*10);MOD(ABS([.A55])*10;1)&lt;=0.5);ROUNDDOWN(ABS([.A55]);1);ROUND(ABS([.A55]);1))"/>
          <table:table-cell office:value-type="error" table:formula="of:=[.D55]-[.E55]"/>
          <table:table-cell office:value-type="error" table:formula="of:=IF([.F55]&lt;&gt;0;&quot;ERROR&quot;;&quot;&quot;)"/>
        </table:table-row>
        <table:table-row>
          <table:table-cell office:value-type="float" office:value="-0.06">
            <text:p>-0.06</text:p>
          </table:table-cell>
          <table:table-cell office:value-type="error" table:formula="of:=ROUND([.A56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SIGN([.A56])*IF(AND(ISEVEN(ABS([.A56])*10);MOD(ABS([.A56])*10;1)&lt;=0.5);ROUNDDOWN(ABS([.A56]);1);ROUND(ABS([.A56]);1))"/>
          <table:table-cell office:value-type="error" table:formula="of:=[.D56]-[.E56]"/>
          <table:table-cell office:value-type="error" table:formula="of:=IF([.F56]&lt;&gt;0;&quot;ERROR&quot;;&quot;&quot;)"/>
        </table:table-row>
        <table:table-row>
          <table:table-cell office:value-type="float" office:value="-0.05">
            <text:p>-0.05</text:p>
          </table:table-cell>
          <table:table-cell office:value-type="error" table:formula="of:=ROUND([.A57];1)"/>
          <table:table-cell office:value-type="float" office:value="-0.1">
            <text:p>-0.1</text:p>
          </table:table-cell>
          <table:table-cell office:value-type="float" office:value="0.0">
            <text:p>0.0</text:p>
          </table:table-cell>
          <table:table-cell office:value-type="error" table:formula="of:=SIGN([.A57])*IF(AND(ISEVEN(ABS([.A57])*10);MOD(ABS([.A57])*10;1)&lt;=0.5);ROUNDDOWN(ABS([.A57]);1);ROUND(ABS([.A57]);1))"/>
          <table:table-cell office:value-type="error" table:formula="of:=[.D57]-[.E57]"/>
          <table:table-cell office:value-type="error" table:formula="of:=IF([.F57]&lt;&gt;0;&quot;ERROR&quot;;&quot;&quot;)"/>
        </table:table-row>
        <table:table-row>
          <table:table-cell office:value-type="float" office:value="-0.04">
            <text:p>-0.04</text:p>
          </table:table-cell>
          <table:table-cell office:value-type="error" table:formula="of:=ROUND([.A58];1)"/>
          <table:table-cell office:value-type="float" office:value="-0.0">
            <text:p>-0.0</text:p>
          </table:table-cell>
          <table:table-cell office:value-type="float" office:value="0.0">
            <text:p>0.0</text:p>
          </table:table-cell>
          <table:table-cell office:value-type="error" table:formula="of:=SIGN([.A58])*IF(AND(ISEVEN(ABS([.A58])*10);MOD(ABS([.A58])*10;1)&lt;=0.5);ROUNDDOWN(ABS([.A58]);1);ROUND(ABS([.A58]);1))"/>
          <table:table-cell office:value-type="error" table:formula="of:=[.D58]-[.E58]"/>
          <table:table-cell office:value-type="error" table:formula="of:=IF([.F58]&lt;&gt;0;&quot;ERROR&quot;;&quot;&quot;)"/>
        </table:table-row>
        <table:table-row>
          <table:table-cell office:value-type="float" office:value="-0.03">
            <text:p>-0.03</text:p>
          </table:table-cell>
          <table:table-cell office:value-type="error" table:formula="of:=ROUND([.A59];1)"/>
          <table:table-cell office:value-type="float" office:value="-0.0">
            <text:p>-0.0</text:p>
          </table:table-cell>
          <table:table-cell office:value-type="float" office:value="0.0">
            <text:p>0.0</text:p>
          </table:table-cell>
          <table:table-cell office:value-type="error" table:formula="of:=SIGN([.A59])*IF(AND(ISEVEN(ABS([.A59])*10);MOD(ABS([.A59])*10;1)&lt;=0.5);ROUNDDOWN(ABS([.A59]);1);ROUND(ABS([.A59]);1))"/>
          <table:table-cell office:value-type="error" table:formula="of:=[.D59]-[.E59]"/>
          <table:table-cell office:value-type="error" table:formula="of:=IF([.F59]&lt;&gt;0;&quot;ERROR&quot;;&quot;&quot;)"/>
        </table:table-row>
        <table:table-row>
          <table:table-cell office:value-type="float" office:value="-0.02">
            <text:p>-0.02</text:p>
          </table:table-cell>
          <table:table-cell office:value-type="error" table:formula="of:=ROUND([.A60];1)"/>
          <table:table-cell office:value-type="float" office:value="-0.0">
            <text:p>-0.0</text:p>
          </table:table-cell>
          <table:table-cell office:value-type="float" office:value="0.0">
            <text:p>0.0</text:p>
          </table:table-cell>
          <table:table-cell office:value-type="error" table:formula="of:=SIGN([.A60])*IF(AND(ISEVEN(ABS([.A60])*10);MOD(ABS([.A60])*10;1)&lt;=0.5);ROUNDDOWN(ABS([.A60]);1);ROUND(ABS([.A60]);1))"/>
          <table:table-cell office:value-type="error" table:formula="of:=[.D60]-[.E60]"/>
          <table:table-cell office:value-type="error" table:formula="of:=IF([.F60]&lt;&gt;0;&quot;ERROR&quot;;&quot;&quot;)"/>
        </table:table-row>
        <table:table-row>
          <table:table-cell office:value-type="float" office:value="-0.01">
            <text:p>-0.01</text:p>
          </table:table-cell>
          <table:table-cell office:value-type="error" table:formula="of:=ROUND([.A61];1)"/>
          <table:table-cell office:value-type="float" office:value="-0.0">
            <text:p>-0.0</text:p>
          </table:table-cell>
          <table:table-cell office:value-type="float" office:value="0.0">
            <text:p>0.0</text:p>
          </table:table-cell>
          <table:table-cell office:value-type="error" table:formula="of:=SIGN([.A61])*IF(AND(ISEVEN(ABS([.A61])*10);MOD(ABS([.A61])*10;1)&lt;=0.5);ROUNDDOWN(ABS([.A61]);1);ROUND(ABS([.A61]);1))"/>
          <table:table-cell office:value-type="error" table:formula="of:=[.D61]-[.E61]"/>
          <table:table-cell office:value-type="error" table:formula="of:=IF([.F61]&lt;&gt;0;&quot;ERROR&quot;;&quot;&quot;)"/>
        </table:table-row>
        <table:table-row>
          <table:table-cell office:value-type="float" office:value="0.0">
            <text:p>0.0</text:p>
          </table:table-cell>
          <table:table-cell office:value-type="error" table:formula="of:=ROUND([.A62];1)"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error" table:formula="of:=SIGN([.A62])*IF(AND(ISEVEN(ABS([.A62])*10);MOD(ABS([.A62])*10;1)&lt;=0.5);ROUNDDOWN(ABS([.A62]);1);ROUND(ABS([.A62]);1))"/>
          <table:table-cell office:value-type="error" table:formula="of:=[.D62]-[.E62]"/>
          <table:table-cell office:value-type="error" table:formula="of:=IF([.F62]&lt;&gt;0;&quot;ERROR&quot;;&quot;&quot;)"/>
        </table:table-row>
        <table:table-row>
          <table:table-cell office:value-type="float" office:value="0.01">
            <text:p>0.01</text:p>
          </table:table-cell>
          <table:table-cell office:value-type="error" table:formula="of:=ROUND([.A63];1)"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error" table:formula="of:=SIGN([.A63])*IF(AND(ISEVEN(ABS([.A63])*10);MOD(ABS([.A63])*10;1)&lt;=0.5);ROUNDDOWN(ABS([.A63]);1);ROUND(ABS([.A63]);1))"/>
          <table:table-cell office:value-type="error" table:formula="of:=[.D63]-[.E63]"/>
          <table:table-cell office:value-type="error" table:formula="of:=IF([.F63]&lt;&gt;0;&quot;ERROR&quot;;&quot;&quot;)"/>
        </table:table-row>
        <table:table-row>
          <table:table-cell office:value-type="float" office:value="0.02">
            <text:p>0.02</text:p>
          </table:table-cell>
          <table:table-cell office:value-type="error" table:formula="of:=ROUND([.A64];1)"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error" table:formula="of:=SIGN([.A64])*IF(AND(ISEVEN(ABS([.A64])*10);MOD(ABS([.A64])*10;1)&lt;=0.5);ROUNDDOWN(ABS([.A64]);1);ROUND(ABS([.A64]);1))"/>
          <table:table-cell office:value-type="error" table:formula="of:=[.D64]-[.E64]"/>
          <table:table-cell office:value-type="error" table:formula="of:=IF([.F64]&lt;&gt;0;&quot;ERROR&quot;;&quot;&quot;)"/>
        </table:table-row>
        <table:table-row>
          <table:table-cell office:value-type="float" office:value="0.03">
            <text:p>0.03</text:p>
          </table:table-cell>
          <table:table-cell office:value-type="error" table:formula="of:=ROUND([.A65];1)"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error" table:formula="of:=SIGN([.A65])*IF(AND(ISEVEN(ABS([.A65])*10);MOD(ABS([.A65])*10;1)&lt;=0.5);ROUNDDOWN(ABS([.A65]);1);ROUND(ABS([.A65]);1))"/>
          <table:table-cell office:value-type="error" table:formula="of:=[.D65]-[.E65]"/>
          <table:table-cell office:value-type="error" table:formula="of:=IF([.F65]&lt;&gt;0;&quot;ERROR&quot;;&quot;&quot;)"/>
        </table:table-row>
        <table:table-row>
          <table:table-cell office:value-type="float" office:value="0.04">
            <text:p>0.04</text:p>
          </table:table-cell>
          <table:table-cell office:value-type="error" table:formula="of:=ROUND([.A66];1)"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error" table:formula="of:=SIGN([.A66])*IF(AND(ISEVEN(ABS([.A66])*10);MOD(ABS([.A66])*10;1)&lt;=0.5);ROUNDDOWN(ABS([.A66]);1);ROUND(ABS([.A66]);1))"/>
          <table:table-cell office:value-type="error" table:formula="of:=[.D66]-[.E66]"/>
          <table:table-cell office:value-type="error" table:formula="of:=IF([.F66]&lt;&gt;0;&quot;ERROR&quot;;&quot;&quot;)"/>
        </table:table-row>
        <table:table-row>
          <table:table-cell office:value-type="float" office:value="0.05">
            <text:p>0.05</text:p>
          </table:table-cell>
          <table:table-cell office:value-type="error" table:formula="of:=ROUND([.A67];1)"/>
          <table:table-cell office:value-type="float" office:value="0.1">
            <text:p>0.1</text:p>
          </table:table-cell>
          <table:table-cell office:value-type="float" office:value="0.0">
            <text:p>0.0</text:p>
          </table:table-cell>
          <table:table-cell office:value-type="error" table:formula="of:=SIGN([.A67])*IF(AND(ISEVEN(ABS([.A67])*10);MOD(ABS([.A67])*10;1)&lt;=0.5);ROUNDDOWN(ABS([.A67]);1);ROUND(ABS([.A67]);1))"/>
          <table:table-cell office:value-type="error" table:formula="of:=[.D67]-[.E67]"/>
          <table:table-cell office:value-type="error" table:formula="of:=IF([.F67]&lt;&gt;0;&quot;ERROR&quot;;&quot;&quot;)"/>
        </table:table-row>
        <table:table-row>
          <table:table-cell office:value-type="float" office:value="0.06">
            <text:p>0.06</text:p>
          </table:table-cell>
          <table:table-cell office:value-type="error" table:formula="of:=ROUND([.A68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SIGN([.A68])*IF(AND(ISEVEN(ABS([.A68])*10);MOD(ABS([.A68])*10;1)&lt;=0.5);ROUNDDOWN(ABS([.A68]);1);ROUND(ABS([.A68]);1))"/>
          <table:table-cell office:value-type="error" table:formula="of:=[.D68]-[.E68]"/>
          <table:table-cell office:value-type="error" table:formula="of:=IF([.F68]&lt;&gt;0;&quot;ERROR&quot;;&quot;&quot;)"/>
        </table:table-row>
        <table:table-row>
          <table:table-cell office:value-type="float" office:value="0.07">
            <text:p>0.07</text:p>
          </table:table-cell>
          <table:table-cell office:value-type="error" table:formula="of:=ROUND([.A69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SIGN([.A69])*IF(AND(ISEVEN(ABS([.A69])*10);MOD(ABS([.A69])*10;1)&lt;=0.5);ROUNDDOWN(ABS([.A69]);1);ROUND(ABS([.A69]);1))"/>
          <table:table-cell office:value-type="error" table:formula="of:=[.D69]-[.E69]"/>
          <table:table-cell office:value-type="error" table:formula="of:=IF([.F69]&lt;&gt;0;&quot;ERROR&quot;;&quot;&quot;)"/>
        </table:table-row>
        <table:table-row>
          <table:table-cell office:value-type="float" office:value="0.08">
            <text:p>0.08</text:p>
          </table:table-cell>
          <table:table-cell office:value-type="error" table:formula="of:=ROUND([.A70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SIGN([.A70])*IF(AND(ISEVEN(ABS([.A70])*10);MOD(ABS([.A70])*10;1)&lt;=0.5);ROUNDDOWN(ABS([.A70]);1);ROUND(ABS([.A70]);1))"/>
          <table:table-cell office:value-type="error" table:formula="of:=[.D70]-[.E70]"/>
          <table:table-cell office:value-type="error" table:formula="of:=IF([.F70]&lt;&gt;0;&quot;ERROR&quot;;&quot;&quot;)"/>
        </table:table-row>
        <table:table-row>
          <table:table-cell office:value-type="float" office:value="0.09">
            <text:p>0.09</text:p>
          </table:table-cell>
          <table:table-cell office:value-type="error" table:formula="of:=ROUND([.A71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SIGN([.A71])*IF(AND(ISEVEN(ABS([.A71])*10);MOD(ABS([.A71])*10;1)&lt;=0.5);ROUNDDOWN(ABS([.A71]);1);ROUND(ABS([.A71]);1))"/>
          <table:table-cell office:value-type="error" table:formula="of:=[.D71]-[.E71]"/>
          <table:table-cell office:value-type="error" table:formula="of:=IF([.F71]&lt;&gt;0;&quot;ERROR&quot;;&quot;&quot;)"/>
        </table:table-row>
        <table:table-row>
          <table:table-cell office:value-type="float" office:value="0.1">
            <text:p>0.1</text:p>
          </table:table-cell>
          <table:table-cell office:value-type="error" table:formula="of:=ROUND([.A72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SIGN([.A72])*IF(AND(ISEVEN(ABS([.A72])*10);MOD(ABS([.A72])*10;1)&lt;=0.5);ROUNDDOWN(ABS([.A72]);1);ROUND(ABS([.A72]);1))"/>
          <table:table-cell office:value-type="error" table:formula="of:=[.D72]-[.E72]"/>
          <table:table-cell office:value-type="error" table:formula="of:=IF([.F72]&lt;&gt;0;&quot;ERROR&quot;;&quot;&quot;)"/>
        </table:table-row>
        <table:table-row>
          <table:table-cell office:value-type="float" office:value="0.11">
            <text:p>0.11</text:p>
          </table:table-cell>
          <table:table-cell office:value-type="error" table:formula="of:=ROUND([.A73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SIGN([.A73])*IF(AND(ISEVEN(ABS([.A73])*10);MOD(ABS([.A73])*10;1)&lt;=0.5);ROUNDDOWN(ABS([.A73]);1);ROUND(ABS([.A73]);1))"/>
          <table:table-cell office:value-type="error" table:formula="of:=[.D73]-[.E73]"/>
          <table:table-cell office:value-type="error" table:formula="of:=IF([.F73]&lt;&gt;0;&quot;ERROR&quot;;&quot;&quot;)"/>
        </table:table-row>
        <table:table-row>
          <table:table-cell office:value-type="float" office:value="0.12">
            <text:p>0.12</text:p>
          </table:table-cell>
          <table:table-cell office:value-type="error" table:formula="of:=ROUND([.A74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SIGN([.A74])*IF(AND(ISEVEN(ABS([.A74])*10);MOD(ABS([.A74])*10;1)&lt;=0.5);ROUNDDOWN(ABS([.A74]);1);ROUND(ABS([.A74]);1))"/>
          <table:table-cell office:value-type="error" table:formula="of:=[.D74]-[.E74]"/>
          <table:table-cell office:value-type="error" table:formula="of:=IF([.F74]&lt;&gt;0;&quot;ERROR&quot;;&quot;&quot;)"/>
        </table:table-row>
        <table:table-row>
          <table:table-cell office:value-type="float" office:value="0.13">
            <text:p>0.13</text:p>
          </table:table-cell>
          <table:table-cell office:value-type="error" table:formula="of:=ROUND([.A75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SIGN([.A75])*IF(AND(ISEVEN(ABS([.A75])*10);MOD(ABS([.A75])*10;1)&lt;=0.5);ROUNDDOWN(ABS([.A75]);1);ROUND(ABS([.A75]);1))"/>
          <table:table-cell office:value-type="error" table:formula="of:=[.D75]-[.E75]"/>
          <table:table-cell office:value-type="error" table:formula="of:=IF([.F75]&lt;&gt;0;&quot;ERROR&quot;;&quot;&quot;)"/>
        </table:table-row>
        <table:table-row>
          <table:table-cell office:value-type="float" office:value="0.14">
            <text:p>0.14</text:p>
          </table:table-cell>
          <table:table-cell office:value-type="error" table:formula="of:=ROUND([.A76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SIGN([.A76])*IF(AND(ISEVEN(ABS([.A76])*10);MOD(ABS([.A76])*10;1)&lt;=0.5);ROUNDDOWN(ABS([.A76]);1);ROUND(ABS([.A76]);1))"/>
          <table:table-cell office:value-type="error" table:formula="of:=[.D76]-[.E76]"/>
          <table:table-cell office:value-type="error" table:formula="of:=IF([.F76]&lt;&gt;0;&quot;ERROR&quot;;&quot;&quot;)"/>
        </table:table-row>
        <table:table-row>
          <table:table-cell office:value-type="float" office:value="0.15">
            <text:p>0.15</text:p>
          </table:table-cell>
          <table:table-cell office:value-type="error" table:formula="of:=ROUND([.A77];1)"/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error" table:formula="of:=SIGN([.A77])*IF(AND(ISEVEN(ABS([.A77])*10);MOD(ABS([.A77])*10;1)&lt;=0.5);ROUNDDOWN(ABS([.A77]);1);ROUND(ABS([.A77]);1))"/>
          <table:table-cell office:value-type="error" table:formula="of:=[.D77]-[.E77]"/>
          <table:table-cell office:value-type="error" table:formula="of:=IF([.F77]&lt;&gt;0;&quot;ERROR&quot;;&quot;&quot;)"/>
        </table:table-row>
        <table:table-row>
          <table:table-cell office:value-type="float" office:value="0.16">
            <text:p>0.16</text:p>
          </table:table-cell>
          <table:table-cell office:value-type="error" table:formula="of:=ROUND([.A78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78])*IF(AND(ISEVEN(ABS([.A78])*10);MOD(ABS([.A78])*10;1)&lt;=0.5);ROUNDDOWN(ABS([.A78]);1);ROUND(ABS([.A78]);1))"/>
          <table:table-cell office:value-type="error" table:formula="of:=[.D78]-[.E78]"/>
          <table:table-cell office:value-type="error" table:formula="of:=IF([.F78]&lt;&gt;0;&quot;ERROR&quot;;&quot;&quot;)"/>
        </table:table-row>
        <table:table-row>
          <table:table-cell office:value-type="float" office:value="0.17">
            <text:p>0.17</text:p>
          </table:table-cell>
          <table:table-cell office:value-type="error" table:formula="of:=ROUND([.A79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79])*IF(AND(ISEVEN(ABS([.A79])*10);MOD(ABS([.A79])*10;1)&lt;=0.5);ROUNDDOWN(ABS([.A79]);1);ROUND(ABS([.A79]);1))"/>
          <table:table-cell office:value-type="error" table:formula="of:=[.D79]-[.E79]"/>
          <table:table-cell office:value-type="error" table:formula="of:=IF([.F79]&lt;&gt;0;&quot;ERROR&quot;;&quot;&quot;)"/>
        </table:table-row>
        <table:table-row>
          <table:table-cell office:value-type="float" office:value="0.18">
            <text:p>0.18</text:p>
          </table:table-cell>
          <table:table-cell office:value-type="error" table:formula="of:=ROUND([.A80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80])*IF(AND(ISEVEN(ABS([.A80])*10);MOD(ABS([.A80])*10;1)&lt;=0.5);ROUNDDOWN(ABS([.A80]);1);ROUND(ABS([.A80]);1))"/>
          <table:table-cell office:value-type="error" table:formula="of:=[.D80]-[.E80]"/>
          <table:table-cell office:value-type="error" table:formula="of:=IF([.F80]&lt;&gt;0;&quot;ERROR&quot;;&quot;&quot;)"/>
        </table:table-row>
        <table:table-row>
          <table:table-cell office:value-type="float" office:value="0.19">
            <text:p>0.19</text:p>
          </table:table-cell>
          <table:table-cell office:value-type="error" table:formula="of:=ROUND([.A81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81])*IF(AND(ISEVEN(ABS([.A81])*10);MOD(ABS([.A81])*10;1)&lt;=0.5);ROUNDDOWN(ABS([.A81]);1);ROUND(ABS([.A81]);1))"/>
          <table:table-cell office:value-type="error" table:formula="of:=[.D81]-[.E81]"/>
          <table:table-cell office:value-type="error" table:formula="of:=IF([.F81]&lt;&gt;0;&quot;ERROR&quot;;&quot;&quot;)"/>
        </table:table-row>
        <table:table-row>
          <table:table-cell office:value-type="float" office:value="0.2">
            <text:p>0.2</text:p>
          </table:table-cell>
          <table:table-cell office:value-type="error" table:formula="of:=ROUND([.A82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82])*IF(AND(ISEVEN(ABS([.A82])*10);MOD(ABS([.A82])*10;1)&lt;=0.5);ROUNDDOWN(ABS([.A82]);1);ROUND(ABS([.A82]);1))"/>
          <table:table-cell office:value-type="error" table:formula="of:=[.D82]-[.E82]"/>
          <table:table-cell office:value-type="error" table:formula="of:=IF([.F82]&lt;&gt;0;&quot;ERROR&quot;;&quot;&quot;)"/>
        </table:table-row>
        <table:table-row>
          <table:table-cell office:value-type="float" office:value="0.21">
            <text:p>0.21</text:p>
          </table:table-cell>
          <table:table-cell office:value-type="error" table:formula="of:=ROUND([.A83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83])*IF(AND(ISEVEN(ABS([.A83])*10);MOD(ABS([.A83])*10;1)&lt;=0.5);ROUNDDOWN(ABS([.A83]);1);ROUND(ABS([.A83]);1))"/>
          <table:table-cell office:value-type="error" table:formula="of:=[.D83]-[.E83]"/>
          <table:table-cell office:value-type="error" table:formula="of:=IF([.F83]&lt;&gt;0;&quot;ERROR&quot;;&quot;&quot;)"/>
        </table:table-row>
        <table:table-row>
          <table:table-cell office:value-type="float" office:value="0.22">
            <text:p>0.22</text:p>
          </table:table-cell>
          <table:table-cell office:value-type="error" table:formula="of:=ROUND([.A84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84])*IF(AND(ISEVEN(ABS([.A84])*10);MOD(ABS([.A84])*10;1)&lt;=0.5);ROUNDDOWN(ABS([.A84]);1);ROUND(ABS([.A84]);1))"/>
          <table:table-cell office:value-type="error" table:formula="of:=[.D84]-[.E84]"/>
          <table:table-cell office:value-type="error" table:formula="of:=IF([.F84]&lt;&gt;0;&quot;ERROR&quot;;&quot;&quot;)"/>
        </table:table-row>
        <table:table-row>
          <table:table-cell office:value-type="float" office:value="0.23">
            <text:p>0.23</text:p>
          </table:table-cell>
          <table:table-cell office:value-type="error" table:formula="of:=ROUND([.A85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85])*IF(AND(ISEVEN(ABS([.A85])*10);MOD(ABS([.A85])*10;1)&lt;=0.5);ROUNDDOWN(ABS([.A85]);1);ROUND(ABS([.A85]);1))"/>
          <table:table-cell office:value-type="error" table:formula="of:=[.D85]-[.E85]"/>
          <table:table-cell office:value-type="error" table:formula="of:=IF([.F85]&lt;&gt;0;&quot;ERROR&quot;;&quot;&quot;)"/>
        </table:table-row>
        <table:table-row>
          <table:table-cell office:value-type="float" office:value="0.24">
            <text:p>0.24</text:p>
          </table:table-cell>
          <table:table-cell office:value-type="error" table:formula="of:=ROUND([.A86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86])*IF(AND(ISEVEN(ABS([.A86])*10);MOD(ABS([.A86])*10;1)&lt;=0.5);ROUNDDOWN(ABS([.A86]);1);ROUND(ABS([.A86]);1))"/>
          <table:table-cell office:value-type="error" table:formula="of:=[.D86]-[.E86]"/>
          <table:table-cell office:value-type="error" table:formula="of:=IF([.F86]&lt;&gt;0;&quot;ERROR&quot;;&quot;&quot;)"/>
        </table:table-row>
        <table:table-row>
          <table:table-cell office:value-type="float" office:value="0.25">
            <text:p>0.25</text:p>
          </table:table-cell>
          <table:table-cell office:value-type="error" table:formula="of:=ROUND([.A87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87])*IF(AND(ISEVEN(ABS([.A87])*10);MOD(ABS([.A87])*10;1)&lt;=0.5);ROUNDDOWN(ABS([.A87]);1);ROUND(ABS([.A87]);1))"/>
          <table:table-cell office:value-type="error" table:formula="of:=[.D87]-[.E87]"/>
          <table:table-cell office:value-type="error" table:formula="of:=IF([.F87]&lt;&gt;0;&quot;ERROR&quot;;&quot;&quot;)"/>
        </table:table-row>
        <table:table-row>
          <table:table-cell office:value-type="float" office:value="0.26">
            <text:p>0.26</text:p>
          </table:table-cell>
          <table:table-cell office:value-type="error" table:formula="of:=ROUND([.A88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SIGN([.A88])*IF(AND(ISEVEN(ABS([.A88])*10);MOD(ABS([.A88])*10;1)&lt;=0.5);ROUNDDOWN(ABS([.A88]);1);ROUND(ABS([.A88]);1))"/>
          <table:table-cell office:value-type="error" table:formula="of:=[.D88]-[.E88]"/>
          <table:table-cell office:value-type="error" table:formula="of:=IF([.F88]&lt;&gt;0;&quot;ERROR&quot;;&quot;&quot;)"/>
        </table:table-row>
        <table:table-row>
          <table:table-cell office:value-type="float" office:value="0.27">
            <text:p>0.27</text:p>
          </table:table-cell>
          <table:table-cell office:value-type="error" table:formula="of:=ROUND([.A89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SIGN([.A89])*IF(AND(ISEVEN(ABS([.A89])*10);MOD(ABS([.A89])*10;1)&lt;=0.5);ROUNDDOWN(ABS([.A89]);1);ROUND(ABS([.A89]);1))"/>
          <table:table-cell office:value-type="error" table:formula="of:=[.D89]-[.E89]"/>
          <table:table-cell office:value-type="error" table:formula="of:=IF([.F89]&lt;&gt;0;&quot;ERROR&quot;;&quot;&quot;)"/>
        </table:table-row>
        <table:table-row>
          <table:table-cell office:value-type="float" office:value="0.28">
            <text:p>0.28</text:p>
          </table:table-cell>
          <table:table-cell office:value-type="error" table:formula="of:=ROUND([.A90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SIGN([.A90])*IF(AND(ISEVEN(ABS([.A90])*10);MOD(ABS([.A90])*10;1)&lt;=0.5);ROUNDDOWN(ABS([.A90]);1);ROUND(ABS([.A90]);1))"/>
          <table:table-cell office:value-type="error" table:formula="of:=[.D90]-[.E90]"/>
          <table:table-cell office:value-type="error" table:formula="of:=IF([.F90]&lt;&gt;0;&quot;ERROR&quot;;&quot;&quot;)"/>
        </table:table-row>
        <table:table-row>
          <table:table-cell office:value-type="float" office:value="0.29">
            <text:p>0.29</text:p>
          </table:table-cell>
          <table:table-cell office:value-type="error" table:formula="of:=ROUND([.A91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SIGN([.A91])*IF(AND(ISEVEN(ABS([.A91])*10);MOD(ABS([.A91])*10;1)&lt;=0.5);ROUNDDOWN(ABS([.A91]);1);ROUND(ABS([.A91]);1))"/>
          <table:table-cell office:value-type="error" table:formula="of:=[.D91]-[.E91]"/>
          <table:table-cell office:value-type="error" table:formula="of:=IF([.F91]&lt;&gt;0;&quot;ERROR&quot;;&quot;&quot;)"/>
        </table:table-row>
        <table:table-row>
          <table:table-cell office:value-type="float" office:value="0.3">
            <text:p>0.3</text:p>
          </table:table-cell>
          <table:table-cell office:value-type="error" table:formula="of:=ROUND([.A92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SIGN([.A92])*IF(AND(ISEVEN(ABS([.A92])*10);MOD(ABS([.A92])*10;1)&lt;=0.5);ROUNDDOWN(ABS([.A92]);1);ROUND(ABS([.A92]);1))"/>
          <table:table-cell office:value-type="error" table:formula="of:=[.D92]-[.E92]"/>
          <table:table-cell office:value-type="error" table:formula="of:=IF([.F92]&lt;&gt;0;&quot;ERROR&quot;;&quot;&quot;)"/>
        </table:table-row>
        <table:table-row>
          <table:table-cell office:value-type="float" office:value="0.31">
            <text:p>0.31</text:p>
          </table:table-cell>
          <table:table-cell office:value-type="error" table:formula="of:=ROUND([.A93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SIGN([.A93])*IF(AND(ISEVEN(ABS([.A93])*10);MOD(ABS([.A93])*10;1)&lt;=0.5);ROUNDDOWN(ABS([.A93]);1);ROUND(ABS([.A93]);1))"/>
          <table:table-cell office:value-type="error" table:formula="of:=[.D93]-[.E93]"/>
          <table:table-cell office:value-type="error" table:formula="of:=IF([.F93]&lt;&gt;0;&quot;ERROR&quot;;&quot;&quot;)"/>
        </table:table-row>
        <table:table-row>
          <table:table-cell office:value-type="float" office:value="0.32">
            <text:p>0.32</text:p>
          </table:table-cell>
          <table:table-cell office:value-type="error" table:formula="of:=ROUND([.A94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SIGN([.A94])*IF(AND(ISEVEN(ABS([.A94])*10);MOD(ABS([.A94])*10;1)&lt;=0.5);ROUNDDOWN(ABS([.A94]);1);ROUND(ABS([.A94]);1))"/>
          <table:table-cell office:value-type="error" table:formula="of:=[.D94]-[.E94]"/>
          <table:table-cell office:value-type="error" table:formula="of:=IF([.F94]&lt;&gt;0;&quot;ERROR&quot;;&quot;&quot;)"/>
        </table:table-row>
        <table:table-row>
          <table:table-cell office:value-type="float" office:value="0.33">
            <text:p>0.33</text:p>
          </table:table-cell>
          <table:table-cell office:value-type="error" table:formula="of:=ROUND([.A95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SIGN([.A95])*IF(AND(ISEVEN(ABS([.A95])*10);MOD(ABS([.A95])*10;1)&lt;=0.5);ROUNDDOWN(ABS([.A95]);1);ROUND(ABS([.A95]);1))"/>
          <table:table-cell office:value-type="error" table:formula="of:=[.D95]-[.E95]"/>
          <table:table-cell office:value-type="error" table:formula="of:=IF([.F95]&lt;&gt;0;&quot;ERROR&quot;;&quot;&quot;)"/>
        </table:table-row>
        <table:table-row>
          <table:table-cell office:value-type="float" office:value="0.34">
            <text:p>0.34</text:p>
          </table:table-cell>
          <table:table-cell office:value-type="error" table:formula="of:=ROUND([.A96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SIGN([.A96])*IF(AND(ISEVEN(ABS([.A96])*10);MOD(ABS([.A96])*10;1)&lt;=0.5);ROUNDDOWN(ABS([.A96]);1);ROUND(ABS([.A96]);1))"/>
          <table:table-cell office:value-type="error" table:formula="of:=[.D96]-[.E96]"/>
          <table:table-cell office:value-type="error" table:formula="of:=IF([.F96]&lt;&gt;0;&quot;ERROR&quot;;&quot;&quot;)"/>
        </table:table-row>
        <table:table-row>
          <table:table-cell office:value-type="float" office:value="0.35">
            <text:p>0.35</text:p>
          </table:table-cell>
          <table:table-cell office:value-type="error" table:formula="of:=ROUND([.A97];1)"/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error" table:formula="of:=SIGN([.A97])*IF(AND(ISEVEN(ABS([.A97])*10);MOD(ABS([.A97])*10;1)&lt;=0.5);ROUNDDOWN(ABS([.A97]);1);ROUND(ABS([.A97]);1))"/>
          <table:table-cell office:value-type="error" table:formula="of:=[.D97]-[.E97]"/>
          <table:table-cell office:value-type="error" table:formula="of:=IF([.F97]&lt;&gt;0;&quot;ERROR&quot;;&quot;&quot;)"/>
        </table:table-row>
        <table:table-row>
          <table:table-cell office:value-type="float" office:value="0.36">
            <text:p>0.36</text:p>
          </table:table-cell>
          <table:table-cell office:value-type="error" table:formula="of:=ROUND([.A98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SIGN([.A98])*IF(AND(ISEVEN(ABS([.A98])*10);MOD(ABS([.A98])*10;1)&lt;=0.5);ROUNDDOWN(ABS([.A98]);1);ROUND(ABS([.A98]);1))"/>
          <table:table-cell office:value-type="error" table:formula="of:=[.D98]-[.E98]"/>
          <table:table-cell office:value-type="error" table:formula="of:=IF([.F98]&lt;&gt;0;&quot;ERROR&quot;;&quot;&quot;)"/>
        </table:table-row>
        <table:table-row>
          <table:table-cell office:value-type="float" office:value="0.37">
            <text:p>0.37</text:p>
          </table:table-cell>
          <table:table-cell office:value-type="error" table:formula="of:=ROUND([.A99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SIGN([.A99])*IF(AND(ISEVEN(ABS([.A99])*10);MOD(ABS([.A99])*10;1)&lt;=0.5);ROUNDDOWN(ABS([.A99]);1);ROUND(ABS([.A99]);1))"/>
          <table:table-cell office:value-type="error" table:formula="of:=[.D99]-[.E99]"/>
          <table:table-cell office:value-type="error" table:formula="of:=IF([.F99]&lt;&gt;0;&quot;ERROR&quot;;&quot;&quot;)"/>
        </table:table-row>
        <table:table-row>
          <table:table-cell office:value-type="float" office:value="0.38">
            <text:p>0.38</text:p>
          </table:table-cell>
          <table:table-cell office:value-type="error" table:formula="of:=ROUND([.A100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SIGN([.A100])*IF(AND(ISEVEN(ABS([.A100])*10);MOD(ABS([.A100])*10;1)&lt;=0.5);ROUNDDOWN(ABS([.A100]);1);ROUND(ABS([.A100]);1))"/>
          <table:table-cell office:value-type="error" table:formula="of:=[.D100]-[.E100]"/>
          <table:table-cell office:value-type="error" table:formula="of:=IF([.F100]&lt;&gt;0;&quot;ERROR&quot;;&quot;&quot;)"/>
        </table:table-row>
        <table:table-row>
          <table:table-cell office:value-type="float" office:value="0.39">
            <text:p>0.39</text:p>
          </table:table-cell>
          <table:table-cell office:value-type="error" table:formula="of:=ROUND([.A101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SIGN([.A101])*IF(AND(ISEVEN(ABS([.A101])*10);MOD(ABS([.A101])*10;1)&lt;=0.5);ROUNDDOWN(ABS([.A101]);1);ROUND(ABS([.A101]);1))"/>
          <table:table-cell office:value-type="error" table:formula="of:=[.D101]-[.E101]"/>
          <table:table-cell office:value-type="error" table:formula="of:=IF([.F101]&lt;&gt;0;&quot;ERROR&quot;;&quot;&quot;)"/>
        </table:table-row>
        <table:table-row>
          <table:table-cell office:value-type="float" office:value="0.4">
            <text:p>0.4</text:p>
          </table:table-cell>
          <table:table-cell office:value-type="error" table:formula="of:=ROUND([.A102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SIGN([.A102])*IF(AND(ISEVEN(ABS([.A102])*10);MOD(ABS([.A102])*10;1)&lt;=0.5);ROUNDDOWN(ABS([.A102]);1);ROUND(ABS([.A102]);1))"/>
          <table:table-cell office:value-type="error" table:formula="of:=[.D102]-[.E102]"/>
          <table:table-cell office:value-type="error" table:formula="of:=IF([.F102]&lt;&gt;0;&quot;ERROR&quot;;&quot;&quot;)"/>
        </table:table-row>
        <table:table-row>
          <table:table-cell office:value-type="float" office:value="0.41">
            <text:p>0.41</text:p>
          </table:table-cell>
          <table:table-cell office:value-type="error" table:formula="of:=ROUND([.A103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SIGN([.A103])*IF(AND(ISEVEN(ABS([.A103])*10);MOD(ABS([.A103])*10;1)&lt;=0.5);ROUNDDOWN(ABS([.A103]);1);ROUND(ABS([.A103]);1))"/>
          <table:table-cell office:value-type="error" table:formula="of:=[.D103]-[.E103]"/>
          <table:table-cell office:value-type="error" table:formula="of:=IF([.F103]&lt;&gt;0;&quot;ERROR&quot;;&quot;&quot;)"/>
        </table:table-row>
        <table:table-row>
          <table:table-cell office:value-type="float" office:value="0.42">
            <text:p>0.42</text:p>
          </table:table-cell>
          <table:table-cell office:value-type="error" table:formula="of:=ROUND([.A104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SIGN([.A104])*IF(AND(ISEVEN(ABS([.A104])*10);MOD(ABS([.A104])*10;1)&lt;=0.5);ROUNDDOWN(ABS([.A104]);1);ROUND(ABS([.A104]);1))"/>
          <table:table-cell office:value-type="error" table:formula="of:=[.D104]-[.E104]"/>
          <table:table-cell office:value-type="error" table:formula="of:=IF([.F104]&lt;&gt;0;&quot;ERROR&quot;;&quot;&quot;)"/>
        </table:table-row>
        <table:table-row>
          <table:table-cell office:value-type="float" office:value="0.43">
            <text:p>0.43</text:p>
          </table:table-cell>
          <table:table-cell office:value-type="error" table:formula="of:=ROUND([.A105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SIGN([.A105])*IF(AND(ISEVEN(ABS([.A105])*10);MOD(ABS([.A105])*10;1)&lt;=0.5);ROUNDDOWN(ABS([.A105]);1);ROUND(ABS([.A105]);1))"/>
          <table:table-cell office:value-type="error" table:formula="of:=[.D105]-[.E105]"/>
          <table:table-cell office:value-type="error" table:formula="of:=IF([.F105]&lt;&gt;0;&quot;ERROR&quot;;&quot;&quot;)"/>
        </table:table-row>
        <table:table-row>
          <table:table-cell office:value-type="float" office:value="0.44">
            <text:p>0.44</text:p>
          </table:table-cell>
          <table:table-cell office:value-type="error" table:formula="of:=ROUND([.A106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SIGN([.A106])*IF(AND(ISEVEN(ABS([.A106])*10);MOD(ABS([.A106])*10;1)&lt;=0.5);ROUNDDOWN(ABS([.A106]);1);ROUND(ABS([.A106]);1))"/>
          <table:table-cell office:value-type="error" table:formula="of:=[.D106]-[.E106]"/>
          <table:table-cell office:value-type="error" table:formula="of:=IF([.F106]&lt;&gt;0;&quot;ERROR&quot;;&quot;&quot;)"/>
        </table:table-row>
        <table:table-row>
          <table:table-cell office:value-type="float" office:value="0.45">
            <text:p>0.45</text:p>
          </table:table-cell>
          <table:table-cell office:value-type="error" table:formula="of:=ROUND([.A107];1)"/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error" table:formula="of:=SIGN([.A107])*IF(AND(ISEVEN(ABS([.A107])*10);MOD(ABS([.A107])*10;1)&lt;=0.5);ROUNDDOWN(ABS([.A107]);1);ROUND(ABS([.A107]);1))"/>
          <table:table-cell office:value-type="error" table:formula="of:=[.D107]-[.E107]"/>
          <table:table-cell office:value-type="error" table:formula="of:=IF([.F107]&lt;&gt;0;&quot;ERROR&quot;;&quot;&quot;)"/>
        </table:table-row>
        <table:table-row>
          <table:table-cell office:value-type="float" office:value="0.46">
            <text:p>0.46</text:p>
          </table:table-cell>
          <table:table-cell office:value-type="error" table:formula="of:=ROUND([.A108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SIGN([.A108])*IF(AND(ISEVEN(ABS([.A108])*10);MOD(ABS([.A108])*10;1)&lt;=0.5);ROUNDDOWN(ABS([.A108]);1);ROUND(ABS([.A108]);1))"/>
          <table:table-cell office:value-type="error" table:formula="of:=[.D108]-[.E108]"/>
          <table:table-cell office:value-type="error" table:formula="of:=IF([.F108]&lt;&gt;0;&quot;ERROR&quot;;&quot;&quot;)"/>
        </table:table-row>
        <table:table-row>
          <table:table-cell office:value-type="float" office:value="0.47">
            <text:p>0.47</text:p>
          </table:table-cell>
          <table:table-cell office:value-type="error" table:formula="of:=ROUND([.A109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SIGN([.A109])*IF(AND(ISEVEN(ABS([.A109])*10);MOD(ABS([.A109])*10;1)&lt;=0.5);ROUNDDOWN(ABS([.A109]);1);ROUND(ABS([.A109]);1))"/>
          <table:table-cell office:value-type="error" table:formula="of:=[.D109]-[.E109]"/>
          <table:table-cell office:value-type="error" table:formula="of:=IF([.F109]&lt;&gt;0;&quot;ERROR&quot;;&quot;&quot;)"/>
        </table:table-row>
        <table:table-row>
          <table:table-cell office:value-type="float" office:value="0.48">
            <text:p>0.48</text:p>
          </table:table-cell>
          <table:table-cell office:value-type="error" table:formula="of:=ROUND([.A110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SIGN([.A110])*IF(AND(ISEVEN(ABS([.A110])*10);MOD(ABS([.A110])*10;1)&lt;=0.5);ROUNDDOWN(ABS([.A110]);1);ROUND(ABS([.A110]);1))"/>
          <table:table-cell office:value-type="error" table:formula="of:=[.D110]-[.E110]"/>
          <table:table-cell office:value-type="error" table:formula="of:=IF([.F110]&lt;&gt;0;&quot;ERROR&quot;;&quot;&quot;)"/>
        </table:table-row>
        <table:table-row>
          <table:table-cell office:value-type="float" office:value="0.49">
            <text:p>0.49</text:p>
          </table:table-cell>
          <table:table-cell office:value-type="error" table:formula="of:=ROUND([.A111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SIGN([.A111])*IF(AND(ISEVEN(ABS([.A111])*10);MOD(ABS([.A111])*10;1)&lt;=0.5);ROUNDDOWN(ABS([.A111]);1);ROUND(ABS([.A111]);1))"/>
          <table:table-cell office:value-type="error" table:formula="of:=[.D111]-[.E111]"/>
          <table:table-cell office:value-type="error" table:formula="of:=IF([.F111]&lt;&gt;0;&quot;ERROR&quot;;&quot;&quot;)"/>
        </table:table-row>
        <table:table-row>
          <table:table-cell office:value-type="float" office:value="0.5">
            <text:p>0.5</text:p>
          </table:table-cell>
          <table:table-cell office:value-type="error" table:formula="of:=ROUND([.A112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SIGN([.A112])*IF(AND(ISEVEN(ABS([.A112])*10);MOD(ABS([.A112])*10;1)&lt;=0.5);ROUNDDOWN(ABS([.A112]);1);ROUND(ABS([.A112]);1))"/>
          <table:table-cell office:value-type="error" table:formula="of:=[.D112]-[.E112]"/>
          <table:table-cell office:value-type="error" table:formula="of:=IF([.F112]&lt;&gt;0;&quot;ERROR&quot;;&quot;&quot;)"/>
        </table:table-row>
        <table:table-row>
          <table:table-cell office:value-type="float" office:value="0.51">
            <text:p>0.51</text:p>
          </table:table-cell>
          <table:table-cell office:value-type="error" table:formula="of:=ROUND([.A113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SIGN([.A113])*IF(AND(ISEVEN(ABS([.A113])*10);MOD(ABS([.A113])*10;1)&lt;=0.5);ROUNDDOWN(ABS([.A113]);1);ROUND(ABS([.A113]);1))"/>
          <table:table-cell office:value-type="error" table:formula="of:=[.D113]-[.E113]"/>
          <table:table-cell office:value-type="error" table:formula="of:=IF([.F113]&lt;&gt;0;&quot;ERROR&quot;;&quot;&quot;)"/>
        </table:table-row>
        <table:table-row>
          <table:table-cell office:value-type="float" office:value="0.52">
            <text:p>0.52</text:p>
          </table:table-cell>
          <table:table-cell office:value-type="error" table:formula="of:=ROUND([.A114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SIGN([.A114])*IF(AND(ISEVEN(ABS([.A114])*10);MOD(ABS([.A114])*10;1)&lt;=0.5);ROUNDDOWN(ABS([.A114]);1);ROUND(ABS([.A114]);1))"/>
          <table:table-cell office:value-type="error" table:formula="of:=[.D114]-[.E114]"/>
          <table:table-cell office:value-type="error" table:formula="of:=IF([.F114]&lt;&gt;0;&quot;ERROR&quot;;&quot;&quot;)"/>
        </table:table-row>
        <table:table-row>
          <table:table-cell office:value-type="float" office:value="0.53">
            <text:p>0.53</text:p>
          </table:table-cell>
          <table:table-cell office:value-type="error" table:formula="of:=ROUND([.A115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SIGN([.A115])*IF(AND(ISEVEN(ABS([.A115])*10);MOD(ABS([.A115])*10;1)&lt;=0.5);ROUNDDOWN(ABS([.A115]);1);ROUND(ABS([.A115]);1))"/>
          <table:table-cell office:value-type="error" table:formula="of:=[.D115]-[.E115]"/>
          <table:table-cell office:value-type="error" table:formula="of:=IF([.F115]&lt;&gt;0;&quot;ERROR&quot;;&quot;&quot;)"/>
        </table:table-row>
        <table:table-row>
          <table:table-cell office:value-type="float" office:value="0.54">
            <text:p>0.54</text:p>
          </table:table-cell>
          <table:table-cell office:value-type="error" table:formula="of:=ROUND([.A116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SIGN([.A116])*IF(AND(ISEVEN(ABS([.A116])*10);MOD(ABS([.A116])*10;1)&lt;=0.5);ROUNDDOWN(ABS([.A116]);1);ROUND(ABS([.A116]);1))"/>
          <table:table-cell office:value-type="error" table:formula="of:=[.D116]-[.E116]"/>
          <table:table-cell office:value-type="error" table:formula="of:=IF([.F116]&lt;&gt;0;&quot;ERROR&quot;;&quot;&quot;)"/>
        </table:table-row>
        <table:table-row>
          <table:table-cell office:value-type="float" office:value="0.55">
            <text:p>0.55</text:p>
          </table:table-cell>
          <table:table-cell office:value-type="error" table:formula="of:=ROUND([.A117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SIGN([.A117])*IF(AND(ISEVEN(ABS([.A117])*10);MOD(ABS([.A117])*10;1)&lt;=0.5);ROUNDDOWN(ABS([.A117]);1);ROUND(ABS([.A117]);1))"/>
          <table:table-cell office:value-type="error" table:formula="of:=[.D117]-[.E117]"/>
          <table:table-cell office:value-type="error" table:formula="of:=IF([.F117]&lt;&gt;0;&quot;ERROR&quot;;&quot;&quot;)"/>
        </table:table-row>
        <table:table-row>
          <table:table-cell office:value-type="float" office:value="0.56">
            <text:p>0.56</text:p>
          </table:table-cell>
          <table:table-cell office:value-type="error" table:formula="of:=ROUND([.A118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SIGN([.A118])*IF(AND(ISEVEN(ABS([.A118])*10);MOD(ABS([.A118])*10;1)&lt;=0.5);ROUNDDOWN(ABS([.A118]);1);ROUND(ABS([.A118]);1))"/>
          <table:table-cell office:value-type="error" table:formula="of:=[.D118]-[.E118]"/>
          <table:table-cell office:value-type="error" table:formula="of:=IF([.F118]&lt;&gt;0;&quot;ERROR&quot;;&quot;&quot;)"/>
        </table:table-row>
        <table:table-row>
          <table:table-cell office:value-type="float" office:value="0.57">
            <text:p>0.57</text:p>
          </table:table-cell>
          <table:table-cell office:value-type="error" table:formula="of:=ROUND([.A119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SIGN([.A119])*IF(AND(ISEVEN(ABS([.A119])*10);MOD(ABS([.A119])*10;1)&lt;=0.5);ROUNDDOWN(ABS([.A119]);1);ROUND(ABS([.A119]);1))"/>
          <table:table-cell office:value-type="error" table:formula="of:=[.D119]-[.E119]"/>
          <table:table-cell office:value-type="error" table:formula="of:=IF([.F119]&lt;&gt;0;&quot;ERROR&quot;;&quot;&quot;)"/>
        </table:table-row>
        <table:table-row>
          <table:table-cell office:value-type="float" office:value="0.58">
            <text:p>0.58</text:p>
          </table:table-cell>
          <table:table-cell office:value-type="error" table:formula="of:=ROUND([.A120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SIGN([.A120])*IF(AND(ISEVEN(ABS([.A120])*10);MOD(ABS([.A120])*10;1)&lt;=0.5);ROUNDDOWN(ABS([.A120]);1);ROUND(ABS([.A120]);1))"/>
          <table:table-cell office:value-type="error" table:formula="of:=[.D120]-[.E120]"/>
          <table:table-cell office:value-type="error" table:formula="of:=IF([.F120]&lt;&gt;0;&quot;ERROR&quot;;&quot;&quot;)"/>
        </table:table-row>
        <table:table-row>
          <table:table-cell office:value-type="float" office:value="0.59">
            <text:p>0.59</text:p>
          </table:table-cell>
          <table:table-cell office:value-type="error" table:formula="of:=ROUND([.A121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SIGN([.A121])*IF(AND(ISEVEN(ABS([.A121])*10);MOD(ABS([.A121])*10;1)&lt;=0.5);ROUNDDOWN(ABS([.A121]);1);ROUND(ABS([.A121]);1))"/>
          <table:table-cell office:value-type="error" table:formula="of:=[.D121]-[.E121]"/>
          <table:table-cell office:value-type="error" table:formula="of:=IF([.F121]&lt;&gt;0;&quot;ERROR&quot;;&quot;&quot;)"/>
        </table:table-row>
        <table:table-row>
          <table:table-cell office:value-type="float" office:value="0.6">
            <text:p>0.6</text:p>
          </table:table-cell>
          <table:table-cell office:value-type="error" table:formula="of:=ROUND([.A122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SIGN([.A122])*IF(AND(ISEVEN(ABS([.A122])*10);MOD(ABS([.A122])*10;1)&lt;=0.5);ROUNDDOWN(ABS([.A122]);1);ROUND(ABS([.A122]);1))"/>
          <table:table-cell office:value-type="error" table:formula="of:=[.D122]-[.E122]"/>
          <table:table-cell office:value-type="error" table:formula="of:=IF([.F122]&lt;&gt;0;&quot;ERROR&quot;;&quot;&quot;)"/>
        </table:table-row>
      </table:table>
      <table:table table:name="Data table">
        <table:table-column/>
        <table:table-column/>
        <table:table-column/>
        <table:table-column/>
        <table:table-row>
          <table:table-cell office:value-type="string">
            <text:p>Last name</text:p>
          </table:table-cell>
          <table:table-cell office:value-type="string">
            <text:p>First name</text:p>
          </table:table-cell>
          <table:table-cell office:value-type="string">
            <text:p>Team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Patricia</text:p>
          </table:table-cell>
          <table:table-cell office:value-type="string">
            <text:p>Yellow Skunks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Jacob</text:p>
          </table:table-cell>
          <table:table-cell office:value-type="string">
            <text:p>Ugly Flamingos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Linda</text:p>
          </table:table-cell>
          <table:table-cell office:value-type="string">
            <text:p>Brown Skunks</text:p>
          </table:table-cell>
          <table:table-cell office:value-type="float" office:value="42">
            <text:p>42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Emma</text:p>
          </table:table-cell>
          <table:table-cell office:value-type="string">
            <text:p>Brown Turd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Yellow Turd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Pink Bears</text:p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Patricia</text:p>
          </table:table-cell>
          <table:table-cell office:value-type="string">
            <text:p>Fast Bears</text:p>
          </table:table-cell>
          <table:table-cell office:value-type="float" office:value="18">
            <text:p>18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Patricia</text:p>
          </table:table-cell>
          <table:table-cell office:value-type="string">
            <text:p>Brown Skunks</text:p>
          </table:table-cell>
          <table:table-cell office:value-type="float" office:value="17">
            <text:p>17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ichael</text:p>
          </table:table-cell>
          <table:table-cell office:value-type="string">
            <text:p>Yellow Flamingo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Linda</text:p>
          </table:table-cell>
          <table:table-cell office:value-type="string">
            <text:p>Brown Bear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Brown Flamingos</text:p>
          </table:table-cell>
          <table:table-cell office:value-type="float" office:value="28">
            <text:p>28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Linda</text:p>
          </table:table-cell>
          <table:table-cell office:value-type="string">
            <text:p>Brown Flamingos</text:p>
          </table:table-cell>
          <table:table-cell office:value-type="float" office:value="26">
            <text:p>26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Linda</text:p>
          </table:table-cell>
          <table:table-cell office:value-type="string">
            <text:p>Yellow Turd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Emma</text:p>
          </table:table-cell>
          <table:table-cell office:value-type="string">
            <text:p>Yellow Skunk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Patricia</text:p>
          </table:table-cell>
          <table:table-cell office:value-type="string">
            <text:p>Fast Bear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ichael</text:p>
          </table:table-cell>
          <table:table-cell office:value-type="string">
            <text:p>Yellow Turds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Emma</text:p>
          </table:table-cell>
          <table:table-cell office:value-type="string">
            <text:p>Ugly Bear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Emma</text:p>
          </table:table-cell>
          <table:table-cell office:value-type="string">
            <text:p>Pink Skunks</text:p>
          </table:table-cell>
          <table:table-cell office:value-type="float" office:value="26">
            <text:p>26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Patricia</text:p>
          </table:table-cell>
          <table:table-cell office:value-type="string">
            <text:p>Brown Bears</text:p>
          </table:table-cell>
          <table:table-cell office:value-type="float" office:value="28">
            <text:p>28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ichael</text:p>
          </table:table-cell>
          <table:table-cell office:value-type="string">
            <text:p>Pink Turds</text:p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Jacob</text:p>
          </table:table-cell>
          <table:table-cell office:value-type="string">
            <text:p>Ugly Turd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Thomas</text:p>
          </table:table-cell>
          <table:table-cell office:value-type="string">
            <text:p>Fast Bear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Thomas</text:p>
          </table:table-cell>
          <table:table-cell office:value-type="string">
            <text:p>Brown Turds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Brown Turds</text:p>
          </table:table-cell>
          <table:table-cell office:value-type="float" office:value="46">
            <text:p>46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Emma</text:p>
          </table:table-cell>
          <table:table-cell office:value-type="string">
            <text:p>Ugly Skunks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Thomas</text:p>
          </table:table-cell>
          <table:table-cell office:value-type="string">
            <text:p>Pink Skunk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ichael</text:p>
          </table:table-cell>
          <table:table-cell office:value-type="string">
            <text:p>Pink Skunks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Pink Turds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ichael</text:p>
          </table:table-cell>
          <table:table-cell office:value-type="string">
            <text:p>Brown Skunks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Thomas</text:p>
          </table:table-cell>
          <table:table-cell office:value-type="string">
            <text:p>Ugly Turds</text:p>
          </table:table-cell>
          <table:table-cell office:value-type="float" office:value="41">
            <text:p>41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Patricia</text:p>
          </table:table-cell>
          <table:table-cell office:value-type="string">
            <text:p>Yellow Turds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ary</text:p>
          </table:table-cell>
          <table:table-cell office:value-type="string">
            <text:p>Ugly Flamingos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Fast Turd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Fast Skunks</text:p>
          </table:table-cell>
          <table:table-cell office:value-type="float" office:value="28">
            <text:p>28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Linda</text:p>
          </table:table-cell>
          <table:table-cell office:value-type="string">
            <text:p>Ugly Bears</text:p>
          </table:table-cell>
          <table:table-cell office:value-type="float" office:value="49">
            <text:p>49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Ugly Bear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Thomas</text:p>
          </table:table-cell>
          <table:table-cell office:value-type="string">
            <text:p>Fast Flamingos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Patricia</text:p>
          </table:table-cell>
          <table:table-cell office:value-type="string">
            <text:p>Ugly Flamingos</text:p>
          </table:table-cell>
          <table:table-cell office:value-type="float" office:value="26">
            <text:p>26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Thomas</text:p>
          </table:table-cell>
          <table:table-cell office:value-type="string">
            <text:p>Ugly Skunks</text:p>
          </table:table-cell>
          <table:table-cell office:value-type="float" office:value="28">
            <text:p>28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Pink Skunks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Linda</text:p>
          </table:table-cell>
          <table:table-cell office:value-type="string">
            <text:p>Yellow Turd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ichael</text:p>
          </table:table-cell>
          <table:table-cell office:value-type="string">
            <text:p>Pink Flamingos</text:p>
          </table:table-cell>
          <table:table-cell office:value-type="float" office:value="17">
            <text:p>17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ichael</text:p>
          </table:table-cell>
          <table:table-cell office:value-type="string">
            <text:p>Yellow Bear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ichael</text:p>
          </table:table-cell>
          <table:table-cell office:value-type="string">
            <text:p>Brown Flamingo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ary</text:p>
          </table:table-cell>
          <table:table-cell office:value-type="string">
            <text:p>Brown Bears</text:p>
          </table:table-cell>
          <table:table-cell office:value-type="float" office:value="28">
            <text:p>28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Ugly Bears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ary</text:p>
          </table:table-cell>
          <table:table-cell office:value-type="string">
            <text:p>Brown Flamingo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ary</text:p>
          </table:table-cell>
          <table:table-cell office:value-type="string">
            <text:p>Ugly Turds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Emma</text:p>
          </table:table-cell>
          <table:table-cell office:value-type="string">
            <text:p>Yellow Skunk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Brown Skunk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Brown Turds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Brown Bears</text:p>
          </table:table-cell>
          <table:table-cell office:value-type="float" office:value="17">
            <text:p>17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Emma</text:p>
          </table:table-cell>
          <table:table-cell office:value-type="string">
            <text:p>Brown Turd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Emma</text:p>
          </table:table-cell>
          <table:table-cell office:value-type="string">
            <text:p>Pink Skunk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ary</text:p>
          </table:table-cell>
          <table:table-cell office:value-type="string">
            <text:p>Pink Bears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ary</text:p>
          </table:table-cell>
          <table:table-cell office:value-type="string">
            <text:p>Fast Turd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Yellow Bear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Emma</text:p>
          </table:table-cell>
          <table:table-cell office:value-type="string">
            <text:p>Ugly Skunk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Brown Skunk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Emma</text:p>
          </table:table-cell>
          <table:table-cell office:value-type="string">
            <text:p>Yellow Flamingo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Emma</text:p>
          </table:table-cell>
          <table:table-cell office:value-type="string">
            <text:p>Pink Turd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Thomas</text:p>
          </table:table-cell>
          <table:table-cell office:value-type="string">
            <text:p>Fast Skunks</text:p>
          </table:table-cell>
          <table:table-cell office:value-type="float" office:value="50">
            <text:p>50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Jacob</text:p>
          </table:table-cell>
          <table:table-cell office:value-type="string">
            <text:p>Fast Bear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Yellow Skunks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Jacob</text:p>
          </table:table-cell>
          <table:table-cell office:value-type="string">
            <text:p>Brown Bears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Thomas</text:p>
          </table:table-cell>
          <table:table-cell office:value-type="string">
            <text:p>Pink Bear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Emma</text:p>
          </table:table-cell>
          <table:table-cell office:value-type="string">
            <text:p>Pink Bears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Brown Flamingos</text:p>
          </table:table-cell>
          <table:table-cell office:value-type="float" office:value="46">
            <text:p>46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Emma</text:p>
          </table:table-cell>
          <table:table-cell office:value-type="string">
            <text:p>Ugly Flamingos</text:p>
          </table:table-cell>
          <table:table-cell office:value-type="float" office:value="50">
            <text:p>50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Emma</text:p>
          </table:table-cell>
          <table:table-cell office:value-type="string">
            <text:p>Brown Turds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Brown Flamingo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Linda</text:p>
          </table:table-cell>
          <table:table-cell office:value-type="string">
            <text:p>Fast Bear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Emma</text:p>
          </table:table-cell>
          <table:table-cell office:value-type="string">
            <text:p>Pink Flamingos</text:p>
          </table:table-cell>
          <table:table-cell office:value-type="float" office:value="49">
            <text:p>49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ary</text:p>
          </table:table-cell>
          <table:table-cell office:value-type="string">
            <text:p>Fast Turds</text:p>
          </table:table-cell>
          <table:table-cell office:value-type="float" office:value="34">
            <text:p>34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Jacob</text:p>
          </table:table-cell>
          <table:table-cell office:value-type="string">
            <text:p>Yellow Skunk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Jacob</text:p>
          </table:table-cell>
          <table:table-cell office:value-type="string">
            <text:p>Pink Turd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ary</text:p>
          </table:table-cell>
          <table:table-cell office:value-type="string">
            <text:p>Fast Skunk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Emma</text:p>
          </table:table-cell>
          <table:table-cell office:value-type="string">
            <text:p>Fast Skunks</text:p>
          </table:table-cell>
          <table:table-cell office:value-type="float" office:value="41">
            <text:p>41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ary</text:p>
          </table:table-cell>
          <table:table-cell office:value-type="string">
            <text:p>Fast Bears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Emma</text:p>
          </table:table-cell>
          <table:table-cell office:value-type="string">
            <text:p>Brown Flamingos</text:p>
          </table:table-cell>
          <table:table-cell office:value-type="float" office:value="34">
            <text:p>34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Thomas</text:p>
          </table:table-cell>
          <table:table-cell office:value-type="string">
            <text:p>Ugly Flamingo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Pink Flamingos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Patricia</text:p>
          </table:table-cell>
          <table:table-cell office:value-type="string">
            <text:p>Fast Turds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Emma</text:p>
          </table:table-cell>
          <table:table-cell office:value-type="string">
            <text:p>Ugly Flamingos</text:p>
          </table:table-cell>
          <table:table-cell office:value-type="float" office:value="34">
            <text:p>34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Patricia</text:p>
          </table:table-cell>
          <table:table-cell office:value-type="string">
            <text:p>Ugly Skunks</text:p>
          </table:table-cell>
          <table:table-cell office:value-type="float" office:value="28">
            <text:p>28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ary</text:p>
          </table:table-cell>
          <table:table-cell office:value-type="string">
            <text:p>Fast Flamingos</text:p>
          </table:table-cell>
          <table:table-cell office:value-type="float" office:value="37">
            <text:p>37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Yellow Turd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Jacob</text:p>
          </table:table-cell>
          <table:table-cell office:value-type="string">
            <text:p>Fast Bears</text:p>
          </table:table-cell>
          <table:table-cell office:value-type="float" office:value="50">
            <text:p>50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Patricia</text:p>
          </table:table-cell>
          <table:table-cell office:value-type="string">
            <text:p>Yellow Turds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ary</text:p>
          </table:table-cell>
          <table:table-cell office:value-type="string">
            <text:p>Brown Bear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Fast Skunk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Emma</text:p>
          </table:table-cell>
          <table:table-cell office:value-type="string">
            <text:p>Ugly Bear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Jacob</text:p>
          </table:table-cell>
          <table:table-cell office:value-type="string">
            <text:p>Ugly Turds</text:p>
          </table:table-cell>
          <table:table-cell office:value-type="float" office:value="41">
            <text:p>41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Pink Flamingos</text:p>
          </table:table-cell>
          <table:table-cell office:value-type="float" office:value="42">
            <text:p>42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Jacob</text:p>
          </table:table-cell>
          <table:table-cell office:value-type="string">
            <text:p>Yellow Flamingos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Patricia</text:p>
          </table:table-cell>
          <table:table-cell office:value-type="string">
            <text:p>Yellow Skunks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Thomas</text:p>
          </table:table-cell>
          <table:table-cell office:value-type="string">
            <text:p>Yellow Bears</text:p>
          </table:table-cell>
          <table:table-cell office:value-type="float" office:value="43">
            <text:p>43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Linda</text:p>
          </table:table-cell>
          <table:table-cell office:value-type="string">
            <text:p>Fast Bear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Patricia</text:p>
          </table:table-cell>
          <table:table-cell office:value-type="string">
            <text:p>Pink Skunk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Linda</text:p>
          </table:table-cell>
          <table:table-cell office:value-type="string">
            <text:p>Ugly Flamingos</text:p>
          </table:table-cell>
          <table:table-cell office:value-type="float" office:value="10">
            <text:p>10</text:p>
          </table:table-cell>
        </table:table-row>
        <table:table-row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verage unless no data:</text:p>
          </table:table-cell>
          <table:table-cell office:value-type="error" table:formula="of:=IF(SUBTOTAL(102;[.D2:.D101])&gt;0;SUBTOTAL(101;[.D2:.D101]);&quot;&quot;)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verage:</text:p>
          </table:table-cell>
          <table:table-cell office:value-type="error" table:formula="of:=SUBTOTAL(101;[.D2:.D101])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um:</text:p>
          </table:table-cell>
          <table:table-cell office:value-type="error" table:formula="of:=SUBTOTAL(109;[.D2:.D101])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:</text:p>
          </table:table-cell>
          <table:table-cell office:value-type="error" table:formula="of:=SUBTOTAL(105;[.D2:.D101])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:</text:p>
          </table:table-cell>
          <table:table-cell office:value-type="error" table:formula="of:=SUBTOTAL(104;[.D2:.D101])"/>
        </table:table-row>
      </table:table>
      <table:database-ranges>
        <table:database-range table:name="__datatbl_0" table:target-range-address="'Data table'.A1:'Data table'.D1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xmlns:fo="urn:oasis:names:tc:opendocument:xmlns:xsl-fo-compatible:1.0" office:version="1.4">
  <office:styles>
    <style:style style:name="glbl0" style:display-name="glbl0" style:family="table-cell">
      <style:table-cell-properties fo:background-color="#ff0000"/>
      <style:text-properties/>
    </style:style>
    <style:style style:name="glbl1" style:display-name="glbl1" style:family="table-cell">
      <style:table-cell-properties fo:background-color="#0000ff"/>
      <style:text-properties/>
    </style:style>
    <style:style style:name="glbl2" style:display-name="glbl2" style:family="table-cell">
      <style:table-cell-properties fo:background-color="#00ff00"/>
      <style:text-properties/>
    </style:style>
    <style:style style:name="glbl3" style:display-name="glbl3" style:family="table-cell">
      <style:table-cell-properties fo:background-color="#00ffff"/>
      <style:text-properties/>
    </style:style>
    <style:style style:name="glbl4" style:display-name="glbl4" style:family="table-cell">
      <style:table-cell-properties fo:background-color="#dbd8c4"/>
      <style:text-properties/>
    </style:style>
    <style:style style:name="glbl5" style:display-name="glbl5" style:family="table-cell">
      <style:table-cell-properties fo:background-color="#ed1c24"/>
      <style:text-properties/>
    </style:style>
    <style:style style:name="glbl6" style:display-name="glbl6" style:family="table-cell">
      <style:table-cell-properties fo:background-color="#f44336"/>
      <style:text-properties/>
    </style:style>
    <style:style style:name="glbl7" style:display-name="glbl7" style:family="table-cell">
      <style:table-cell-properties fo:background-color="#4caf50"/>
      <style:text-properties/>
    </style:style>
    <style:style style:name="glbl8" style:display-name="glbl8" style:family="table-cell">
      <style:table-cell-properties fo:background-color="#000000"/>
      <style:text-properties/>
    </style:style>
    <style:style style:name="glbl9" style:display-name="glbl9" style:family="table-cell">
      <style:table-cell-properties fo:background-color="#ede7f6"/>
      <style:text-properties/>
    </style:style>
    <number:number-style style:name="auto10">
      <number:number number:decimal-places="1" number:min-decimal-places="1" number:min-integer-digits="1"/>
    </number:number-style>
    <number:number-style style:name="auto11">
      <number:number number:decimal-places="3" number:min-decimal-places="3" number:min-integer-digits="1"/>
    </number:number-style>
    <number:percentage-style style:name="auto12">
      <number:number number:decimal-places="1" number:min-decimal-places="1" number:min-integer-digits="1"/>
      <number:text> %</number:text>
    </number:percentage-style>
    <number:percentage-style style:name="auto13">
      <number:number number:decimal-places="2" number:min-decimal-places="2" number:min-integer-digits="1"/>
      <number:text> %</number:text>
    </number:percentage-style>
    <number:number-style style:name="auto36">
      <number:number number:decimal-places="0" number:min-decimal-places="0" number:min-integer-digits="1"/>
    </number:number-style>
    <number:number-style style:name="auto39">
      <number:number number:decimal-places="2" number:min-decimal-places="2" number:min-integer-digits="1"/>
    </number:number-style>
    <number:number-style style:name="auto42">
      <number:number number:decimal-places="4" number:min-decimal-places="4" number:min-integer-digits="1"/>
    </number:number-style>
    <number:number-style style:name="auto44">
      <number:number number:decimal-places="5" number:min-decimal-places="5" number:min-integer-digits="1"/>
    </number:number-style>
    <number:percentage-style style:name="auto46">
      <number:number number:decimal-places="0" number:min-decimal-places="0" number:min-integer-digits="1"/>
      <number:text> %</number:text>
    </number:percentage-style>
    <number:date-style style:name="auto50" number:automatic-order="true" number:format-source="languag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auto52" number:automatic-order="true" number:format-source="languag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</office: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https://github.com/johndoe31415/odsexport v0.1.1rc0</meta:generator>
    <meta:creation-date>2026-07-18T22:20:55</meta:creation-date>
    <dc:date>2026-07-18T22:20:55</dc:date>
  </office:meta>
</office:document-meta>
</file>