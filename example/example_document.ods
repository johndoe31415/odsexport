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1" style:condition="1" style:base-cell-address="'Conditional Multi-Format'.A2"/>
    </style:style>
    <style:style style:name="auto11" style:display-name="auto11" style:family="table-cell" style:data-style-name="auto10">
      <style:text-properties/>
    </style:style>
    <style:style style:name="cond4_1" style:display-name="cond4_1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3" style:condition="1" style:base-cell-address="'Conditional Multi-Format'.A2"/>
    </style:style>
    <style:style style:name="auto13" style:display-name="auto13" style:family="table-cell" style:data-style-name="auto12">
      <style:text-properties/>
    </style:style>
    <style:style style:name="cond4_2" style:display-name="cond4_2" style:family="table-cell" style:data-style-name="auto14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5" style:condition="1" style:base-cell-address="'Conditional Multi-Format'.A2"/>
    </style:style>
    <style:style style:name="auto15" style:display-name="auto15" style:family="table-cell" style:data-style-name="auto14">
      <style:text-properties/>
    </style:style>
    <style:style style:name="cond4_3" style:display-name="cond4_3" style:family="table-cell" style:data-style-name="auto16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7" style:condition="1" style:base-cell-address="'Conditional Multi-Format'.A2"/>
    </style:style>
    <style:style style:name="auto17" style:display-name="auto17" style:family="table-cell" style:data-style-name="auto16">
      <style:text-properties/>
    </style:style>
    <style:style style:name="dr" style:display-name="dr" style:family="table-row"/>
    <style:style style:name="dc" style:display-name="dc" style:family="table-column"/>
    <style:style style:name="auto18" style:display-name="auto18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9" style:display-name="auto19" style:family="table-cell">
      <style:text-properties fo:font-weight="bold"/>
    </style:style>
    <style:style style:name="auto20" style:display-name="auto20" style:family="table-cell">
      <style:text-properties fo:font-style="italic"/>
    </style:style>
    <style:style style:name="auto21" style:display-name="auto21" style:family="table-cell">
      <style:paragraph-properties fo:text-align="start"/>
      <style:text-properties/>
    </style:style>
    <style:style style:name="auto22" style:display-name="auto22" style:family="table-cell">
      <style:paragraph-properties fo:text-align="center"/>
      <style:text-properties/>
    </style:style>
    <style:style style:name="auto23" style:display-name="auto23" style:family="table-cell">
      <style:paragraph-properties fo:text-align="end"/>
      <style:text-properties/>
    </style:style>
    <style:style style:name="auto24" style:display-name="auto24" style:family="table-cell">
      <style:text-properties fo:color="#0000ff"/>
    </style:style>
    <style:style style:name="auto25" style:display-name="auto25" style:family="table-cell">
      <style:table-cell-properties fo:background-color="#aaaaff"/>
      <style:text-properties/>
    </style:style>
    <style:style style:name="auto26" style:display-name="auto26" style:family="table-cell">
      <style:table-cell-properties fo:border-top="0.7500pt solid #ff0000" fo:border-left="0.7500pt solid #ff0000"/>
      <style:text-properties/>
    </style:style>
    <style:style style:name="auto27" style:display-name="auto27" style:family="table-cell">
      <style:table-cell-properties fo:border-top="0.7500pt solid #ff0000"/>
      <style:text-properties/>
    </style:style>
    <style:style style:name="auto28" style:display-name="auto28" style:family="table-cell">
      <style:table-cell-properties fo:border-top="0.7500pt solid #ff0000" fo:border-right="0.7500pt solid #ff0000"/>
      <style:text-properties/>
    </style:style>
    <style:style style:name="auto29" style:display-name="auto29" style:family="table-cell">
      <style:table-cell-properties fo:border-left="0.7500pt solid #ff0000"/>
      <style:text-properties/>
    </style:style>
    <style:style style:name="auto30" style:display-name="auto30" style:family="table-cell">
      <style:table-cell-properties fo:border-right="0.7500pt solid #ff0000"/>
      <style:text-properties/>
    </style:style>
    <style:style style:name="auto31" style:display-name="auto31" style:family="table-cell">
      <style:table-cell-properties fo:border-bottom="0.7500pt solid #ff0000" fo:border-left="0.7500pt solid #ff0000"/>
      <style:text-properties/>
    </style:style>
    <style:style style:name="auto32" style:display-name="auto32" style:family="table-cell">
      <style:table-cell-properties fo:border-bottom="0.7500pt solid #ff0000"/>
      <style:text-properties/>
    </style:style>
    <style:style style:name="auto33" style:display-name="auto33" style:family="table-cell">
      <style:table-cell-properties fo:wrap-option="wrap" fo:border-bottom="0.7500pt solid #ff0000" fo:border-right="0.7500pt solid #ff0000"/>
      <style:text-properties/>
    </style:style>
    <style:style style:name="auto34" style:display-name="auto34" style:family="table-row">
      <style:table-row-properties style:row-height="1cm"/>
    </style:style>
    <style:style style:name="auto35" style:display-name="auto35" style:family="table-cell">
      <style:table-cell-properties style:vertical-align="middle"/>
      <style:text-properties/>
    </style:style>
    <style:style style:name="auto36" style:display-name="auto36" style:family="table-row">
      <style:table-row-properties style:row-height="2cm"/>
    </style:style>
    <style:style style:name="auto37" style:display-name="auto37" style:family="table-column">
      <style:table-column-properties style:column-width="4cm"/>
    </style:style>
    <style:style style:name="auto38" style:display-name="auto38" style:family="table-column">
      <style:table-column-properties style:column-width="5cm"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8" office:value-type="string">
            <text:p>Rotated Arial</text:p>
          </table:table-cell>
          <table:table-cell table:style-name="auto19" office:value-type="string">
            <text:p>Bold only</text:p>
          </table:table-cell>
          <table:table-cell table:style-name="auto20" office:value-type="string">
            <text:p>Italics only</text:p>
          </table:table-cell>
          <table:table-cell table:style-name="auto21" office:value-type="string">
            <text:p>Left adjust</text:p>
          </table:table-cell>
          <table:table-cell table:style-name="auto22" office:value-type="string">
            <text:p>Centered</text:p>
          </table:table-cell>
          <table:table-cell table:style-name="auto23" office:value-type="string">
            <text:p>Right adjust</text:p>
          </table:table-cell>
          <table:table-cell table:style-name="auto24" office:value-type="string">
            <text:p>Blue text</text:p>
          </table:table-cell>
          <table:table-cell table:style-name="auto25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6" office:value-type="string">
            <text:p>Top left corner of red box</text:p>
          </table:table-cell>
          <table:table-cell table:style-name="auto27"/>
          <table:table-cell table:style-name="auto27"/>
          <table:table-cell table:style-name="auto27"/>
          <table:table-cell table:style-name="auto27"/>
          <table:table-cell table:style-name="auto28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9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3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31"/>
          <table:table-cell table:style-name="auto32"/>
          <table:table-cell table:style-name="auto32"/>
          <table:table-cell table:style-name="auto32"/>
          <table:table-cell table:style-name="auto32"/>
          <table:table-cell table:style-name="auto33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4">
          <table:table-cell table:style-name="auto35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6">
          <table:table-cell table:style-name="auto35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7"/>
        <table:table-column table:style-name="auto38"/>
        <table:table-column/>
        <table:table-row>
          <table:table-cell table:style-name="auto19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9" office:value-type="string">
            <text:p>Computed value 1:</text:p>
          </table:table-cell>
          <table:table-cell office:value-type="error" table:formula="of:=(((([.B1]*2)/3)+123)+Pi())"/>
          <table:table-cell office:value-type="error" table:formula="of:=([.B1]*2/3) + 123 + Pi()"/>
        </table:table-row>
        <table:table-row>
          <table:table-cell table:style-name="auto19" office:value-type="string">
            <text:p>Computed value 2:</text:p>
          </table:table-cell>
          <table:table-cell office:value-type="error" table:formula="of:=([.C2]/300)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0 digits:</text:p>
          </table:table-cell>
          <table:table-cell table:style-name="auto39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1 digits:</text:p>
          </table:table-cell>
          <table:table-cell table:style-name="auto1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2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3 digits:</text:p>
          </table:table-cell>
          <table:table-cell table:style-name="auto1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4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5 digits:</text:p>
          </table:table-cell>
          <table:table-cell table:style-name="auto45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0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1 digits:</text:p>
          </table:table-cell>
          <table:table-cell table:style-name="auto15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2 digits:</text:p>
          </table:table-cell>
          <table:table-cell table:style-name="auto1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Datetime as ISO:</text:p>
          </table:table-cell>
          <table:table-cell table:style-name="auto49" office:value-type="date" office:date-value="2026-07-15T14:29:00"/>
          <table:table-cell office:value-type="string">
            <text:p/>
          </table:table-cell>
        </table:table-row>
        <table:table-row>
          <table:table-cell table:style-name="auto19" office:value-type="string">
            <text:p>Datetime as German:</text:p>
          </table:table-cell>
          <table:table-cell table:style-name="auto51" office:value-type="date" office:date-value="2026-07-15T14:29:00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Volume of cylinder:</text:p>
          </table:table-cell>
          <table:table-cell office:value-type="error" table:formula="of:=((([.B16]^2)*3.1415)*[.B17])"/>
          <table:table-cell office:value-type="string">
            <text:p>mm³</text:p>
          </table:table-cell>
        </table:table-row>
      </table:table>
      <table:table table:name="Conditional Formatting">
        <table:table-column/>
        <table:table-column table:style-name="auto53"/>
        <table:table-column table:style-name="auto37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([.B2]+2)*4)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([.B3]+2)*4)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([.B4]+2)*4)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([.B5]+2)*4)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([.B6]+2)*4)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([.B7]+2)*4)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([.B8]+2)*4)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([.B9]+2)*4)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([.B10]+2)*4)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([.B11]+2)*4)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2])*IF(AND(ISEVEN((ABS([.A2])*10));(MOD((ABS([.A2])*10);1)&lt;=0.5));ROUNDDOWN(ABS([.A2]);1);ROUND(ABS([.A2]);1)))"/>
          <table:table-cell office:value-type="error" table:formula="of:=([.D2]-[.E2])"/>
          <table:table-cell office:value-type="error" table:formula="of:=IF(([.F2]&lt;&gt;0)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3])*IF(AND(ISEVEN((ABS([.A3])*10));(MOD((ABS([.A3])*10);1)&lt;=0.5));ROUNDDOWN(ABS([.A3]);1);ROUND(ABS([.A3]);1)))"/>
          <table:table-cell office:value-type="error" table:formula="of:=([.D3]-[.E3])"/>
          <table:table-cell office:value-type="error" table:formula="of:=IF(([.F3]&lt;&gt;0)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4])*IF(AND(ISEVEN((ABS([.A4])*10));(MOD((ABS([.A4])*10);1)&lt;=0.5));ROUNDDOWN(ABS([.A4]);1);ROUND(ABS([.A4]);1)))"/>
          <table:table-cell office:value-type="error" table:formula="of:=([.D4]-[.E4])"/>
          <table:table-cell office:value-type="error" table:formula="of:=IF(([.F4]&lt;&gt;0)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5])*IF(AND(ISEVEN((ABS([.A5])*10));(MOD((ABS([.A5])*10);1)&lt;=0.5));ROUNDDOWN(ABS([.A5]);1);ROUND(ABS([.A5]);1)))"/>
          <table:table-cell office:value-type="error" table:formula="of:=([.D5]-[.E5])"/>
          <table:table-cell office:value-type="error" table:formula="of:=IF(([.F5]&lt;&gt;0)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6])*IF(AND(ISEVEN((ABS([.A6])*10));(MOD((ABS([.A6])*10);1)&lt;=0.5));ROUNDDOWN(ABS([.A6]);1);ROUND(ABS([.A6]);1)))"/>
          <table:table-cell office:value-type="error" table:formula="of:=([.D6]-[.E6])"/>
          <table:table-cell office:value-type="error" table:formula="of:=IF(([.F6]&lt;&gt;0)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7])*IF(AND(ISEVEN((ABS([.A7])*10));(MOD((ABS([.A7])*10);1)&lt;=0.5));ROUNDDOWN(ABS([.A7]);1);ROUND(ABS([.A7]);1)))"/>
          <table:table-cell office:value-type="error" table:formula="of:=([.D7]-[.E7])"/>
          <table:table-cell office:value-type="error" table:formula="of:=IF(([.F7]&lt;&gt;0)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8])*IF(AND(ISEVEN((ABS([.A8])*10));(MOD((ABS([.A8])*10);1)&lt;=0.5));ROUNDDOWN(ABS([.A8]);1);ROUND(ABS([.A8]);1)))"/>
          <table:table-cell office:value-type="error" table:formula="of:=([.D8]-[.E8])"/>
          <table:table-cell office:value-type="error" table:formula="of:=IF(([.F8]&lt;&gt;0)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9])*IF(AND(ISEVEN((ABS([.A9])*10));(MOD((ABS([.A9])*10);1)&lt;=0.5));ROUNDDOWN(ABS([.A9]);1);ROUND(ABS([.A9]);1)))"/>
          <table:table-cell office:value-type="error" table:formula="of:=([.D9]-[.E9])"/>
          <table:table-cell office:value-type="error" table:formula="of:=IF(([.F9]&lt;&gt;0)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0])*IF(AND(ISEVEN((ABS([.A10])*10));(MOD((ABS([.A10])*10);1)&lt;=0.5));ROUNDDOWN(ABS([.A10]);1);ROUND(ABS([.A10]);1)))"/>
          <table:table-cell office:value-type="error" table:formula="of:=([.D10]-[.E10])"/>
          <table:table-cell office:value-type="error" table:formula="of:=IF(([.F10]&lt;&gt;0)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1])*IF(AND(ISEVEN((ABS([.A11])*10));(MOD((ABS([.A11])*10);1)&lt;=0.5));ROUNDDOWN(ABS([.A11]);1);ROUND(ABS([.A11]);1)))"/>
          <table:table-cell office:value-type="error" table:formula="of:=([.D11]-[.E11])"/>
          <table:table-cell office:value-type="error" table:formula="of:=IF(([.F11]&lt;&gt;0)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2])*IF(AND(ISEVEN((ABS([.A12])*10));(MOD((ABS([.A12])*10);1)&lt;=0.5));ROUNDDOWN(ABS([.A12]);1);ROUND(ABS([.A12]);1)))"/>
          <table:table-cell office:value-type="error" table:formula="of:=([.D12]-[.E12])"/>
          <table:table-cell office:value-type="error" table:formula="of:=IF(([.F12]&lt;&gt;0)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3])*IF(AND(ISEVEN((ABS([.A13])*10));(MOD((ABS([.A13])*10);1)&lt;=0.5));ROUNDDOWN(ABS([.A13]);1);ROUND(ABS([.A13]);1)))"/>
          <table:table-cell office:value-type="error" table:formula="of:=([.D13]-[.E13])"/>
          <table:table-cell office:value-type="error" table:formula="of:=IF(([.F13]&lt;&gt;0)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4])*IF(AND(ISEVEN((ABS([.A14])*10));(MOD((ABS([.A14])*10);1)&lt;=0.5));ROUNDDOWN(ABS([.A14]);1);ROUND(ABS([.A14]);1)))"/>
          <table:table-cell office:value-type="error" table:formula="of:=([.D14]-[.E14])"/>
          <table:table-cell office:value-type="error" table:formula="of:=IF(([.F14]&lt;&gt;0)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5])*IF(AND(ISEVEN((ABS([.A15])*10));(MOD((ABS([.A15])*10);1)&lt;=0.5));ROUNDDOWN(ABS([.A15]);1);ROUND(ABS([.A15]);1)))"/>
          <table:table-cell office:value-type="error" table:formula="of:=([.D15]-[.E15])"/>
          <table:table-cell office:value-type="error" table:formula="of:=IF(([.F15]&lt;&gt;0)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6])*IF(AND(ISEVEN((ABS([.A16])*10));(MOD((ABS([.A16])*10);1)&lt;=0.5));ROUNDDOWN(ABS([.A16]);1);ROUND(ABS([.A16]);1)))"/>
          <table:table-cell office:value-type="error" table:formula="of:=([.D16]-[.E16])"/>
          <table:table-cell office:value-type="error" table:formula="of:=IF(([.F16]&lt;&gt;0)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(SIGN([.A17])*IF(AND(ISEVEN((ABS([.A17])*10));(MOD((ABS([.A17])*10);1)&lt;=0.5));ROUNDDOWN(ABS([.A17]);1);ROUND(ABS([.A17]);1)))"/>
          <table:table-cell office:value-type="error" table:formula="of:=([.D17]-[.E17])"/>
          <table:table-cell office:value-type="error" table:formula="of:=IF(([.F17]&lt;&gt;0)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8])*IF(AND(ISEVEN((ABS([.A18])*10));(MOD((ABS([.A18])*10);1)&lt;=0.5));ROUNDDOWN(ABS([.A18]);1);ROUND(ABS([.A18]);1)))"/>
          <table:table-cell office:value-type="error" table:formula="of:=([.D18]-[.E18])"/>
          <table:table-cell office:value-type="error" table:formula="of:=IF(([.F18]&lt;&gt;0)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9])*IF(AND(ISEVEN((ABS([.A19])*10));(MOD((ABS([.A19])*10);1)&lt;=0.5));ROUNDDOWN(ABS([.A19]);1);ROUND(ABS([.A19]);1)))"/>
          <table:table-cell office:value-type="error" table:formula="of:=([.D19]-[.E19])"/>
          <table:table-cell office:value-type="error" table:formula="of:=IF(([.F19]&lt;&gt;0)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0])*IF(AND(ISEVEN((ABS([.A20])*10));(MOD((ABS([.A20])*10);1)&lt;=0.5));ROUNDDOWN(ABS([.A20]);1);ROUND(ABS([.A20]);1)))"/>
          <table:table-cell office:value-type="error" table:formula="of:=([.D20]-[.E20])"/>
          <table:table-cell office:value-type="error" table:formula="of:=IF(([.F20]&lt;&gt;0)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1])*IF(AND(ISEVEN((ABS([.A21])*10));(MOD((ABS([.A21])*10);1)&lt;=0.5));ROUNDDOWN(ABS([.A21]);1);ROUND(ABS([.A21]);1)))"/>
          <table:table-cell office:value-type="error" table:formula="of:=([.D21]-[.E21])"/>
          <table:table-cell office:value-type="error" table:formula="of:=IF(([.F21]&lt;&gt;0)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2])*IF(AND(ISEVEN((ABS([.A22])*10));(MOD((ABS([.A22])*10);1)&lt;=0.5));ROUNDDOWN(ABS([.A22]);1);ROUND(ABS([.A22]);1)))"/>
          <table:table-cell office:value-type="error" table:formula="of:=([.D22]-[.E22])"/>
          <table:table-cell office:value-type="error" table:formula="of:=IF(([.F22]&lt;&gt;0)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3])*IF(AND(ISEVEN((ABS([.A23])*10));(MOD((ABS([.A23])*10);1)&lt;=0.5));ROUNDDOWN(ABS([.A23]);1);ROUND(ABS([.A23]);1)))"/>
          <table:table-cell office:value-type="error" table:formula="of:=([.D23]-[.E23])"/>
          <table:table-cell office:value-type="error" table:formula="of:=IF(([.F23]&lt;&gt;0)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4])*IF(AND(ISEVEN((ABS([.A24])*10));(MOD((ABS([.A24])*10);1)&lt;=0.5));ROUNDDOWN(ABS([.A24]);1);ROUND(ABS([.A24]);1)))"/>
          <table:table-cell office:value-type="error" table:formula="of:=([.D24]-[.E24])"/>
          <table:table-cell office:value-type="error" table:formula="of:=IF(([.F24]&lt;&gt;0)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5])*IF(AND(ISEVEN((ABS([.A25])*10));(MOD((ABS([.A25])*10);1)&lt;=0.5));ROUNDDOWN(ABS([.A25]);1);ROUND(ABS([.A25]);1)))"/>
          <table:table-cell office:value-type="error" table:formula="of:=([.D25]-[.E25])"/>
          <table:table-cell office:value-type="error" table:formula="of:=IF(([.F25]&lt;&gt;0)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6])*IF(AND(ISEVEN((ABS([.A26])*10));(MOD((ABS([.A26])*10);1)&lt;=0.5));ROUNDDOWN(ABS([.A26]);1);ROUND(ABS([.A26]);1)))"/>
          <table:table-cell office:value-type="error" table:formula="of:=([.D26]-[.E26])"/>
          <table:table-cell office:value-type="error" table:formula="of:=IF(([.F26]&lt;&gt;0)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(SIGN([.A27])*IF(AND(ISEVEN((ABS([.A27])*10));(MOD((ABS([.A27])*10);1)&lt;=0.5));ROUNDDOWN(ABS([.A27]);1);ROUND(ABS([.A27]);1)))"/>
          <table:table-cell office:value-type="error" table:formula="of:=([.D27]-[.E27])"/>
          <table:table-cell office:value-type="error" table:formula="of:=IF(([.F27]&lt;&gt;0)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8])*IF(AND(ISEVEN((ABS([.A28])*10));(MOD((ABS([.A28])*10);1)&lt;=0.5));ROUNDDOWN(ABS([.A28]);1);ROUND(ABS([.A28]);1)))"/>
          <table:table-cell office:value-type="error" table:formula="of:=([.D28]-[.E28])"/>
          <table:table-cell office:value-type="error" table:formula="of:=IF(([.F28]&lt;&gt;0)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9])*IF(AND(ISEVEN((ABS([.A29])*10));(MOD((ABS([.A29])*10);1)&lt;=0.5));ROUNDDOWN(ABS([.A29]);1);ROUND(ABS([.A29]);1)))"/>
          <table:table-cell office:value-type="error" table:formula="of:=([.D29]-[.E29])"/>
          <table:table-cell office:value-type="error" table:formula="of:=IF(([.F29]&lt;&gt;0)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0])*IF(AND(ISEVEN((ABS([.A30])*10));(MOD((ABS([.A30])*10);1)&lt;=0.5));ROUNDDOWN(ABS([.A30]);1);ROUND(ABS([.A30]);1)))"/>
          <table:table-cell office:value-type="error" table:formula="of:=([.D30]-[.E30])"/>
          <table:table-cell office:value-type="error" table:formula="of:=IF(([.F30]&lt;&gt;0)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1])*IF(AND(ISEVEN((ABS([.A31])*10));(MOD((ABS([.A31])*10);1)&lt;=0.5));ROUNDDOWN(ABS([.A31]);1);ROUND(ABS([.A31]);1)))"/>
          <table:table-cell office:value-type="error" table:formula="of:=([.D31]-[.E31])"/>
          <table:table-cell office:value-type="error" table:formula="of:=IF(([.F31]&lt;&gt;0)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2])*IF(AND(ISEVEN((ABS([.A32])*10));(MOD((ABS([.A32])*10);1)&lt;=0.5));ROUNDDOWN(ABS([.A32]);1);ROUND(ABS([.A32]);1)))"/>
          <table:table-cell office:value-type="error" table:formula="of:=([.D32]-[.E32])"/>
          <table:table-cell office:value-type="error" table:formula="of:=IF(([.F32]&lt;&gt;0)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3])*IF(AND(ISEVEN((ABS([.A33])*10));(MOD((ABS([.A33])*10);1)&lt;=0.5));ROUNDDOWN(ABS([.A33]);1);ROUND(ABS([.A33]);1)))"/>
          <table:table-cell office:value-type="error" table:formula="of:=([.D33]-[.E33])"/>
          <table:table-cell office:value-type="error" table:formula="of:=IF(([.F33]&lt;&gt;0)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4])*IF(AND(ISEVEN((ABS([.A34])*10));(MOD((ABS([.A34])*10);1)&lt;=0.5));ROUNDDOWN(ABS([.A34]);1);ROUND(ABS([.A34]);1)))"/>
          <table:table-cell office:value-type="error" table:formula="of:=([.D34]-[.E34])"/>
          <table:table-cell office:value-type="error" table:formula="of:=IF(([.F34]&lt;&gt;0)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5])*IF(AND(ISEVEN((ABS([.A35])*10));(MOD((ABS([.A35])*10);1)&lt;=0.5));ROUNDDOWN(ABS([.A35]);1);ROUND(ABS([.A35]);1)))"/>
          <table:table-cell office:value-type="error" table:formula="of:=([.D35]-[.E35])"/>
          <table:table-cell office:value-type="error" table:formula="of:=IF(([.F35]&lt;&gt;0)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6])*IF(AND(ISEVEN((ABS([.A36])*10));(MOD((ABS([.A36])*10);1)&lt;=0.5));ROUNDDOWN(ABS([.A36]);1);ROUND(ABS([.A36]);1)))"/>
          <table:table-cell office:value-type="error" table:formula="of:=([.D36]-[.E36])"/>
          <table:table-cell office:value-type="error" table:formula="of:=IF(([.F36]&lt;&gt;0)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7])*IF(AND(ISEVEN((ABS([.A37])*10));(MOD((ABS([.A37])*10);1)&lt;=0.5));ROUNDDOWN(ABS([.A37]);1);ROUND(ABS([.A37]);1)))"/>
          <table:table-cell office:value-type="error" table:formula="of:=([.D37]-[.E37])"/>
          <table:table-cell office:value-type="error" table:formula="of:=IF(([.F37]&lt;&gt;0)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8])*IF(AND(ISEVEN((ABS([.A38])*10));(MOD((ABS([.A38])*10);1)&lt;=0.5));ROUNDDOWN(ABS([.A38]);1);ROUND(ABS([.A38]);1)))"/>
          <table:table-cell office:value-type="error" table:formula="of:=([.D38]-[.E38])"/>
          <table:table-cell office:value-type="error" table:formula="of:=IF(([.F38]&lt;&gt;0)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9])*IF(AND(ISEVEN((ABS([.A39])*10));(MOD((ABS([.A39])*10);1)&lt;=0.5));ROUNDDOWN(ABS([.A39]);1);ROUND(ABS([.A39]);1)))"/>
          <table:table-cell office:value-type="error" table:formula="of:=([.D39]-[.E39])"/>
          <table:table-cell office:value-type="error" table:formula="of:=IF(([.F39]&lt;&gt;0)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0])*IF(AND(ISEVEN((ABS([.A40])*10));(MOD((ABS([.A40])*10);1)&lt;=0.5));ROUNDDOWN(ABS([.A40]);1);ROUND(ABS([.A40]);1)))"/>
          <table:table-cell office:value-type="error" table:formula="of:=([.D40]-[.E40])"/>
          <table:table-cell office:value-type="error" table:formula="of:=IF(([.F40]&lt;&gt;0)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1])*IF(AND(ISEVEN((ABS([.A41])*10));(MOD((ABS([.A41])*10);1)&lt;=0.5));ROUNDDOWN(ABS([.A41]);1);ROUND(ABS([.A41]);1)))"/>
          <table:table-cell office:value-type="error" table:formula="of:=([.D41]-[.E41])"/>
          <table:table-cell office:value-type="error" table:formula="of:=IF(([.F41]&lt;&gt;0)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2])*IF(AND(ISEVEN((ABS([.A42])*10));(MOD((ABS([.A42])*10);1)&lt;=0.5));ROUNDDOWN(ABS([.A42]);1);ROUND(ABS([.A42]);1)))"/>
          <table:table-cell office:value-type="error" table:formula="of:=([.D42]-[.E42])"/>
          <table:table-cell office:value-type="error" table:formula="of:=IF(([.F42]&lt;&gt;0)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3])*IF(AND(ISEVEN((ABS([.A43])*10));(MOD((ABS([.A43])*10);1)&lt;=0.5));ROUNDDOWN(ABS([.A43]);1);ROUND(ABS([.A43]);1)))"/>
          <table:table-cell office:value-type="error" table:formula="of:=([.D43]-[.E43])"/>
          <table:table-cell office:value-type="error" table:formula="of:=IF(([.F43]&lt;&gt;0)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4])*IF(AND(ISEVEN((ABS([.A44])*10));(MOD((ABS([.A44])*10);1)&lt;=0.5));ROUNDDOWN(ABS([.A44]);1);ROUND(ABS([.A44]);1)))"/>
          <table:table-cell office:value-type="error" table:formula="of:=([.D44]-[.E44])"/>
          <table:table-cell office:value-type="error" table:formula="of:=IF(([.F44]&lt;&gt;0)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5])*IF(AND(ISEVEN((ABS([.A45])*10));(MOD((ABS([.A45])*10);1)&lt;=0.5));ROUNDDOWN(ABS([.A45]);1);ROUND(ABS([.A45]);1)))"/>
          <table:table-cell office:value-type="error" table:formula="of:=([.D45]-[.E45])"/>
          <table:table-cell office:value-type="error" table:formula="of:=IF(([.F45]&lt;&gt;0)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6])*IF(AND(ISEVEN((ABS([.A46])*10));(MOD((ABS([.A46])*10);1)&lt;=0.5));ROUNDDOWN(ABS([.A46]);1);ROUND(ABS([.A46]);1)))"/>
          <table:table-cell office:value-type="error" table:formula="of:=([.D46]-[.E46])"/>
          <table:table-cell office:value-type="error" table:formula="of:=IF(([.F46]&lt;&gt;0)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(SIGN([.A47])*IF(AND(ISEVEN((ABS([.A47])*10));(MOD((ABS([.A47])*10);1)&lt;=0.5));ROUNDDOWN(ABS([.A47]);1);ROUND(ABS([.A47]);1)))"/>
          <table:table-cell office:value-type="error" table:formula="of:=([.D47]-[.E47])"/>
          <table:table-cell office:value-type="error" table:formula="of:=IF(([.F47]&lt;&gt;0)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8])*IF(AND(ISEVEN((ABS([.A48])*10));(MOD((ABS([.A48])*10);1)&lt;=0.5));ROUNDDOWN(ABS([.A48]);1);ROUND(ABS([.A48]);1)))"/>
          <table:table-cell office:value-type="error" table:formula="of:=([.D48]-[.E48])"/>
          <table:table-cell office:value-type="error" table:formula="of:=IF(([.F48]&lt;&gt;0)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9])*IF(AND(ISEVEN((ABS([.A49])*10));(MOD((ABS([.A49])*10);1)&lt;=0.5));ROUNDDOWN(ABS([.A49]);1);ROUND(ABS([.A49]);1)))"/>
          <table:table-cell office:value-type="error" table:formula="of:=([.D49]-[.E49])"/>
          <table:table-cell office:value-type="error" table:formula="of:=IF(([.F49]&lt;&gt;0)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0])*IF(AND(ISEVEN((ABS([.A50])*10));(MOD((ABS([.A50])*10);1)&lt;=0.5));ROUNDDOWN(ABS([.A50]);1);ROUND(ABS([.A50]);1)))"/>
          <table:table-cell office:value-type="error" table:formula="of:=([.D50]-[.E50])"/>
          <table:table-cell office:value-type="error" table:formula="of:=IF(([.F50]&lt;&gt;0)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1])*IF(AND(ISEVEN((ABS([.A51])*10));(MOD((ABS([.A51])*10);1)&lt;=0.5));ROUNDDOWN(ABS([.A51]);1);ROUND(ABS([.A51]);1)))"/>
          <table:table-cell office:value-type="error" table:formula="of:=([.D51]-[.E51])"/>
          <table:table-cell office:value-type="error" table:formula="of:=IF(([.F51]&lt;&gt;0)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2])*IF(AND(ISEVEN((ABS([.A52])*10));(MOD((ABS([.A52])*10);1)&lt;=0.5));ROUNDDOWN(ABS([.A52]);1);ROUND(ABS([.A52]);1)))"/>
          <table:table-cell office:value-type="error" table:formula="of:=([.D52]-[.E52])"/>
          <table:table-cell office:value-type="error" table:formula="of:=IF(([.F52]&lt;&gt;0)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3])*IF(AND(ISEVEN((ABS([.A53])*10));(MOD((ABS([.A53])*10);1)&lt;=0.5));ROUNDDOWN(ABS([.A53]);1);ROUND(ABS([.A53]);1)))"/>
          <table:table-cell office:value-type="error" table:formula="of:=([.D53]-[.E53])"/>
          <table:table-cell office:value-type="error" table:formula="of:=IF(([.F53]&lt;&gt;0)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4])*IF(AND(ISEVEN((ABS([.A54])*10));(MOD((ABS([.A54])*10);1)&lt;=0.5));ROUNDDOWN(ABS([.A54]);1);ROUND(ABS([.A54]);1)))"/>
          <table:table-cell office:value-type="error" table:formula="of:=([.D54]-[.E54])"/>
          <table:table-cell office:value-type="error" table:formula="of:=IF(([.F54]&lt;&gt;0)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5])*IF(AND(ISEVEN((ABS([.A55])*10));(MOD((ABS([.A55])*10);1)&lt;=0.5));ROUNDDOWN(ABS([.A55]);1);ROUND(ABS([.A55]);1)))"/>
          <table:table-cell office:value-type="error" table:formula="of:=([.D55]-[.E55])"/>
          <table:table-cell office:value-type="error" table:formula="of:=IF(([.F55]&lt;&gt;0)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6])*IF(AND(ISEVEN((ABS([.A56])*10));(MOD((ABS([.A56])*10);1)&lt;=0.5));ROUNDDOWN(ABS([.A56]);1);ROUND(ABS([.A56]);1)))"/>
          <table:table-cell office:value-type="error" table:formula="of:=([.D56]-[.E56])"/>
          <table:table-cell office:value-type="error" table:formula="of:=IF(([.F56]&lt;&gt;0)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(SIGN([.A57])*IF(AND(ISEVEN((ABS([.A57])*10));(MOD((ABS([.A57])*10);1)&lt;=0.5));ROUNDDOWN(ABS([.A57]);1);ROUND(ABS([.A57]);1)))"/>
          <table:table-cell office:value-type="error" table:formula="of:=([.D57]-[.E57])"/>
          <table:table-cell office:value-type="error" table:formula="of:=IF(([.F57]&lt;&gt;0)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8])*IF(AND(ISEVEN((ABS([.A58])*10));(MOD((ABS([.A58])*10);1)&lt;=0.5));ROUNDDOWN(ABS([.A58]);1);ROUND(ABS([.A58]);1)))"/>
          <table:table-cell office:value-type="error" table:formula="of:=([.D58]-[.E58])"/>
          <table:table-cell office:value-type="error" table:formula="of:=IF(([.F58]&lt;&gt;0)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9])*IF(AND(ISEVEN((ABS([.A59])*10));(MOD((ABS([.A59])*10);1)&lt;=0.5));ROUNDDOWN(ABS([.A59]);1);ROUND(ABS([.A59]);1)))"/>
          <table:table-cell office:value-type="error" table:formula="of:=([.D59]-[.E59])"/>
          <table:table-cell office:value-type="error" table:formula="of:=IF(([.F59]&lt;&gt;0)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0])*IF(AND(ISEVEN((ABS([.A60])*10));(MOD((ABS([.A60])*10);1)&lt;=0.5));ROUNDDOWN(ABS([.A60]);1);ROUND(ABS([.A60]);1)))"/>
          <table:table-cell office:value-type="error" table:formula="of:=([.D60]-[.E60])"/>
          <table:table-cell office:value-type="error" table:formula="of:=IF(([.F60]&lt;&gt;0)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1])*IF(AND(ISEVEN((ABS([.A61])*10));(MOD((ABS([.A61])*10);1)&lt;=0.5));ROUNDDOWN(ABS([.A61]);1);ROUND(ABS([.A61]);1)))"/>
          <table:table-cell office:value-type="error" table:formula="of:=([.D61]-[.E61])"/>
          <table:table-cell office:value-type="error" table:formula="of:=IF(([.F61]&lt;&gt;0)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2])*IF(AND(ISEVEN((ABS([.A62])*10));(MOD((ABS([.A62])*10);1)&lt;=0.5));ROUNDDOWN(ABS([.A62]);1);ROUND(ABS([.A62]);1)))"/>
          <table:table-cell office:value-type="error" table:formula="of:=([.D62]-[.E62])"/>
          <table:table-cell office:value-type="error" table:formula="of:=IF(([.F62]&lt;&gt;0)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3])*IF(AND(ISEVEN((ABS([.A63])*10));(MOD((ABS([.A63])*10);1)&lt;=0.5));ROUNDDOWN(ABS([.A63]);1);ROUND(ABS([.A63]);1)))"/>
          <table:table-cell office:value-type="error" table:formula="of:=([.D63]-[.E63])"/>
          <table:table-cell office:value-type="error" table:formula="of:=IF(([.F63]&lt;&gt;0)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4])*IF(AND(ISEVEN((ABS([.A64])*10));(MOD((ABS([.A64])*10);1)&lt;=0.5));ROUNDDOWN(ABS([.A64]);1);ROUND(ABS([.A64]);1)))"/>
          <table:table-cell office:value-type="error" table:formula="of:=([.D64]-[.E64])"/>
          <table:table-cell office:value-type="error" table:formula="of:=IF(([.F64]&lt;&gt;0)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5])*IF(AND(ISEVEN((ABS([.A65])*10));(MOD((ABS([.A65])*10);1)&lt;=0.5));ROUNDDOWN(ABS([.A65]);1);ROUND(ABS([.A65]);1)))"/>
          <table:table-cell office:value-type="error" table:formula="of:=([.D65]-[.E65])"/>
          <table:table-cell office:value-type="error" table:formula="of:=IF(([.F65]&lt;&gt;0)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6])*IF(AND(ISEVEN((ABS([.A66])*10));(MOD((ABS([.A66])*10);1)&lt;=0.5));ROUNDDOWN(ABS([.A66]);1);ROUND(ABS([.A66]);1)))"/>
          <table:table-cell office:value-type="error" table:formula="of:=([.D66]-[.E66])"/>
          <table:table-cell office:value-type="error" table:formula="of:=IF(([.F66]&lt;&gt;0)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(SIGN([.A67])*IF(AND(ISEVEN((ABS([.A67])*10));(MOD((ABS([.A67])*10);1)&lt;=0.5));ROUNDDOWN(ABS([.A67]);1);ROUND(ABS([.A67]);1)))"/>
          <table:table-cell office:value-type="error" table:formula="of:=([.D67]-[.E67])"/>
          <table:table-cell office:value-type="error" table:formula="of:=IF(([.F67]&lt;&gt;0)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8])*IF(AND(ISEVEN((ABS([.A68])*10));(MOD((ABS([.A68])*10);1)&lt;=0.5));ROUNDDOWN(ABS([.A68]);1);ROUND(ABS([.A68]);1)))"/>
          <table:table-cell office:value-type="error" table:formula="of:=([.D68]-[.E68])"/>
          <table:table-cell office:value-type="error" table:formula="of:=IF(([.F68]&lt;&gt;0)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9])*IF(AND(ISEVEN((ABS([.A69])*10));(MOD((ABS([.A69])*10);1)&lt;=0.5));ROUNDDOWN(ABS([.A69]);1);ROUND(ABS([.A69]);1)))"/>
          <table:table-cell office:value-type="error" table:formula="of:=([.D69]-[.E69])"/>
          <table:table-cell office:value-type="error" table:formula="of:=IF(([.F69]&lt;&gt;0)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0])*IF(AND(ISEVEN((ABS([.A70])*10));(MOD((ABS([.A70])*10);1)&lt;=0.5));ROUNDDOWN(ABS([.A70]);1);ROUND(ABS([.A70]);1)))"/>
          <table:table-cell office:value-type="error" table:formula="of:=([.D70]-[.E70])"/>
          <table:table-cell office:value-type="error" table:formula="of:=IF(([.F70]&lt;&gt;0)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1])*IF(AND(ISEVEN((ABS([.A71])*10));(MOD((ABS([.A71])*10);1)&lt;=0.5));ROUNDDOWN(ABS([.A71]);1);ROUND(ABS([.A71]);1)))"/>
          <table:table-cell office:value-type="error" table:formula="of:=([.D71]-[.E71])"/>
          <table:table-cell office:value-type="error" table:formula="of:=IF(([.F71]&lt;&gt;0)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2])*IF(AND(ISEVEN((ABS([.A72])*10));(MOD((ABS([.A72])*10);1)&lt;=0.5));ROUNDDOWN(ABS([.A72]);1);ROUND(ABS([.A72]);1)))"/>
          <table:table-cell office:value-type="error" table:formula="of:=([.D72]-[.E72])"/>
          <table:table-cell office:value-type="error" table:formula="of:=IF(([.F72]&lt;&gt;0)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3])*IF(AND(ISEVEN((ABS([.A73])*10));(MOD((ABS([.A73])*10);1)&lt;=0.5));ROUNDDOWN(ABS([.A73]);1);ROUND(ABS([.A73]);1)))"/>
          <table:table-cell office:value-type="error" table:formula="of:=([.D73]-[.E73])"/>
          <table:table-cell office:value-type="error" table:formula="of:=IF(([.F73]&lt;&gt;0)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4])*IF(AND(ISEVEN((ABS([.A74])*10));(MOD((ABS([.A74])*10);1)&lt;=0.5));ROUNDDOWN(ABS([.A74]);1);ROUND(ABS([.A74]);1)))"/>
          <table:table-cell office:value-type="error" table:formula="of:=([.D74]-[.E74])"/>
          <table:table-cell office:value-type="error" table:formula="of:=IF(([.F74]&lt;&gt;0)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5])*IF(AND(ISEVEN((ABS([.A75])*10));(MOD((ABS([.A75])*10);1)&lt;=0.5));ROUNDDOWN(ABS([.A75]);1);ROUND(ABS([.A75]);1)))"/>
          <table:table-cell office:value-type="error" table:formula="of:=([.D75]-[.E75])"/>
          <table:table-cell office:value-type="error" table:formula="of:=IF(([.F75]&lt;&gt;0)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6])*IF(AND(ISEVEN((ABS([.A76])*10));(MOD((ABS([.A76])*10);1)&lt;=0.5));ROUNDDOWN(ABS([.A76]);1);ROUND(ABS([.A76]);1)))"/>
          <table:table-cell office:value-type="error" table:formula="of:=([.D76]-[.E76])"/>
          <table:table-cell office:value-type="error" table:formula="of:=IF(([.F76]&lt;&gt;0)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(SIGN([.A77])*IF(AND(ISEVEN((ABS([.A77])*10));(MOD((ABS([.A77])*10);1)&lt;=0.5));ROUNDDOWN(ABS([.A77]);1);ROUND(ABS([.A77]);1)))"/>
          <table:table-cell office:value-type="error" table:formula="of:=([.D77]-[.E77])"/>
          <table:table-cell office:value-type="error" table:formula="of:=IF(([.F77]&lt;&gt;0)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8])*IF(AND(ISEVEN((ABS([.A78])*10));(MOD((ABS([.A78])*10);1)&lt;=0.5));ROUNDDOWN(ABS([.A78]);1);ROUND(ABS([.A78]);1)))"/>
          <table:table-cell office:value-type="error" table:formula="of:=([.D78]-[.E78])"/>
          <table:table-cell office:value-type="error" table:formula="of:=IF(([.F78]&lt;&gt;0)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9])*IF(AND(ISEVEN((ABS([.A79])*10));(MOD((ABS([.A79])*10);1)&lt;=0.5));ROUNDDOWN(ABS([.A79]);1);ROUND(ABS([.A79]);1)))"/>
          <table:table-cell office:value-type="error" table:formula="of:=([.D79]-[.E79])"/>
          <table:table-cell office:value-type="error" table:formula="of:=IF(([.F79]&lt;&gt;0)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0])*IF(AND(ISEVEN((ABS([.A80])*10));(MOD((ABS([.A80])*10);1)&lt;=0.5));ROUNDDOWN(ABS([.A80]);1);ROUND(ABS([.A80]);1)))"/>
          <table:table-cell office:value-type="error" table:formula="of:=([.D80]-[.E80])"/>
          <table:table-cell office:value-type="error" table:formula="of:=IF(([.F80]&lt;&gt;0)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1])*IF(AND(ISEVEN((ABS([.A81])*10));(MOD((ABS([.A81])*10);1)&lt;=0.5));ROUNDDOWN(ABS([.A81]);1);ROUND(ABS([.A81]);1)))"/>
          <table:table-cell office:value-type="error" table:formula="of:=([.D81]-[.E81])"/>
          <table:table-cell office:value-type="error" table:formula="of:=IF(([.F81]&lt;&gt;0)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2])*IF(AND(ISEVEN((ABS([.A82])*10));(MOD((ABS([.A82])*10);1)&lt;=0.5));ROUNDDOWN(ABS([.A82]);1);ROUND(ABS([.A82]);1)))"/>
          <table:table-cell office:value-type="error" table:formula="of:=([.D82]-[.E82])"/>
          <table:table-cell office:value-type="error" table:formula="of:=IF(([.F82]&lt;&gt;0)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3])*IF(AND(ISEVEN((ABS([.A83])*10));(MOD((ABS([.A83])*10);1)&lt;=0.5));ROUNDDOWN(ABS([.A83]);1);ROUND(ABS([.A83]);1)))"/>
          <table:table-cell office:value-type="error" table:formula="of:=([.D83]-[.E83])"/>
          <table:table-cell office:value-type="error" table:formula="of:=IF(([.F83]&lt;&gt;0)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4])*IF(AND(ISEVEN((ABS([.A84])*10));(MOD((ABS([.A84])*10);1)&lt;=0.5));ROUNDDOWN(ABS([.A84]);1);ROUND(ABS([.A84]);1)))"/>
          <table:table-cell office:value-type="error" table:formula="of:=([.D84]-[.E84])"/>
          <table:table-cell office:value-type="error" table:formula="of:=IF(([.F84]&lt;&gt;0)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5])*IF(AND(ISEVEN((ABS([.A85])*10));(MOD((ABS([.A85])*10);1)&lt;=0.5));ROUNDDOWN(ABS([.A85]);1);ROUND(ABS([.A85]);1)))"/>
          <table:table-cell office:value-type="error" table:formula="of:=([.D85]-[.E85])"/>
          <table:table-cell office:value-type="error" table:formula="of:=IF(([.F85]&lt;&gt;0)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6])*IF(AND(ISEVEN((ABS([.A86])*10));(MOD((ABS([.A86])*10);1)&lt;=0.5));ROUNDDOWN(ABS([.A86]);1);ROUND(ABS([.A86]);1)))"/>
          <table:table-cell office:value-type="error" table:formula="of:=([.D86]-[.E86])"/>
          <table:table-cell office:value-type="error" table:formula="of:=IF(([.F86]&lt;&gt;0)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7])*IF(AND(ISEVEN((ABS([.A87])*10));(MOD((ABS([.A87])*10);1)&lt;=0.5));ROUNDDOWN(ABS([.A87]);1);ROUND(ABS([.A87]);1)))"/>
          <table:table-cell office:value-type="error" table:formula="of:=([.D87]-[.E87])"/>
          <table:table-cell office:value-type="error" table:formula="of:=IF(([.F87]&lt;&gt;0)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8])*IF(AND(ISEVEN((ABS([.A88])*10));(MOD((ABS([.A88])*10);1)&lt;=0.5));ROUNDDOWN(ABS([.A88]);1);ROUND(ABS([.A88]);1)))"/>
          <table:table-cell office:value-type="error" table:formula="of:=([.D88]-[.E88])"/>
          <table:table-cell office:value-type="error" table:formula="of:=IF(([.F88]&lt;&gt;0)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9])*IF(AND(ISEVEN((ABS([.A89])*10));(MOD((ABS([.A89])*10);1)&lt;=0.5));ROUNDDOWN(ABS([.A89]);1);ROUND(ABS([.A89]);1)))"/>
          <table:table-cell office:value-type="error" table:formula="of:=([.D89]-[.E89])"/>
          <table:table-cell office:value-type="error" table:formula="of:=IF(([.F89]&lt;&gt;0)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0])*IF(AND(ISEVEN((ABS([.A90])*10));(MOD((ABS([.A90])*10);1)&lt;=0.5));ROUNDDOWN(ABS([.A90]);1);ROUND(ABS([.A90]);1)))"/>
          <table:table-cell office:value-type="error" table:formula="of:=([.D90]-[.E90])"/>
          <table:table-cell office:value-type="error" table:formula="of:=IF(([.F90]&lt;&gt;0)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1])*IF(AND(ISEVEN((ABS([.A91])*10));(MOD((ABS([.A91])*10);1)&lt;=0.5));ROUNDDOWN(ABS([.A91]);1);ROUND(ABS([.A91]);1)))"/>
          <table:table-cell office:value-type="error" table:formula="of:=([.D91]-[.E91])"/>
          <table:table-cell office:value-type="error" table:formula="of:=IF(([.F91]&lt;&gt;0)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2])*IF(AND(ISEVEN((ABS([.A92])*10));(MOD((ABS([.A92])*10);1)&lt;=0.5));ROUNDDOWN(ABS([.A92]);1);ROUND(ABS([.A92]);1)))"/>
          <table:table-cell office:value-type="error" table:formula="of:=([.D92]-[.E92])"/>
          <table:table-cell office:value-type="error" table:formula="of:=IF(([.F92]&lt;&gt;0)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3])*IF(AND(ISEVEN((ABS([.A93])*10));(MOD((ABS([.A93])*10);1)&lt;=0.5));ROUNDDOWN(ABS([.A93]);1);ROUND(ABS([.A93]);1)))"/>
          <table:table-cell office:value-type="error" table:formula="of:=([.D93]-[.E93])"/>
          <table:table-cell office:value-type="error" table:formula="of:=IF(([.F93]&lt;&gt;0)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4])*IF(AND(ISEVEN((ABS([.A94])*10));(MOD((ABS([.A94])*10);1)&lt;=0.5));ROUNDDOWN(ABS([.A94]);1);ROUND(ABS([.A94]);1)))"/>
          <table:table-cell office:value-type="error" table:formula="of:=([.D94]-[.E94])"/>
          <table:table-cell office:value-type="error" table:formula="of:=IF(([.F94]&lt;&gt;0)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5])*IF(AND(ISEVEN((ABS([.A95])*10));(MOD((ABS([.A95])*10);1)&lt;=0.5));ROUNDDOWN(ABS([.A95]);1);ROUND(ABS([.A95]);1)))"/>
          <table:table-cell office:value-type="error" table:formula="of:=([.D95]-[.E95])"/>
          <table:table-cell office:value-type="error" table:formula="of:=IF(([.F95]&lt;&gt;0)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6])*IF(AND(ISEVEN((ABS([.A96])*10));(MOD((ABS([.A96])*10);1)&lt;=0.5));ROUNDDOWN(ABS([.A96]);1);ROUND(ABS([.A96]);1)))"/>
          <table:table-cell office:value-type="error" table:formula="of:=([.D96]-[.E96])"/>
          <table:table-cell office:value-type="error" table:formula="of:=IF(([.F96]&lt;&gt;0)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(SIGN([.A97])*IF(AND(ISEVEN((ABS([.A97])*10));(MOD((ABS([.A97])*10);1)&lt;=0.5));ROUNDDOWN(ABS([.A97]);1);ROUND(ABS([.A97]);1)))"/>
          <table:table-cell office:value-type="error" table:formula="of:=([.D97]-[.E97])"/>
          <table:table-cell office:value-type="error" table:formula="of:=IF(([.F97]&lt;&gt;0)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8])*IF(AND(ISEVEN((ABS([.A98])*10));(MOD((ABS([.A98])*10);1)&lt;=0.5));ROUNDDOWN(ABS([.A98]);1);ROUND(ABS([.A98]);1)))"/>
          <table:table-cell office:value-type="error" table:formula="of:=([.D98]-[.E98])"/>
          <table:table-cell office:value-type="error" table:formula="of:=IF(([.F98]&lt;&gt;0)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9])*IF(AND(ISEVEN((ABS([.A99])*10));(MOD((ABS([.A99])*10);1)&lt;=0.5));ROUNDDOWN(ABS([.A99]);1);ROUND(ABS([.A99]);1)))"/>
          <table:table-cell office:value-type="error" table:formula="of:=([.D99]-[.E99])"/>
          <table:table-cell office:value-type="error" table:formula="of:=IF(([.F99]&lt;&gt;0)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0])*IF(AND(ISEVEN((ABS([.A100])*10));(MOD((ABS([.A100])*10);1)&lt;=0.5));ROUNDDOWN(ABS([.A100]);1);ROUND(ABS([.A100]);1)))"/>
          <table:table-cell office:value-type="error" table:formula="of:=([.D100]-[.E100])"/>
          <table:table-cell office:value-type="error" table:formula="of:=IF(([.F100]&lt;&gt;0)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1])*IF(AND(ISEVEN((ABS([.A101])*10));(MOD((ABS([.A101])*10);1)&lt;=0.5));ROUNDDOWN(ABS([.A101]);1);ROUND(ABS([.A101]);1)))"/>
          <table:table-cell office:value-type="error" table:formula="of:=([.D101]-[.E101])"/>
          <table:table-cell office:value-type="error" table:formula="of:=IF(([.F101]&lt;&gt;0)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2])*IF(AND(ISEVEN((ABS([.A102])*10));(MOD((ABS([.A102])*10);1)&lt;=0.5));ROUNDDOWN(ABS([.A102]);1);ROUND(ABS([.A102]);1)))"/>
          <table:table-cell office:value-type="error" table:formula="of:=([.D102]-[.E102])"/>
          <table:table-cell office:value-type="error" table:formula="of:=IF(([.F102]&lt;&gt;0)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3])*IF(AND(ISEVEN((ABS([.A103])*10));(MOD((ABS([.A103])*10);1)&lt;=0.5));ROUNDDOWN(ABS([.A103]);1);ROUND(ABS([.A103]);1)))"/>
          <table:table-cell office:value-type="error" table:formula="of:=([.D103]-[.E103])"/>
          <table:table-cell office:value-type="error" table:formula="of:=IF(([.F103]&lt;&gt;0)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4])*IF(AND(ISEVEN((ABS([.A104])*10));(MOD((ABS([.A104])*10);1)&lt;=0.5));ROUNDDOWN(ABS([.A104]);1);ROUND(ABS([.A104]);1)))"/>
          <table:table-cell office:value-type="error" table:formula="of:=([.D104]-[.E104])"/>
          <table:table-cell office:value-type="error" table:formula="of:=IF(([.F104]&lt;&gt;0)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5])*IF(AND(ISEVEN((ABS([.A105])*10));(MOD((ABS([.A105])*10);1)&lt;=0.5));ROUNDDOWN(ABS([.A105]);1);ROUND(ABS([.A105]);1)))"/>
          <table:table-cell office:value-type="error" table:formula="of:=([.D105]-[.E105])"/>
          <table:table-cell office:value-type="error" table:formula="of:=IF(([.F105]&lt;&gt;0)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6])*IF(AND(ISEVEN((ABS([.A106])*10));(MOD((ABS([.A106])*10);1)&lt;=0.5));ROUNDDOWN(ABS([.A106]);1);ROUND(ABS([.A106]);1)))"/>
          <table:table-cell office:value-type="error" table:formula="of:=([.D106]-[.E106])"/>
          <table:table-cell office:value-type="error" table:formula="of:=IF(([.F106]&lt;&gt;0)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(SIGN([.A107])*IF(AND(ISEVEN((ABS([.A107])*10));(MOD((ABS([.A107])*10);1)&lt;=0.5));ROUNDDOWN(ABS([.A107]);1);ROUND(ABS([.A107]);1)))"/>
          <table:table-cell office:value-type="error" table:formula="of:=([.D107]-[.E107])"/>
          <table:table-cell office:value-type="error" table:formula="of:=IF(([.F107]&lt;&gt;0)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8])*IF(AND(ISEVEN((ABS([.A108])*10));(MOD((ABS([.A108])*10);1)&lt;=0.5));ROUNDDOWN(ABS([.A108]);1);ROUND(ABS([.A108]);1)))"/>
          <table:table-cell office:value-type="error" table:formula="of:=([.D108]-[.E108])"/>
          <table:table-cell office:value-type="error" table:formula="of:=IF(([.F108]&lt;&gt;0)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9])*IF(AND(ISEVEN((ABS([.A109])*10));(MOD((ABS([.A109])*10);1)&lt;=0.5));ROUNDDOWN(ABS([.A109]);1);ROUND(ABS([.A109]);1)))"/>
          <table:table-cell office:value-type="error" table:formula="of:=([.D109]-[.E109])"/>
          <table:table-cell office:value-type="error" table:formula="of:=IF(([.F109]&lt;&gt;0)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0])*IF(AND(ISEVEN((ABS([.A110])*10));(MOD((ABS([.A110])*10);1)&lt;=0.5));ROUNDDOWN(ABS([.A110]);1);ROUND(ABS([.A110]);1)))"/>
          <table:table-cell office:value-type="error" table:formula="of:=([.D110]-[.E110])"/>
          <table:table-cell office:value-type="error" table:formula="of:=IF(([.F110]&lt;&gt;0)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1])*IF(AND(ISEVEN((ABS([.A111])*10));(MOD((ABS([.A111])*10);1)&lt;=0.5));ROUNDDOWN(ABS([.A111]);1);ROUND(ABS([.A111]);1)))"/>
          <table:table-cell office:value-type="error" table:formula="of:=([.D111]-[.E111])"/>
          <table:table-cell office:value-type="error" table:formula="of:=IF(([.F111]&lt;&gt;0)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2])*IF(AND(ISEVEN((ABS([.A112])*10));(MOD((ABS([.A112])*10);1)&lt;=0.5));ROUNDDOWN(ABS([.A112]);1);ROUND(ABS([.A112]);1)))"/>
          <table:table-cell office:value-type="error" table:formula="of:=([.D112]-[.E112])"/>
          <table:table-cell office:value-type="error" table:formula="of:=IF(([.F112]&lt;&gt;0)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3])*IF(AND(ISEVEN((ABS([.A113])*10));(MOD((ABS([.A113])*10);1)&lt;=0.5));ROUNDDOWN(ABS([.A113]);1);ROUND(ABS([.A113]);1)))"/>
          <table:table-cell office:value-type="error" table:formula="of:=([.D113]-[.E113])"/>
          <table:table-cell office:value-type="error" table:formula="of:=IF(([.F113]&lt;&gt;0)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4])*IF(AND(ISEVEN((ABS([.A114])*10));(MOD((ABS([.A114])*10);1)&lt;=0.5));ROUNDDOWN(ABS([.A114]);1);ROUND(ABS([.A114]);1)))"/>
          <table:table-cell office:value-type="error" table:formula="of:=([.D114]-[.E114])"/>
          <table:table-cell office:value-type="error" table:formula="of:=IF(([.F114]&lt;&gt;0)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5])*IF(AND(ISEVEN((ABS([.A115])*10));(MOD((ABS([.A115])*10);1)&lt;=0.5));ROUNDDOWN(ABS([.A115]);1);ROUND(ABS([.A115]);1)))"/>
          <table:table-cell office:value-type="error" table:formula="of:=([.D115]-[.E115])"/>
          <table:table-cell office:value-type="error" table:formula="of:=IF(([.F115]&lt;&gt;0)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6])*IF(AND(ISEVEN((ABS([.A116])*10));(MOD((ABS([.A116])*10);1)&lt;=0.5));ROUNDDOWN(ABS([.A116]);1);ROUND(ABS([.A116]);1)))"/>
          <table:table-cell office:value-type="error" table:formula="of:=([.D116]-[.E116])"/>
          <table:table-cell office:value-type="error" table:formula="of:=IF(([.F116]&lt;&gt;0)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7])*IF(AND(ISEVEN((ABS([.A117])*10));(MOD((ABS([.A117])*10);1)&lt;=0.5));ROUNDDOWN(ABS([.A117]);1);ROUND(ABS([.A117]);1)))"/>
          <table:table-cell office:value-type="error" table:formula="of:=([.D117]-[.E117])"/>
          <table:table-cell office:value-type="error" table:formula="of:=IF(([.F117]&lt;&gt;0)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8])*IF(AND(ISEVEN((ABS([.A118])*10));(MOD((ABS([.A118])*10);1)&lt;=0.5));ROUNDDOWN(ABS([.A118]);1);ROUND(ABS([.A118]);1)))"/>
          <table:table-cell office:value-type="error" table:formula="of:=([.D118]-[.E118])"/>
          <table:table-cell office:value-type="error" table:formula="of:=IF(([.F118]&lt;&gt;0)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9])*IF(AND(ISEVEN((ABS([.A119])*10));(MOD((ABS([.A119])*10);1)&lt;=0.5));ROUNDDOWN(ABS([.A119]);1);ROUND(ABS([.A119]);1)))"/>
          <table:table-cell office:value-type="error" table:formula="of:=([.D119]-[.E119])"/>
          <table:table-cell office:value-type="error" table:formula="of:=IF(([.F119]&lt;&gt;0)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0])*IF(AND(ISEVEN((ABS([.A120])*10));(MOD((ABS([.A120])*10);1)&lt;=0.5));ROUNDDOWN(ABS([.A120]);1);ROUND(ABS([.A120]);1)))"/>
          <table:table-cell office:value-type="error" table:formula="of:=([.D120]-[.E120])"/>
          <table:table-cell office:value-type="error" table:formula="of:=IF(([.F120]&lt;&gt;0)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1])*IF(AND(ISEVEN((ABS([.A121])*10));(MOD((ABS([.A121])*10);1)&lt;=0.5));ROUNDDOWN(ABS([.A121]);1);ROUND(ABS([.A121]);1)))"/>
          <table:table-cell office:value-type="error" table:formula="of:=([.D121]-[.E121])"/>
          <table:table-cell office:value-type="error" table:formula="of:=IF(([.F121]&lt;&gt;0)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2])*IF(AND(ISEVEN((ABS([.A122])*10));(MOD((ABS([.A122])*10);1)&lt;=0.5));ROUNDDOWN(ABS([.A122]);1);ROUND(ABS([.A122]);1)))"/>
          <table:table-cell office:value-type="error" table:formula="of:=([.D122]-[.E122])"/>
          <table:table-cell office:value-type="error" table:formula="of:=IF(([.F122]&lt;&gt;0)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Pink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19">
            <text:p>19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(SUBTOTAL(102;[.D2:.D101])&gt;0)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2">
      <number:number number:decimal-places="3" number:min-decimal-places="3" number:min-integer-digits="1"/>
    </number:number-style>
    <number:percentage-style style:name="auto14">
      <number:number number:decimal-places="1" number:min-decimal-places="1" number:min-integer-digits="1"/>
      <number:text> %</number:text>
    </number:percentage-style>
    <number:percentage-style style:name="auto16">
      <number:number number:decimal-places="2" number:min-decimal-places="2" number:min-integer-digits="1"/>
      <number:text> %</number:text>
    </number:percentage-style>
    <number:number-style style:name="auto40">
      <number:number number:decimal-places="0" number:min-decimal-places="0" number:min-integer-digits="1"/>
    </number:number-style>
    <number:number-style style:name="auto42">
      <number:number number:decimal-places="2" number:min-decimal-places="2" number:min-integer-digits="1"/>
    </number:number-style>
    <number:number-style style:name="auto44">
      <number:number number:decimal-places="4" number:min-decimal-places="4" number:min-integer-digits="1"/>
    </number:number-style>
    <number:number-style style:name="auto46">
      <number:number number:decimal-places="5" number:min-decimal-places="5" number:min-integer-digits="1"/>
    </number:number-style>
    <number:percentage-style style:name="auto48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5T14:29:00</meta:creation-date>
    <dc:date>2026-07-15T14:29:00</dc:date>
  </office:meta>
</office:document-meta>
</file>