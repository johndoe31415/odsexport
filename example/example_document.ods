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/>
  <office:automatic-styles>
    <style:style style:name="cond0_0" style:display-name="cond0_0" style:family="table-cell" style:data-style-name="auto0">
      <style:map style:apply-style-name="glbl1" style:condition="is-true-formula([.$A1]&lt;-10)" style:base-cell-address="'Conditional Multi-Format'.A1"/>
      <style:map style:apply-style-name="glbl2" style:condition="is-true-formula([.$A1]&gt;10)" style:base-cell-address="'Conditional Multi-Format'.A1"/>
    </style:style>
    <style:style style:name="dr" style:display-name="dr" style:family="table-row"/>
    <style:style style:name="dc" style:display-name="dc" style:family="table-column"/>
  </office:automatic-styles>
  <office:body>
    <office:spreadsheet>
      <table:table table:name="Conditional Multi-Format">
        <table:table-column/>
        <table:table-column/>
        <table:table-row>
          <table:table-cell table:style-name="cond0_0" office:value-type="float" office:value="0.0">
            <text:p>0.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number:number-style style:name="auto0">
      <number:number number:decimal-places="1" number:min-decimal-places="1" number:min-integer-digits="1"/>
    </number:number-style>
    <style:style style:name="glbl1" style:display-name="glbl1" style:family="table-cell">
      <style:table-cell-properties fo:background-color="#ff0000"/>
      <style:text-properties/>
    </style:style>
    <style:style style:name="glbl2" style:display-name="glbl2" style:family="table-cell">
      <style:table-cell-properties fo:background-color="#00ff00"/>
      <style:text-properties/>
    </style: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1.1rc0</meta:generator>
    <meta:creation-date>2026-07-17T10:21:02</meta:creation-date>
    <dc:date>2026-07-17T10:21:02</dc:date>
  </office:meta>
</office:document-meta>
</file>