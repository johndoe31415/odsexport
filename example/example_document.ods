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" style:display-name="cond3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dr" style:display-name="dr" style:family="table-row"/>
    <style:style style:name="dc" style:display-name="dc" style:family="table-column"/>
    <style:style style:name="auto10" style:display-name="auto10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1" style:display-name="auto11" style:family="table-cell">
      <style:text-properties fo:font-weight="bold"/>
    </style:style>
    <style:style style:name="auto12" style:display-name="auto12" style:family="table-cell">
      <style:text-properties fo:font-style="italic"/>
    </style:style>
    <style:style style:name="auto13" style:display-name="auto13" style:family="table-cell">
      <style:paragraph-properties fo:text-align="start"/>
      <style:text-properties/>
    </style:style>
    <style:style style:name="auto14" style:display-name="auto14" style:family="table-cell">
      <style:paragraph-properties fo:text-align="center"/>
      <style:text-properties/>
    </style:style>
    <style:style style:name="auto15" style:display-name="auto15" style:family="table-cell">
      <style:paragraph-properties fo:text-align="end"/>
      <style:text-properties/>
    </style:style>
    <style:style style:name="auto16" style:display-name="auto16" style:family="table-cell">
      <style:text-properties fo:color="#0000ff"/>
    </style:style>
    <style:style style:name="auto17" style:display-name="auto17" style:family="table-cell">
      <style:table-cell-properties fo:background-color="#aaaaff"/>
      <style:text-properties/>
    </style:style>
    <style:style style:name="auto18" style:display-name="auto18" style:family="table-cell">
      <style:table-cell-properties fo:border-top="0.7500pt solid #ff0000" fo:border-left="0.7500pt solid #ff0000"/>
      <style:text-properties/>
    </style:style>
    <style:style style:name="auto19" style:display-name="auto19" style:family="table-cell">
      <style:table-cell-properties fo:border-top="0.7500pt solid #ff0000"/>
      <style:text-properties/>
    </style:style>
    <style:style style:name="auto20" style:display-name="auto20" style:family="table-cell">
      <style:table-cell-properties fo:border-top="0.7500pt solid #ff0000" fo:border-right="0.7500pt solid #ff0000"/>
      <style:text-properties/>
    </style:style>
    <style:style style:name="auto21" style:display-name="auto21" style:family="table-cell">
      <style:table-cell-properties fo:border-left="0.7500pt solid #ff0000"/>
      <style:text-properties/>
    </style:style>
    <style:style style:name="auto22" style:display-name="auto22" style:family="table-cell">
      <style:table-cell-properties fo:border-right="0.7500pt solid #ff0000"/>
      <style:text-properties/>
    </style:style>
    <style:style style:name="auto23" style:display-name="auto23" style:family="table-cell">
      <style:table-cell-properties fo:border-bottom="0.7500pt solid #ff0000" fo:border-left="0.7500pt solid #ff0000"/>
      <style:text-properties/>
    </style:style>
    <style:style style:name="auto24" style:display-name="auto24" style:family="table-cell">
      <style:table-cell-properties fo:border-bottom="0.7500pt solid #ff0000"/>
      <style:text-properties/>
    </style:style>
    <style:style style:name="auto25" style:display-name="auto25" style:family="table-cell">
      <style:table-cell-properties fo:wrap-option="wrap" fo:border-bottom="0.7500pt solid #ff0000" fo:border-right="0.7500pt solid #ff0000"/>
      <style:text-properties/>
    </style:style>
    <style:style style:name="auto26" style:display-name="auto26" style:family="table-row">
      <style:table-row-properties style:row-height="1cm"/>
    </style:style>
    <style:style style:name="auto27" style:display-name="auto27" style:family="table-cell">
      <style:table-cell-properties style:vertical-align="middle"/>
      <style:text-properties/>
    </style:style>
    <style:style style:name="auto28" style:display-name="auto28" style:family="table-row">
      <style:table-row-properties style:row-height="2cm"/>
    </style:style>
    <style:style style:name="auto29" style:display-name="auto29" style:family="table-column">
      <style:table-column-properties style:column-width="4cm"/>
    </style:style>
    <style:style style:name="auto30" style:display-name="auto30" style:family="table-column">
      <style:table-column-properties style:column-width="5cm"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48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0" office:value-type="string">
            <text:p>Rotated Arial</text:p>
          </table:table-cell>
          <table:table-cell table:style-name="auto11" office:value-type="string">
            <text:p>Bold only</text:p>
          </table:table-cell>
          <table:table-cell table:style-name="auto12" office:value-type="string">
            <text:p>Italics only</text:p>
          </table:table-cell>
          <table:table-cell table:style-name="auto13" office:value-type="string">
            <text:p>Left adjust</text:p>
          </table:table-cell>
          <table:table-cell table:style-name="auto14" office:value-type="string">
            <text:p>Centered</text:p>
          </table:table-cell>
          <table:table-cell table:style-name="auto15" office:value-type="string">
            <text:p>Right adjust</text:p>
          </table:table-cell>
          <table:table-cell table:style-name="auto16" office:value-type="string">
            <text:p>Blue text</text:p>
          </table:table-cell>
          <table:table-cell table:style-name="auto17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8" office:value-type="string">
            <text:p>Top left corner of red box</text:p>
          </table:table-cell>
          <table:table-cell table:style-name="auto19"/>
          <table:table-cell table:style-name="auto19"/>
          <table:table-cell table:style-name="auto19"/>
          <table:table-cell table:style-name="auto19"/>
          <table:table-cell table:style-name="auto2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1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2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3"/>
          <table:table-cell table:style-name="auto24"/>
          <table:table-cell table:style-name="auto24"/>
          <table:table-cell table:style-name="auto24"/>
          <table:table-cell table:style-name="auto24"/>
          <table:table-cell table:style-name="auto25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6">
          <table:table-cell table:style-name="auto27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8">
          <table:table-cell table:style-name="auto27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29"/>
        <table:table-column table:style-name="auto30"/>
        <table:table-row>
          <table:table-cell table:style-name="auto11" office:value-type="string">
            <text:p>Imported value:</text:p>
          </table:table-cell>
          <table:table-cell office:value-type="error" table:formula="of:=['Formatting'.B15]"/>
        </table:table-row>
        <table:table-row>
          <table:table-cell table:style-name="auto11" office:value-type="string">
            <text:p>Computed value 1:</text:p>
          </table:table-cell>
          <table:table-cell office:value-type="error" table:formula="of:=([.B1]*2/3) + 123 + Pi()"/>
        </table:table-row>
        <table:table-row>
          <table:table-cell table:style-name="auto11" office:value-type="string">
            <text:p>Computed value 2:</text:p>
          </table:table-cell>
          <table:table-cell office:value-type="error" table:formula="of:=[.B2]/300"/>
        </table:table-row>
        <table:table-row>
          <table:table-cell table:style-name="auto11" office:value-type="string">
            <text:p>Rounded with 0 digits:</text:p>
          </table:table-cell>
          <table:table-cell table:style-name="auto31" office:value-type="error" table:formula="of:=[.B2]"/>
        </table:table-row>
        <table:table-row>
          <table:table-cell table:style-name="auto11" office:value-type="string">
            <text:p>Rounded with 1 digits:</text:p>
          </table:table-cell>
          <table:table-cell table:style-name="auto33" office:value-type="error" table:formula="of:=[.B2]"/>
        </table:table-row>
        <table:table-row>
          <table:table-cell table:style-name="auto11" office:value-type="string">
            <text:p>Rounded with 2 digits:</text:p>
          </table:table-cell>
          <table:table-cell table:style-name="auto35" office:value-type="error" table:formula="of:=[.B2]"/>
        </table:table-row>
        <table:table-row>
          <table:table-cell table:style-name="auto11" office:value-type="string">
            <text:p>Rounded with 3 digits:</text:p>
          </table:table-cell>
          <table:table-cell table:style-name="auto37" office:value-type="error" table:formula="of:=[.B2]"/>
        </table:table-row>
        <table:table-row>
          <table:table-cell table:style-name="auto11" office:value-type="string">
            <text:p>Rounded with 4 digits:</text:p>
          </table:table-cell>
          <table:table-cell table:style-name="auto39" office:value-type="error" table:formula="of:=[.B2]"/>
        </table:table-row>
        <table:table-row>
          <table:table-cell table:style-name="auto11" office:value-type="string">
            <text:p>Rounded with 5 digits:</text:p>
          </table:table-cell>
          <table:table-cell table:style-name="auto41" office:value-type="error" table:formula="of:=[.B2]"/>
        </table:table-row>
        <table:table-row>
          <table:table-cell table:style-name="auto11" office:value-type="string">
            <text:p>Percent with 0 digits:</text:p>
          </table:table-cell>
          <table:table-cell table:style-name="auto43" office:value-type="error" table:formula="of:=[.B3]"/>
        </table:table-row>
        <table:table-row>
          <table:table-cell table:style-name="auto11" office:value-type="string">
            <text:p>Percent with 1 digits:</text:p>
          </table:table-cell>
          <table:table-cell table:style-name="auto45" office:value-type="error" table:formula="of:=[.B3]"/>
        </table:table-row>
        <table:table-row>
          <table:table-cell table:style-name="auto11" office:value-type="string">
            <text:p>Percent with 2 digits:</text:p>
          </table:table-cell>
          <table:table-cell table:style-name="auto47" office:value-type="error" table:formula="of:=[.B3]"/>
        </table:table-row>
        <table:table-row>
          <table:table-cell table:style-name="auto11" office:value-type="string">
            <text:p>Datetime as ISO:</text:p>
          </table:table-cell>
          <table:table-cell table:style-name="auto49" office:value-type="date" office:date-value="2026-05-22T17:49:54"/>
        </table:table-row>
        <table:table-row>
          <table:table-cell table:style-name="auto11" office:value-type="string">
            <text:p>Datetime as German:</text:p>
          </table:table-cell>
          <table:table-cell table:style-name="auto51" office:value-type="date" office:date-value="2026-05-22T17:49:54"/>
        </table:table-row>
      </table:table>
      <table:table table:name="Conditional Formatting">
        <table:table-column/>
        <table:table-column table:style-name="auto53"/>
        <table:table-column table:style-name="auto29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4">
            <text:p>4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4">
            <text:p>4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4">
            <text:p>4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1">
            <text:p>1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2">
            <text:p>2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5">
            <text:p>5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3">
            <text:p>3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  <table:table-row table:style-name="auto26"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  <table:table-cell table:style-name="cond3" office:value-type="float" office:value="0">
            <text:p>0</text:p>
          </table:table-cell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[.B2]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[.B3]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[.B4]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[.B5]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[.B6]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[.B7]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[.B8]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[.B9]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[.B10]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[.B11]*4"/>
        </table:table-row>
      </table:table>
      <table:table table:name="High-level functions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error" table:formula="of:=(SIGN([.A2])*IF(AND(ISEVEN((ABS([.A2]))*10^1);MOD((ABS([.A2]))*10^1;1)&lt;=0.5);ROUNDDOWN(ABS([.A2]);1);ROUND(ABS([.A2]);1)))"/>
          <table:table-cell office:value-type="error" table:formula="of:=[.B2]-[.C2]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error" table:formula="of:=(SIGN([.A3])*IF(AND(ISEVEN((ABS([.A3]))*10^1);MOD((ABS([.A3]))*10^1;1)&lt;=0.5);ROUNDDOWN(ABS([.A3]);1);ROUND(ABS([.A3]);1)))"/>
          <table:table-cell office:value-type="error" table:formula="of:=[.B3]-[.C3]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error" table:formula="of:=(SIGN([.A4])*IF(AND(ISEVEN((ABS([.A4]))*10^1);MOD((ABS([.A4]))*10^1;1)&lt;=0.5);ROUNDDOWN(ABS([.A4]);1);ROUND(ABS([.A4]);1)))"/>
          <table:table-cell office:value-type="error" table:formula="of:=[.B4]-[.C4]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error" table:formula="of:=(SIGN([.A5])*IF(AND(ISEVEN((ABS([.A5]))*10^1);MOD((ABS([.A5]))*10^1;1)&lt;=0.5);ROUNDDOWN(ABS([.A5]);1);ROUND(ABS([.A5]);1)))"/>
          <table:table-cell office:value-type="error" table:formula="of:=[.B5]-[.C5]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error" table:formula="of:=(SIGN([.A6])*IF(AND(ISEVEN((ABS([.A6]))*10^1);MOD((ABS([.A6]))*10^1;1)&lt;=0.5);ROUNDDOWN(ABS([.A6]);1);ROUND(ABS([.A6]);1)))"/>
          <table:table-cell office:value-type="error" table:formula="of:=[.B6]-[.C6]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error" table:formula="of:=(SIGN([.A7])*IF(AND(ISEVEN((ABS([.A7]))*10^1);MOD((ABS([.A7]))*10^1;1)&lt;=0.5);ROUNDDOWN(ABS([.A7]);1);ROUND(ABS([.A7]);1)))"/>
          <table:table-cell office:value-type="error" table:formula="of:=[.B7]-[.C7]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error" table:formula="of:=(SIGN([.A8])*IF(AND(ISEVEN((ABS([.A8]))*10^1);MOD((ABS([.A8]))*10^1;1)&lt;=0.5);ROUNDDOWN(ABS([.A8]);1);ROUND(ABS([.A8]);1)))"/>
          <table:table-cell office:value-type="error" table:formula="of:=[.B8]-[.C8]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error" table:formula="of:=(SIGN([.A9])*IF(AND(ISEVEN((ABS([.A9]))*10^1);MOD((ABS([.A9]))*10^1;1)&lt;=0.5);ROUNDDOWN(ABS([.A9]);1);ROUND(ABS([.A9]);1)))"/>
          <table:table-cell office:value-type="error" table:formula="of:=[.B9]-[.C9]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error" table:formula="of:=(SIGN([.A10])*IF(AND(ISEVEN((ABS([.A10]))*10^1);MOD((ABS([.A10]))*10^1;1)&lt;=0.5);ROUNDDOWN(ABS([.A10]);1);ROUND(ABS([.A10]);1)))"/>
          <table:table-cell office:value-type="error" table:formula="of:=[.B10]-[.C10]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error" table:formula="of:=(SIGN([.A11])*IF(AND(ISEVEN((ABS([.A11]))*10^1);MOD((ABS([.A11]))*10^1;1)&lt;=0.5);ROUNDDOWN(ABS([.A11]);1);ROUND(ABS([.A11]);1)))"/>
          <table:table-cell office:value-type="error" table:formula="of:=[.B11]-[.C11]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error" table:formula="of:=(SIGN([.A12])*IF(AND(ISEVEN((ABS([.A12]))*10^1);MOD((ABS([.A12]))*10^1;1)&lt;=0.5);ROUNDDOWN(ABS([.A12]);1);ROUND(ABS([.A12]);1)))"/>
          <table:table-cell office:value-type="error" table:formula="of:=[.B12]-[.C12]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error" table:formula="of:=(SIGN([.A13])*IF(AND(ISEVEN((ABS([.A13]))*10^1);MOD((ABS([.A13]))*10^1;1)&lt;=0.5);ROUNDDOWN(ABS([.A13]);1);ROUND(ABS([.A13]);1)))"/>
          <table:table-cell office:value-type="error" table:formula="of:=[.B13]-[.C13]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error" table:formula="of:=(SIGN([.A14])*IF(AND(ISEVEN((ABS([.A14]))*10^1);MOD((ABS([.A14]))*10^1;1)&lt;=0.5);ROUNDDOWN(ABS([.A14]);1);ROUND(ABS([.A14]);1)))"/>
          <table:table-cell office:value-type="error" table:formula="of:=[.B14]-[.C14]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error" table:formula="of:=(SIGN([.A15])*IF(AND(ISEVEN((ABS([.A15]))*10^1);MOD((ABS([.A15]))*10^1;1)&lt;=0.5);ROUNDDOWN(ABS([.A15]);1);ROUND(ABS([.A15]);1)))"/>
          <table:table-cell office:value-type="error" table:formula="of:=[.B15]-[.C15]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error" table:formula="of:=(SIGN([.A16])*IF(AND(ISEVEN((ABS([.A16]))*10^1);MOD((ABS([.A16]))*10^1;1)&lt;=0.5);ROUNDDOWN(ABS([.A16]);1);ROUND(ABS([.A16]);1)))"/>
          <table:table-cell office:value-type="error" table:formula="of:=[.B16]-[.C16]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error" table:formula="of:=(SIGN([.A17])*IF(AND(ISEVEN((ABS([.A17]))*10^1);MOD((ABS([.A17]))*10^1;1)&lt;=0.5);ROUNDDOWN(ABS([.A17]);1);ROUND(ABS([.A17]);1)))"/>
          <table:table-cell office:value-type="error" table:formula="of:=[.B17]-[.C17]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error" table:formula="of:=(SIGN([.A18])*IF(AND(ISEVEN((ABS([.A18]))*10^1);MOD((ABS([.A18]))*10^1;1)&lt;=0.5);ROUNDDOWN(ABS([.A18]);1);ROUND(ABS([.A18]);1)))"/>
          <table:table-cell office:value-type="error" table:formula="of:=[.B18]-[.C18]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error" table:formula="of:=(SIGN([.A19])*IF(AND(ISEVEN((ABS([.A19]))*10^1);MOD((ABS([.A19]))*10^1;1)&lt;=0.5);ROUNDDOWN(ABS([.A19]);1);ROUND(ABS([.A19]);1)))"/>
          <table:table-cell office:value-type="error" table:formula="of:=[.B19]-[.C19]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error" table:formula="of:=(SIGN([.A20])*IF(AND(ISEVEN((ABS([.A20]))*10^1);MOD((ABS([.A20]))*10^1;1)&lt;=0.5);ROUNDDOWN(ABS([.A20]);1);ROUND(ABS([.A20]);1)))"/>
          <table:table-cell office:value-type="error" table:formula="of:=[.B20]-[.C20]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error" table:formula="of:=(SIGN([.A21])*IF(AND(ISEVEN((ABS([.A21]))*10^1);MOD((ABS([.A21]))*10^1;1)&lt;=0.5);ROUNDDOWN(ABS([.A21]);1);ROUND(ABS([.A21]);1)))"/>
          <table:table-cell office:value-type="error" table:formula="of:=[.B21]-[.C21]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error" table:formula="of:=(SIGN([.A22])*IF(AND(ISEVEN((ABS([.A22]))*10^1);MOD((ABS([.A22]))*10^1;1)&lt;=0.5);ROUNDDOWN(ABS([.A22]);1);ROUND(ABS([.A22]);1)))"/>
          <table:table-cell office:value-type="error" table:formula="of:=[.B22]-[.C22]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error" table:formula="of:=(SIGN([.A23])*IF(AND(ISEVEN((ABS([.A23]))*10^1);MOD((ABS([.A23]))*10^1;1)&lt;=0.5);ROUNDDOWN(ABS([.A23]);1);ROUND(ABS([.A23]);1)))"/>
          <table:table-cell office:value-type="error" table:formula="of:=[.B23]-[.C23]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error" table:formula="of:=(SIGN([.A24])*IF(AND(ISEVEN((ABS([.A24]))*10^1);MOD((ABS([.A24]))*10^1;1)&lt;=0.5);ROUNDDOWN(ABS([.A24]);1);ROUND(ABS([.A24]);1)))"/>
          <table:table-cell office:value-type="error" table:formula="of:=[.B24]-[.C24]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error" table:formula="of:=(SIGN([.A25])*IF(AND(ISEVEN((ABS([.A25]))*10^1);MOD((ABS([.A25]))*10^1;1)&lt;=0.5);ROUNDDOWN(ABS([.A25]);1);ROUND(ABS([.A25]);1)))"/>
          <table:table-cell office:value-type="error" table:formula="of:=[.B25]-[.C25]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error" table:formula="of:=(SIGN([.A26])*IF(AND(ISEVEN((ABS([.A26]))*10^1);MOD((ABS([.A26]))*10^1;1)&lt;=0.5);ROUNDDOWN(ABS([.A26]);1);ROUND(ABS([.A26]);1)))"/>
          <table:table-cell office:value-type="error" table:formula="of:=[.B26]-[.C26]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error" table:formula="of:=(SIGN([.A27])*IF(AND(ISEVEN((ABS([.A27]))*10^1);MOD((ABS([.A27]))*10^1;1)&lt;=0.5);ROUNDDOWN(ABS([.A27]);1);ROUND(ABS([.A27]);1)))"/>
          <table:table-cell office:value-type="error" table:formula="of:=[.B27]-[.C27]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error" table:formula="of:=(SIGN([.A28])*IF(AND(ISEVEN((ABS([.A28]))*10^1);MOD((ABS([.A28]))*10^1;1)&lt;=0.5);ROUNDDOWN(ABS([.A28]);1);ROUND(ABS([.A28]);1)))"/>
          <table:table-cell office:value-type="error" table:formula="of:=[.B28]-[.C28]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error" table:formula="of:=(SIGN([.A29])*IF(AND(ISEVEN((ABS([.A29]))*10^1);MOD((ABS([.A29]))*10^1;1)&lt;=0.5);ROUNDDOWN(ABS([.A29]);1);ROUND(ABS([.A29]);1)))"/>
          <table:table-cell office:value-type="error" table:formula="of:=[.B29]-[.C29]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error" table:formula="of:=(SIGN([.A30])*IF(AND(ISEVEN((ABS([.A30]))*10^1);MOD((ABS([.A30]))*10^1;1)&lt;=0.5);ROUNDDOWN(ABS([.A30]);1);ROUND(ABS([.A30]);1)))"/>
          <table:table-cell office:value-type="error" table:formula="of:=[.B30]-[.C30]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error" table:formula="of:=(SIGN([.A31])*IF(AND(ISEVEN((ABS([.A31]))*10^1);MOD((ABS([.A31]))*10^1;1)&lt;=0.5);ROUNDDOWN(ABS([.A31]);1);ROUND(ABS([.A31]);1)))"/>
          <table:table-cell office:value-type="error" table:formula="of:=[.B31]-[.C31]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error" table:formula="of:=(SIGN([.A32])*IF(AND(ISEVEN((ABS([.A32]))*10^1);MOD((ABS([.A32]))*10^1;1)&lt;=0.5);ROUNDDOWN(ABS([.A32]);1);ROUND(ABS([.A32]);1)))"/>
          <table:table-cell office:value-type="error" table:formula="of:=[.B32]-[.C32]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error" table:formula="of:=(SIGN([.A33])*IF(AND(ISEVEN((ABS([.A33]))*10^1);MOD((ABS([.A33]))*10^1;1)&lt;=0.5);ROUNDDOWN(ABS([.A33]);1);ROUND(ABS([.A33]);1)))"/>
          <table:table-cell office:value-type="error" table:formula="of:=[.B33]-[.C33]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error" table:formula="of:=(SIGN([.A34])*IF(AND(ISEVEN((ABS([.A34]))*10^1);MOD((ABS([.A34]))*10^1;1)&lt;=0.5);ROUNDDOWN(ABS([.A34]);1);ROUND(ABS([.A34]);1)))"/>
          <table:table-cell office:value-type="error" table:formula="of:=[.B34]-[.C34]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error" table:formula="of:=(SIGN([.A35])*IF(AND(ISEVEN((ABS([.A35]))*10^1);MOD((ABS([.A35]))*10^1;1)&lt;=0.5);ROUNDDOWN(ABS([.A35]);1);ROUND(ABS([.A35]);1)))"/>
          <table:table-cell office:value-type="error" table:formula="of:=[.B35]-[.C35]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error" table:formula="of:=(SIGN([.A36])*IF(AND(ISEVEN((ABS([.A36]))*10^1);MOD((ABS([.A36]))*10^1;1)&lt;=0.5);ROUNDDOWN(ABS([.A36]);1);ROUND(ABS([.A36]);1)))"/>
          <table:table-cell office:value-type="error" table:formula="of:=[.B36]-[.C36]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error" table:formula="of:=(SIGN([.A37])*IF(AND(ISEVEN((ABS([.A37]))*10^1);MOD((ABS([.A37]))*10^1;1)&lt;=0.5);ROUNDDOWN(ABS([.A37]);1);ROUND(ABS([.A37]);1)))"/>
          <table:table-cell office:value-type="error" table:formula="of:=[.B37]-[.C37]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error" table:formula="of:=(SIGN([.A38])*IF(AND(ISEVEN((ABS([.A38]))*10^1);MOD((ABS([.A38]))*10^1;1)&lt;=0.5);ROUNDDOWN(ABS([.A38]);1);ROUND(ABS([.A38]);1)))"/>
          <table:table-cell office:value-type="error" table:formula="of:=[.B38]-[.C38]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error" table:formula="of:=(SIGN([.A39])*IF(AND(ISEVEN((ABS([.A39]))*10^1);MOD((ABS([.A39]))*10^1;1)&lt;=0.5);ROUNDDOWN(ABS([.A39]);1);ROUND(ABS([.A39]);1)))"/>
          <table:table-cell office:value-type="error" table:formula="of:=[.B39]-[.C39]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error" table:formula="of:=(SIGN([.A40])*IF(AND(ISEVEN((ABS([.A40]))*10^1);MOD((ABS([.A40]))*10^1;1)&lt;=0.5);ROUNDDOWN(ABS([.A40]);1);ROUND(ABS([.A40]);1)))"/>
          <table:table-cell office:value-type="error" table:formula="of:=[.B40]-[.C40]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error" table:formula="of:=(SIGN([.A41])*IF(AND(ISEVEN((ABS([.A41]))*10^1);MOD((ABS([.A41]))*10^1;1)&lt;=0.5);ROUNDDOWN(ABS([.A41]);1);ROUND(ABS([.A41]);1)))"/>
          <table:table-cell office:value-type="error" table:formula="of:=[.B41]-[.C41]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error" table:formula="of:=(SIGN([.A42])*IF(AND(ISEVEN((ABS([.A42]))*10^1);MOD((ABS([.A42]))*10^1;1)&lt;=0.5);ROUNDDOWN(ABS([.A42]);1);ROUND(ABS([.A42]);1)))"/>
          <table:table-cell office:value-type="error" table:formula="of:=[.B42]-[.C42]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error" table:formula="of:=(SIGN([.A43])*IF(AND(ISEVEN((ABS([.A43]))*10^1);MOD((ABS([.A43]))*10^1;1)&lt;=0.5);ROUNDDOWN(ABS([.A43]);1);ROUND(ABS([.A43]);1)))"/>
          <table:table-cell office:value-type="error" table:formula="of:=[.B43]-[.C43]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error" table:formula="of:=(SIGN([.A44])*IF(AND(ISEVEN((ABS([.A44]))*10^1);MOD((ABS([.A44]))*10^1;1)&lt;=0.5);ROUNDDOWN(ABS([.A44]);1);ROUND(ABS([.A44]);1)))"/>
          <table:table-cell office:value-type="error" table:formula="of:=[.B44]-[.C44]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error" table:formula="of:=(SIGN([.A45])*IF(AND(ISEVEN((ABS([.A45]))*10^1);MOD((ABS([.A45]))*10^1;1)&lt;=0.5);ROUNDDOWN(ABS([.A45]);1);ROUND(ABS([.A45]);1)))"/>
          <table:table-cell office:value-type="error" table:formula="of:=[.B45]-[.C45]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error" table:formula="of:=(SIGN([.A46])*IF(AND(ISEVEN((ABS([.A46]))*10^1);MOD((ABS([.A46]))*10^1;1)&lt;=0.5);ROUNDDOWN(ABS([.A46]);1);ROUND(ABS([.A46]);1)))"/>
          <table:table-cell office:value-type="error" table:formula="of:=[.B46]-[.C46]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error" table:formula="of:=(SIGN([.A47])*IF(AND(ISEVEN((ABS([.A47]))*10^1);MOD((ABS([.A47]))*10^1;1)&lt;=0.5);ROUNDDOWN(ABS([.A47]);1);ROUND(ABS([.A47]);1)))"/>
          <table:table-cell office:value-type="error" table:formula="of:=[.B47]-[.C47]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error" table:formula="of:=(SIGN([.A48])*IF(AND(ISEVEN((ABS([.A48]))*10^1);MOD((ABS([.A48]))*10^1;1)&lt;=0.5);ROUNDDOWN(ABS([.A48]);1);ROUND(ABS([.A48]);1)))"/>
          <table:table-cell office:value-type="error" table:formula="of:=[.B48]-[.C48]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error" table:formula="of:=(SIGN([.A49])*IF(AND(ISEVEN((ABS([.A49]))*10^1);MOD((ABS([.A49]))*10^1;1)&lt;=0.5);ROUNDDOWN(ABS([.A49]);1);ROUND(ABS([.A49]);1)))"/>
          <table:table-cell office:value-type="error" table:formula="of:=[.B49]-[.C49]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error" table:formula="of:=(SIGN([.A50])*IF(AND(ISEVEN((ABS([.A50]))*10^1);MOD((ABS([.A50]))*10^1;1)&lt;=0.5);ROUNDDOWN(ABS([.A50]);1);ROUND(ABS([.A50]);1)))"/>
          <table:table-cell office:value-type="error" table:formula="of:=[.B50]-[.C50]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error" table:formula="of:=(SIGN([.A51])*IF(AND(ISEVEN((ABS([.A51]))*10^1);MOD((ABS([.A51]))*10^1;1)&lt;=0.5);ROUNDDOWN(ABS([.A51]);1);ROUND(ABS([.A51]);1)))"/>
          <table:table-cell office:value-type="error" table:formula="of:=[.B51]-[.C51]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error" table:formula="of:=(SIGN([.A52])*IF(AND(ISEVEN((ABS([.A52]))*10^1);MOD((ABS([.A52]))*10^1;1)&lt;=0.5);ROUNDDOWN(ABS([.A52]);1);ROUND(ABS([.A52]);1)))"/>
          <table:table-cell office:value-type="error" table:formula="of:=[.B52]-[.C52]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error" table:formula="of:=(SIGN([.A53])*IF(AND(ISEVEN((ABS([.A53]))*10^1);MOD((ABS([.A53]))*10^1;1)&lt;=0.5);ROUNDDOWN(ABS([.A53]);1);ROUND(ABS([.A53]);1)))"/>
          <table:table-cell office:value-type="error" table:formula="of:=[.B53]-[.C53]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error" table:formula="of:=(SIGN([.A54])*IF(AND(ISEVEN((ABS([.A54]))*10^1);MOD((ABS([.A54]))*10^1;1)&lt;=0.5);ROUNDDOWN(ABS([.A54]);1);ROUND(ABS([.A54]);1)))"/>
          <table:table-cell office:value-type="error" table:formula="of:=[.B54]-[.C54]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error" table:formula="of:=(SIGN([.A55])*IF(AND(ISEVEN((ABS([.A55]))*10^1);MOD((ABS([.A55]))*10^1;1)&lt;=0.5);ROUNDDOWN(ABS([.A55]);1);ROUND(ABS([.A55]);1)))"/>
          <table:table-cell office:value-type="error" table:formula="of:=[.B55]-[.C55]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error" table:formula="of:=(SIGN([.A56])*IF(AND(ISEVEN((ABS([.A56]))*10^1);MOD((ABS([.A56]))*10^1;1)&lt;=0.5);ROUNDDOWN(ABS([.A56]);1);ROUND(ABS([.A56]);1)))"/>
          <table:table-cell office:value-type="error" table:formula="of:=[.B56]-[.C56]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error" table:formula="of:=(SIGN([.A57])*IF(AND(ISEVEN((ABS([.A57]))*10^1);MOD((ABS([.A57]))*10^1;1)&lt;=0.5);ROUNDDOWN(ABS([.A57]);1);ROUND(ABS([.A57]);1)))"/>
          <table:table-cell office:value-type="error" table:formula="of:=[.B57]-[.C57]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error" table:formula="of:=(SIGN([.A58])*IF(AND(ISEVEN((ABS([.A58]))*10^1);MOD((ABS([.A58]))*10^1;1)&lt;=0.5);ROUNDDOWN(ABS([.A58]);1);ROUND(ABS([.A58]);1)))"/>
          <table:table-cell office:value-type="error" table:formula="of:=[.B58]-[.C58]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error" table:formula="of:=(SIGN([.A59])*IF(AND(ISEVEN((ABS([.A59]))*10^1);MOD((ABS([.A59]))*10^1;1)&lt;=0.5);ROUNDDOWN(ABS([.A59]);1);ROUND(ABS([.A59]);1)))"/>
          <table:table-cell office:value-type="error" table:formula="of:=[.B59]-[.C59]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error" table:formula="of:=(SIGN([.A60])*IF(AND(ISEVEN((ABS([.A60]))*10^1);MOD((ABS([.A60]))*10^1;1)&lt;=0.5);ROUNDDOWN(ABS([.A60]);1);ROUND(ABS([.A60]);1)))"/>
          <table:table-cell office:value-type="error" table:formula="of:=[.B60]-[.C60]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error" table:formula="of:=(SIGN([.A61])*IF(AND(ISEVEN((ABS([.A61]))*10^1);MOD((ABS([.A61]))*10^1;1)&lt;=0.5);ROUNDDOWN(ABS([.A61]);1);ROUND(ABS([.A61]);1)))"/>
          <table:table-cell office:value-type="error" table:formula="of:=[.B61]-[.C61]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error" table:formula="of:=(SIGN([.A62])*IF(AND(ISEVEN((ABS([.A62]))*10^1);MOD((ABS([.A62]))*10^1;1)&lt;=0.5);ROUNDDOWN(ABS([.A62]);1);ROUND(ABS([.A62]);1)))"/>
          <table:table-cell office:value-type="error" table:formula="of:=[.B62]-[.C62]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error" table:formula="of:=(SIGN([.A63])*IF(AND(ISEVEN((ABS([.A63]))*10^1);MOD((ABS([.A63]))*10^1;1)&lt;=0.5);ROUNDDOWN(ABS([.A63]);1);ROUND(ABS([.A63]);1)))"/>
          <table:table-cell office:value-type="error" table:formula="of:=[.B63]-[.C63]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error" table:formula="of:=(SIGN([.A64])*IF(AND(ISEVEN((ABS([.A64]))*10^1);MOD((ABS([.A64]))*10^1;1)&lt;=0.5);ROUNDDOWN(ABS([.A64]);1);ROUND(ABS([.A64]);1)))"/>
          <table:table-cell office:value-type="error" table:formula="of:=[.B64]-[.C64]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error" table:formula="of:=(SIGN([.A65])*IF(AND(ISEVEN((ABS([.A65]))*10^1);MOD((ABS([.A65]))*10^1;1)&lt;=0.5);ROUNDDOWN(ABS([.A65]);1);ROUND(ABS([.A65]);1)))"/>
          <table:table-cell office:value-type="error" table:formula="of:=[.B65]-[.C65]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error" table:formula="of:=(SIGN([.A66])*IF(AND(ISEVEN((ABS([.A66]))*10^1);MOD((ABS([.A66]))*10^1;1)&lt;=0.5);ROUNDDOWN(ABS([.A66]);1);ROUND(ABS([.A66]);1)))"/>
          <table:table-cell office:value-type="error" table:formula="of:=[.B66]-[.C66]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error" table:formula="of:=(SIGN([.A67])*IF(AND(ISEVEN((ABS([.A67]))*10^1);MOD((ABS([.A67]))*10^1;1)&lt;=0.5);ROUNDDOWN(ABS([.A67]);1);ROUND(ABS([.A67]);1)))"/>
          <table:table-cell office:value-type="error" table:formula="of:=[.B67]-[.C67]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error" table:formula="of:=(SIGN([.A68])*IF(AND(ISEVEN((ABS([.A68]))*10^1);MOD((ABS([.A68]))*10^1;1)&lt;=0.5);ROUNDDOWN(ABS([.A68]);1);ROUND(ABS([.A68]);1)))"/>
          <table:table-cell office:value-type="error" table:formula="of:=[.B68]-[.C68]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error" table:formula="of:=(SIGN([.A69])*IF(AND(ISEVEN((ABS([.A69]))*10^1);MOD((ABS([.A69]))*10^1;1)&lt;=0.5);ROUNDDOWN(ABS([.A69]);1);ROUND(ABS([.A69]);1)))"/>
          <table:table-cell office:value-type="error" table:formula="of:=[.B69]-[.C69]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error" table:formula="of:=(SIGN([.A70])*IF(AND(ISEVEN((ABS([.A70]))*10^1);MOD((ABS([.A70]))*10^1;1)&lt;=0.5);ROUNDDOWN(ABS([.A70]);1);ROUND(ABS([.A70]);1)))"/>
          <table:table-cell office:value-type="error" table:formula="of:=[.B70]-[.C70]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error" table:formula="of:=(SIGN([.A71])*IF(AND(ISEVEN((ABS([.A71]))*10^1);MOD((ABS([.A71]))*10^1;1)&lt;=0.5);ROUNDDOWN(ABS([.A71]);1);ROUND(ABS([.A71]);1)))"/>
          <table:table-cell office:value-type="error" table:formula="of:=[.B71]-[.C71]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error" table:formula="of:=(SIGN([.A72])*IF(AND(ISEVEN((ABS([.A72]))*10^1);MOD((ABS([.A72]))*10^1;1)&lt;=0.5);ROUNDDOWN(ABS([.A72]);1);ROUND(ABS([.A72]);1)))"/>
          <table:table-cell office:value-type="error" table:formula="of:=[.B72]-[.C72]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error" table:formula="of:=(SIGN([.A73])*IF(AND(ISEVEN((ABS([.A73]))*10^1);MOD((ABS([.A73]))*10^1;1)&lt;=0.5);ROUNDDOWN(ABS([.A73]);1);ROUND(ABS([.A73]);1)))"/>
          <table:table-cell office:value-type="error" table:formula="of:=[.B73]-[.C73]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error" table:formula="of:=(SIGN([.A74])*IF(AND(ISEVEN((ABS([.A74]))*10^1);MOD((ABS([.A74]))*10^1;1)&lt;=0.5);ROUNDDOWN(ABS([.A74]);1);ROUND(ABS([.A74]);1)))"/>
          <table:table-cell office:value-type="error" table:formula="of:=[.B74]-[.C74]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error" table:formula="of:=(SIGN([.A75])*IF(AND(ISEVEN((ABS([.A75]))*10^1);MOD((ABS([.A75]))*10^1;1)&lt;=0.5);ROUNDDOWN(ABS([.A75]);1);ROUND(ABS([.A75]);1)))"/>
          <table:table-cell office:value-type="error" table:formula="of:=[.B75]-[.C75]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error" table:formula="of:=(SIGN([.A76])*IF(AND(ISEVEN((ABS([.A76]))*10^1);MOD((ABS([.A76]))*10^1;1)&lt;=0.5);ROUNDDOWN(ABS([.A76]);1);ROUND(ABS([.A76]);1)))"/>
          <table:table-cell office:value-type="error" table:formula="of:=[.B76]-[.C76]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error" table:formula="of:=(SIGN([.A77])*IF(AND(ISEVEN((ABS([.A77]))*10^1);MOD((ABS([.A77]))*10^1;1)&lt;=0.5);ROUNDDOWN(ABS([.A77]);1);ROUND(ABS([.A77]);1)))"/>
          <table:table-cell office:value-type="error" table:formula="of:=[.B77]-[.C77]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error" table:formula="of:=(SIGN([.A78])*IF(AND(ISEVEN((ABS([.A78]))*10^1);MOD((ABS([.A78]))*10^1;1)&lt;=0.5);ROUNDDOWN(ABS([.A78]);1);ROUND(ABS([.A78]);1)))"/>
          <table:table-cell office:value-type="error" table:formula="of:=[.B78]-[.C78]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error" table:formula="of:=(SIGN([.A79])*IF(AND(ISEVEN((ABS([.A79]))*10^1);MOD((ABS([.A79]))*10^1;1)&lt;=0.5);ROUNDDOWN(ABS([.A79]);1);ROUND(ABS([.A79]);1)))"/>
          <table:table-cell office:value-type="error" table:formula="of:=[.B79]-[.C79]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error" table:formula="of:=(SIGN([.A80])*IF(AND(ISEVEN((ABS([.A80]))*10^1);MOD((ABS([.A80]))*10^1;1)&lt;=0.5);ROUNDDOWN(ABS([.A80]);1);ROUND(ABS([.A80]);1)))"/>
          <table:table-cell office:value-type="error" table:formula="of:=[.B80]-[.C80]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error" table:formula="of:=(SIGN([.A81])*IF(AND(ISEVEN((ABS([.A81]))*10^1);MOD((ABS([.A81]))*10^1;1)&lt;=0.5);ROUNDDOWN(ABS([.A81]);1);ROUND(ABS([.A81]);1)))"/>
          <table:table-cell office:value-type="error" table:formula="of:=[.B81]-[.C81]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error" table:formula="of:=(SIGN([.A82])*IF(AND(ISEVEN((ABS([.A82]))*10^1);MOD((ABS([.A82]))*10^1;1)&lt;=0.5);ROUNDDOWN(ABS([.A82]);1);ROUND(ABS([.A82]);1)))"/>
          <table:table-cell office:value-type="error" table:formula="of:=[.B82]-[.C82]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error" table:formula="of:=(SIGN([.A83])*IF(AND(ISEVEN((ABS([.A83]))*10^1);MOD((ABS([.A83]))*10^1;1)&lt;=0.5);ROUNDDOWN(ABS([.A83]);1);ROUND(ABS([.A83]);1)))"/>
          <table:table-cell office:value-type="error" table:formula="of:=[.B83]-[.C83]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error" table:formula="of:=(SIGN([.A84])*IF(AND(ISEVEN((ABS([.A84]))*10^1);MOD((ABS([.A84]))*10^1;1)&lt;=0.5);ROUNDDOWN(ABS([.A84]);1);ROUND(ABS([.A84]);1)))"/>
          <table:table-cell office:value-type="error" table:formula="of:=[.B84]-[.C84]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error" table:formula="of:=(SIGN([.A85])*IF(AND(ISEVEN((ABS([.A85]))*10^1);MOD((ABS([.A85]))*10^1;1)&lt;=0.5);ROUNDDOWN(ABS([.A85]);1);ROUND(ABS([.A85]);1)))"/>
          <table:table-cell office:value-type="error" table:formula="of:=[.B85]-[.C85]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error" table:formula="of:=(SIGN([.A86])*IF(AND(ISEVEN((ABS([.A86]))*10^1);MOD((ABS([.A86]))*10^1;1)&lt;=0.5);ROUNDDOWN(ABS([.A86]);1);ROUND(ABS([.A86]);1)))"/>
          <table:table-cell office:value-type="error" table:formula="of:=[.B86]-[.C86]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error" table:formula="of:=(SIGN([.A87])*IF(AND(ISEVEN((ABS([.A87]))*10^1);MOD((ABS([.A87]))*10^1;1)&lt;=0.5);ROUNDDOWN(ABS([.A87]);1);ROUND(ABS([.A87]);1)))"/>
          <table:table-cell office:value-type="error" table:formula="of:=[.B87]-[.C87]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error" table:formula="of:=(SIGN([.A88])*IF(AND(ISEVEN((ABS([.A88]))*10^1);MOD((ABS([.A88]))*10^1;1)&lt;=0.5);ROUNDDOWN(ABS([.A88]);1);ROUND(ABS([.A88]);1)))"/>
          <table:table-cell office:value-type="error" table:formula="of:=[.B88]-[.C88]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error" table:formula="of:=(SIGN([.A89])*IF(AND(ISEVEN((ABS([.A89]))*10^1);MOD((ABS([.A89]))*10^1;1)&lt;=0.5);ROUNDDOWN(ABS([.A89]);1);ROUND(ABS([.A89]);1)))"/>
          <table:table-cell office:value-type="error" table:formula="of:=[.B89]-[.C89]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error" table:formula="of:=(SIGN([.A90])*IF(AND(ISEVEN((ABS([.A90]))*10^1);MOD((ABS([.A90]))*10^1;1)&lt;=0.5);ROUNDDOWN(ABS([.A90]);1);ROUND(ABS([.A90]);1)))"/>
          <table:table-cell office:value-type="error" table:formula="of:=[.B90]-[.C90]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error" table:formula="of:=(SIGN([.A91])*IF(AND(ISEVEN((ABS([.A91]))*10^1);MOD((ABS([.A91]))*10^1;1)&lt;=0.5);ROUNDDOWN(ABS([.A91]);1);ROUND(ABS([.A91]);1)))"/>
          <table:table-cell office:value-type="error" table:formula="of:=[.B91]-[.C91]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error" table:formula="of:=(SIGN([.A92])*IF(AND(ISEVEN((ABS([.A92]))*10^1);MOD((ABS([.A92]))*10^1;1)&lt;=0.5);ROUNDDOWN(ABS([.A92]);1);ROUND(ABS([.A92]);1)))"/>
          <table:table-cell office:value-type="error" table:formula="of:=[.B92]-[.C92]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error" table:formula="of:=(SIGN([.A93])*IF(AND(ISEVEN((ABS([.A93]))*10^1);MOD((ABS([.A93]))*10^1;1)&lt;=0.5);ROUNDDOWN(ABS([.A93]);1);ROUND(ABS([.A93]);1)))"/>
          <table:table-cell office:value-type="error" table:formula="of:=[.B93]-[.C93]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error" table:formula="of:=(SIGN([.A94])*IF(AND(ISEVEN((ABS([.A94]))*10^1);MOD((ABS([.A94]))*10^1;1)&lt;=0.5);ROUNDDOWN(ABS([.A94]);1);ROUND(ABS([.A94]);1)))"/>
          <table:table-cell office:value-type="error" table:formula="of:=[.B94]-[.C94]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error" table:formula="of:=(SIGN([.A95])*IF(AND(ISEVEN((ABS([.A95]))*10^1);MOD((ABS([.A95]))*10^1;1)&lt;=0.5);ROUNDDOWN(ABS([.A95]);1);ROUND(ABS([.A95]);1)))"/>
          <table:table-cell office:value-type="error" table:formula="of:=[.B95]-[.C95]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error" table:formula="of:=(SIGN([.A96])*IF(AND(ISEVEN((ABS([.A96]))*10^1);MOD((ABS([.A96]))*10^1;1)&lt;=0.5);ROUNDDOWN(ABS([.A96]);1);ROUND(ABS([.A96]);1)))"/>
          <table:table-cell office:value-type="error" table:formula="of:=[.B96]-[.C96]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error" table:formula="of:=(SIGN([.A97])*IF(AND(ISEVEN((ABS([.A97]))*10^1);MOD((ABS([.A97]))*10^1;1)&lt;=0.5);ROUNDDOWN(ABS([.A97]);1);ROUND(ABS([.A97]);1)))"/>
          <table:table-cell office:value-type="error" table:formula="of:=[.B97]-[.C97]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error" table:formula="of:=(SIGN([.A98])*IF(AND(ISEVEN((ABS([.A98]))*10^1);MOD((ABS([.A98]))*10^1;1)&lt;=0.5);ROUNDDOWN(ABS([.A98]);1);ROUND(ABS([.A98]);1)))"/>
          <table:table-cell office:value-type="error" table:formula="of:=[.B98]-[.C98]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error" table:formula="of:=(SIGN([.A99])*IF(AND(ISEVEN((ABS([.A99]))*10^1);MOD((ABS([.A99]))*10^1;1)&lt;=0.5);ROUNDDOWN(ABS([.A99]);1);ROUND(ABS([.A99]);1)))"/>
          <table:table-cell office:value-type="error" table:formula="of:=[.B99]-[.C99]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error" table:formula="of:=(SIGN([.A100])*IF(AND(ISEVEN((ABS([.A100]))*10^1);MOD((ABS([.A100]))*10^1;1)&lt;=0.5);ROUNDDOWN(ABS([.A100]);1);ROUND(ABS([.A100]);1)))"/>
          <table:table-cell office:value-type="error" table:formula="of:=[.B100]-[.C100]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error" table:formula="of:=(SIGN([.A101])*IF(AND(ISEVEN((ABS([.A101]))*10^1);MOD((ABS([.A101]))*10^1;1)&lt;=0.5);ROUNDDOWN(ABS([.A101]);1);ROUND(ABS([.A101]);1)))"/>
          <table:table-cell office:value-type="error" table:formula="of:=[.B101]-[.C101]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error" table:formula="of:=(SIGN([.A102])*IF(AND(ISEVEN((ABS([.A102]))*10^1);MOD((ABS([.A102]))*10^1;1)&lt;=0.5);ROUNDDOWN(ABS([.A102]);1);ROUND(ABS([.A102]);1)))"/>
          <table:table-cell office:value-type="error" table:formula="of:=[.B102]-[.C102]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error" table:formula="of:=(SIGN([.A103])*IF(AND(ISEVEN((ABS([.A103]))*10^1);MOD((ABS([.A103]))*10^1;1)&lt;=0.5);ROUNDDOWN(ABS([.A103]);1);ROUND(ABS([.A103]);1)))"/>
          <table:table-cell office:value-type="error" table:formula="of:=[.B103]-[.C103]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error" table:formula="of:=(SIGN([.A104])*IF(AND(ISEVEN((ABS([.A104]))*10^1);MOD((ABS([.A104]))*10^1;1)&lt;=0.5);ROUNDDOWN(ABS([.A104]);1);ROUND(ABS([.A104]);1)))"/>
          <table:table-cell office:value-type="error" table:formula="of:=[.B104]-[.C104]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error" table:formula="of:=(SIGN([.A105])*IF(AND(ISEVEN((ABS([.A105]))*10^1);MOD((ABS([.A105]))*10^1;1)&lt;=0.5);ROUNDDOWN(ABS([.A105]);1);ROUND(ABS([.A105]);1)))"/>
          <table:table-cell office:value-type="error" table:formula="of:=[.B105]-[.C105]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error" table:formula="of:=(SIGN([.A106])*IF(AND(ISEVEN((ABS([.A106]))*10^1);MOD((ABS([.A106]))*10^1;1)&lt;=0.5);ROUNDDOWN(ABS([.A106]);1);ROUND(ABS([.A106]);1)))"/>
          <table:table-cell office:value-type="error" table:formula="of:=[.B106]-[.C106]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error" table:formula="of:=(SIGN([.A107])*IF(AND(ISEVEN((ABS([.A107]))*10^1);MOD((ABS([.A107]))*10^1;1)&lt;=0.5);ROUNDDOWN(ABS([.A107]);1);ROUND(ABS([.A107]);1)))"/>
          <table:table-cell office:value-type="error" table:formula="of:=[.B107]-[.C107]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error" table:formula="of:=(SIGN([.A108])*IF(AND(ISEVEN((ABS([.A108]))*10^1);MOD((ABS([.A108]))*10^1;1)&lt;=0.5);ROUNDDOWN(ABS([.A108]);1);ROUND(ABS([.A108]);1)))"/>
          <table:table-cell office:value-type="error" table:formula="of:=[.B108]-[.C108]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error" table:formula="of:=(SIGN([.A109])*IF(AND(ISEVEN((ABS([.A109]))*10^1);MOD((ABS([.A109]))*10^1;1)&lt;=0.5);ROUNDDOWN(ABS([.A109]);1);ROUND(ABS([.A109]);1)))"/>
          <table:table-cell office:value-type="error" table:formula="of:=[.B109]-[.C109]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error" table:formula="of:=(SIGN([.A110])*IF(AND(ISEVEN((ABS([.A110]))*10^1);MOD((ABS([.A110]))*10^1;1)&lt;=0.5);ROUNDDOWN(ABS([.A110]);1);ROUND(ABS([.A110]);1)))"/>
          <table:table-cell office:value-type="error" table:formula="of:=[.B110]-[.C110]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error" table:formula="of:=(SIGN([.A111])*IF(AND(ISEVEN((ABS([.A111]))*10^1);MOD((ABS([.A111]))*10^1;1)&lt;=0.5);ROUNDDOWN(ABS([.A111]);1);ROUND(ABS([.A111]);1)))"/>
          <table:table-cell office:value-type="error" table:formula="of:=[.B111]-[.C111]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error" table:formula="of:=(SIGN([.A112])*IF(AND(ISEVEN((ABS([.A112]))*10^1);MOD((ABS([.A112]))*10^1;1)&lt;=0.5);ROUNDDOWN(ABS([.A112]);1);ROUND(ABS([.A112]);1)))"/>
          <table:table-cell office:value-type="error" table:formula="of:=[.B112]-[.C112]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error" table:formula="of:=(SIGN([.A113])*IF(AND(ISEVEN((ABS([.A113]))*10^1);MOD((ABS([.A113]))*10^1;1)&lt;=0.5);ROUNDDOWN(ABS([.A113]);1);ROUND(ABS([.A113]);1)))"/>
          <table:table-cell office:value-type="error" table:formula="of:=[.B113]-[.C113]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error" table:formula="of:=(SIGN([.A114])*IF(AND(ISEVEN((ABS([.A114]))*10^1);MOD((ABS([.A114]))*10^1;1)&lt;=0.5);ROUNDDOWN(ABS([.A114]);1);ROUND(ABS([.A114]);1)))"/>
          <table:table-cell office:value-type="error" table:formula="of:=[.B114]-[.C114]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error" table:formula="of:=(SIGN([.A115])*IF(AND(ISEVEN((ABS([.A115]))*10^1);MOD((ABS([.A115]))*10^1;1)&lt;=0.5);ROUNDDOWN(ABS([.A115]);1);ROUND(ABS([.A115]);1)))"/>
          <table:table-cell office:value-type="error" table:formula="of:=[.B115]-[.C115]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error" table:formula="of:=(SIGN([.A116])*IF(AND(ISEVEN((ABS([.A116]))*10^1);MOD((ABS([.A116]))*10^1;1)&lt;=0.5);ROUNDDOWN(ABS([.A116]);1);ROUND(ABS([.A116]);1)))"/>
          <table:table-cell office:value-type="error" table:formula="of:=[.B116]-[.C116]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error" table:formula="of:=(SIGN([.A117])*IF(AND(ISEVEN((ABS([.A117]))*10^1);MOD((ABS([.A117]))*10^1;1)&lt;=0.5);ROUNDDOWN(ABS([.A117]);1);ROUND(ABS([.A117]);1)))"/>
          <table:table-cell office:value-type="error" table:formula="of:=[.B117]-[.C117]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error" table:formula="of:=(SIGN([.A118])*IF(AND(ISEVEN((ABS([.A118]))*10^1);MOD((ABS([.A118]))*10^1;1)&lt;=0.5);ROUNDDOWN(ABS([.A118]);1);ROUND(ABS([.A118]);1)))"/>
          <table:table-cell office:value-type="error" table:formula="of:=[.B118]-[.C118]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error" table:formula="of:=(SIGN([.A119])*IF(AND(ISEVEN((ABS([.A119]))*10^1);MOD((ABS([.A119]))*10^1;1)&lt;=0.5);ROUNDDOWN(ABS([.A119]);1);ROUND(ABS([.A119]);1)))"/>
          <table:table-cell office:value-type="error" table:formula="of:=[.B119]-[.C119]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error" table:formula="of:=(SIGN([.A120])*IF(AND(ISEVEN((ABS([.A120]))*10^1);MOD((ABS([.A120]))*10^1;1)&lt;=0.5);ROUNDDOWN(ABS([.A120]);1);ROUND(ABS([.A120]);1)))"/>
          <table:table-cell office:value-type="error" table:formula="of:=[.B120]-[.C120]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error" table:formula="of:=(SIGN([.A121])*IF(AND(ISEVEN((ABS([.A121]))*10^1);MOD((ABS([.A121]))*10^1;1)&lt;=0.5);ROUNDDOWN(ABS([.A121]);1);ROUND(ABS([.A121]);1)))"/>
          <table:table-cell office:value-type="error" table:formula="of:=[.B121]-[.C121]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error" table:formula="of:=(SIGN([.A122])*IF(AND(ISEVEN((ABS([.A122]))*10^1);MOD((ABS([.A122]))*10^1;1)&lt;=0.5);ROUNDDOWN(ABS([.A122]);1);ROUND(ABS([.A122]);1)))"/>
          <table:table-cell office:value-type="error" table:formula="of:=[.B122]-[.C122]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39">
            <text:p>39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IF(SUBTOTAL(2;[.D2:.D101])&gt;0;SUBTOTAL(1;[.D2:.D101])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9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32">
      <number:number number:decimal-places="0" number:min-decimal-places="0" number:min-integer-digits="1"/>
    </number:number-style>
    <number:number-style style:name="auto34">
      <number:number number:decimal-places="1" number:min-decimal-places="1" number:min-integer-digits="1"/>
    </number:number-style>
    <number:number-style style:name="auto36">
      <number:number number:decimal-places="2" number:min-decimal-places="2" number:min-integer-digits="1"/>
    </number:number-style>
    <number:number-style style:name="auto38">
      <number:number number:decimal-places="3" number:min-decimal-places="3" number:min-integer-digits="1"/>
    </number:number-style>
    <number:number-style style:name="auto40">
      <number:number number:decimal-places="4" number:min-decimal-places="4" number:min-integer-digits="1"/>
    </number:number-style>
    <number:number-style style:name="auto42">
      <number:number number:decimal-places="5" number:min-decimal-places="5" number:min-integer-digits="1"/>
    </number:number-style>
    <number:percentage-style style:name="auto44">
      <number:number number:decimal-places="0" number:min-decimal-places="0" number:min-integer-digits="1"/>
      <number:text> %</number:text>
    </number:percentage-style>
    <number:percentage-style style:name="auto46">
      <number:number number:decimal-places="1" number:min-decimal-places="1" number:min-integer-digits="1"/>
      <number:text> %</number:text>
    </number:percentage-style>
    <number:percentage-style style:name="auto48">
      <number:number number:decimal-places="2" number:min-decimal-places="2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5rc0</meta:generator>
    <meta:creation-date>2026-05-22T17:49:54</meta:creation-date>
    <dc:date>2026-05-22T17:49:54</dc:date>
  </office:meta>
</office:document-meta>
</file>